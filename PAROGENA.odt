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21/content.xml" manifest:media-type="text/xml"/>
  <manifest:file-entry manifest:full-path="Object 121/settings.xml" manifest:media-type="text/xml"/>
  <manifest:file-entry manifest:full-path="Object 121/"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 156/content.xml" manifest:media-type="text/xml"/>
  <manifest:file-entry manifest:full-path="Object 156/settings.xml" manifest:media-type="text/xml"/>
  <manifest:file-entry manifest:full-path="Object 156/"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155/content.xml" manifest:media-type="text/xml"/>
  <manifest:file-entry manifest:full-path="Object 155/settings.xml" manifest:media-type="text/xml"/>
  <manifest:file-entry manifest:full-path="Object 155/"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54/content.xml" manifest:media-type="text/xml"/>
  <manifest:file-entry manifest:full-path="Object 54/settings.xml" manifest:media-type="text/xml"/>
  <manifest:file-entry manifest:full-path="Object 54/"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122/content.xml" manifest:media-type="text/xml"/>
  <manifest:file-entry manifest:full-path="Object 122/settings.xml" manifest:media-type="text/xml"/>
  <manifest:file-entry manifest:full-path="Object 122/"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140/content.xml" manifest:media-type="text/xml"/>
  <manifest:file-entry manifest:full-path="Object 140/settings.xml" manifest:media-type="text/xml"/>
  <manifest:file-entry manifest:full-path="Object 140/" manifest:version="1.4" manifest:media-type="application/vnd.oasis.opendocument.formula"/>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ObjectReplacements/Object 121" manifest:media-type=""/>
  <manifest:file-entry manifest:full-path="ObjectReplacements/Object 2" manifest:media-type=""/>
  <manifest:file-entry manifest:full-path="ObjectReplacements/Object 20" manifest:media-type=""/>
  <manifest:file-entry manifest:full-path="ObjectReplacements/Object 156" manifest:media-type="application/x-openoffice-gdimetafile;windows_formatname=&quot;GDIMetaFile&quot;"/>
  <manifest:file-entry manifest:full-path="ObjectReplacements/Object 31" manifest:media-type=""/>
  <manifest:file-entry manifest:full-path="ObjectReplacements/Object 155" manifest:media-type="application/x-openoffice-gdimetafile;windows_formatname=&quot;GDIMetaFile&quot;"/>
  <manifest:file-entry manifest:full-path="ObjectReplacements/Object 32" manifest:media-type=""/>
  <manifest:file-entry manifest:full-path="ObjectReplacements/Object 122" manifest:media-type=""/>
  <manifest:file-entry manifest:full-path="ObjectReplacements/Object 1" manifest:media-type=""/>
  <manifest:file-entry manifest:full-path="ObjectReplacements/Object 23" manifest:media-type=""/>
  <manifest:file-entry manifest:full-path="ObjectReplacements/Object 154" manifest:media-type="application/x-openoffice-gdimetafile;windows_formatname=&quot;GDIMetaFile&quot;"/>
  <manifest:file-entry manifest:full-path="ObjectReplacements/Object 33" manifest:media-type=""/>
  <manifest:file-entry manifest:full-path="ObjectReplacements/Object 120" manifest:media-type=""/>
  <manifest:file-entry manifest:full-path="ObjectReplacements/Object 3" manifest:media-type=""/>
  <manifest:file-entry manifest:full-path="ObjectReplacements/Object 21" manifest:media-type=""/>
  <manifest:file-entry manifest:full-path="ObjectReplacements/Object 153" manifest:media-type="application/x-openoffice-gdimetafile;windows_formatname=&quot;GDIMetaFile&quot;"/>
  <manifest:file-entry manifest:full-path="ObjectReplacements/Object 34" manifest:media-type=""/>
  <manifest:file-entry manifest:full-path="ObjectReplacements/Object 59"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4" manifest:media-type=""/>
  <manifest:file-entry manifest:full-path="ObjectReplacements/Object 26" manifest:media-type=""/>
  <manifest:file-entry manifest:full-path="ObjectReplacements/Object 58" manifest:media-type=""/>
  <manifest:file-entry manifest:full-path="ObjectReplacements/Object 126" manifest:media-type=""/>
  <manifest:file-entry manifest:full-path="ObjectReplacements/Object 5" manifest:media-type=""/>
  <manifest:file-entry manifest:full-path="ObjectReplacements/Object 27" manifest:media-type=""/>
  <manifest:file-entry manifest:full-path="ObjectReplacements/Object 152" manifest:media-type="application/x-openoffice-gdimetafile;windows_formatname=&quot;GDIMetaFile&quot;"/>
  <manifest:file-entry manifest:full-path="ObjectReplacements/Object 35" manifest:media-type=""/>
  <manifest:file-entry manifest:full-path="ObjectReplacements/Object 125" manifest:media-type=""/>
  <manifest:file-entry manifest:full-path="ObjectReplacements/Object 6" manifest:media-type=""/>
  <manifest:file-entry manifest:full-path="ObjectReplacements/Object 24" manifest:media-type=""/>
  <manifest:file-entry manifest:full-path="ObjectReplacements/Object 151" manifest:media-type="application/x-openoffice-gdimetafile;windows_formatname=&quot;GDIMetaFile&quot;"/>
  <manifest:file-entry manifest:full-path="ObjectReplacements/Object 36" manifest:media-type=""/>
  <manifest:file-entry manifest:full-path="ObjectReplacements/Object 124" manifest:media-type=""/>
  <manifest:file-entry manifest:full-path="ObjectReplacements/Object 7" manifest:media-type=""/>
  <manifest:file-entry manifest:full-path="ObjectReplacements/Object 25" manifest:media-type=""/>
  <manifest:file-entry manifest:full-path="ObjectReplacements/Object 150" manifest:media-type="application/x-openoffice-gdimetafile;windows_formatname=&quot;GDIMetaFile&quot;"/>
  <manifest:file-entry manifest:full-path="ObjectReplacements/Object 37" manifest:media-type=""/>
  <manifest:file-entry manifest:full-path="ObjectReplacements/Object 55" manifest:media-type=""/>
  <manifest:file-entry manifest:full-path="ObjectReplacements/Object 8" manifest:media-type=""/>
  <manifest:file-entry manifest:full-path="ObjectReplacements/Object 38" manifest:media-type=""/>
  <manifest:file-entry manifest:full-path="ObjectReplacements/Object 54" manifest:media-type=""/>
  <manifest:file-entry manifest:full-path="ObjectReplacements/Object 9" manifest:media-type=""/>
  <manifest:file-entry manifest:full-path="ObjectReplacements/Object 39" manifest:media-type=""/>
  <manifest:file-entry manifest:full-path="ObjectReplacements/Object 133" manifest:media-type="application/x-openoffice-gdimetafile;windows_formatname=&quot;GDIMetaFile&quot;"/>
  <manifest:file-entry manifest:full-path="ObjectReplacements/Object 10" manifest:media-type=""/>
  <manifest:file-entry manifest:full-path="ObjectReplacements/Object 132" manifest:media-type="application/x-openoffice-gdimetafile;windows_formatname=&quot;GDIMetaFile&quot;"/>
  <manifest:file-entry manifest:full-path="ObjectReplacements/Object 11" manifest:media-type=""/>
  <manifest:file-entry manifest:full-path="ObjectReplacements/Object 131" manifest:media-type="application/x-openoffice-gdimetafile;windows_formatname=&quot;GDIMetaFile&quot;"/>
  <manifest:file-entry manifest:full-path="ObjectReplacements/Object 12" manifest:media-type=""/>
  <manifest:file-entry manifest:full-path="ObjectReplacements/Object 130" manifest:media-type="application/x-openoffice-gdimetafile;windows_formatname=&quot;GDIMetaFile&quot;"/>
  <manifest:file-entry manifest:full-path="ObjectReplacements/Object 13" manifest:media-type=""/>
  <manifest:file-entry manifest:full-path="ObjectReplacements/Object 137" manifest:media-type="application/x-openoffice-gdimetafile;windows_formatname=&quot;GDIMetaFile&quot;"/>
  <manifest:file-entry manifest:full-path="ObjectReplacements/Object 14" manifest:media-type=""/>
  <manifest:file-entry manifest:full-path="ObjectReplacements/Object 136" manifest:media-type="application/x-openoffice-gdimetafile;windows_formatname=&quot;GDIMetaFile&quot;"/>
  <manifest:file-entry manifest:full-path="ObjectReplacements/Object 15" manifest:media-type=""/>
  <manifest:file-entry manifest:full-path="ObjectReplacements/Object 135" manifest:media-type="application/x-openoffice-gdimetafile;windows_formatname=&quot;GDIMetaFile&quot;"/>
  <manifest:file-entry manifest:full-path="ObjectReplacements/Object 16" manifest:media-type=""/>
  <manifest:file-entry manifest:full-path="ObjectReplacements/Object 134" manifest:media-type="application/x-openoffice-gdimetafile;windows_formatname=&quot;GDIMetaFile&quot;"/>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123" manifest:media-type=""/>
  <manifest:file-entry manifest:full-path="ObjectReplacements/Object 22" manifest:media-type=""/>
  <manifest:file-entry manifest:full-path="ObjectReplacements/Object 57" manifest:media-type=""/>
  <manifest:file-entry manifest:full-path="ObjectReplacements/Object 129" manifest:media-type="application/x-openoffice-gdimetafile;windows_formatname=&quot;GDIMetaFile&quot;"/>
  <manifest:file-entry manifest:full-path="ObjectReplacements/Object 28" manifest:media-type=""/>
  <manifest:file-entry manifest:full-path="ObjectReplacements/Object 56" manifest:media-type=""/>
  <manifest:file-entry manifest:full-path="ObjectReplacements/Object 128" manifest:media-type="application/x-openoffice-gdimetafile;windows_formatname=&quot;GDIMetaFile&quot;"/>
  <manifest:file-entry manifest:full-path="ObjectReplacements/Object 29" manifest:media-type=""/>
  <manifest:file-entry manifest:full-path="ObjectReplacements/Object 157" manifest:media-type="application/x-openoffice-gdimetafile;windows_formatname=&quot;GDIMetaFile&quot;"/>
  <manifest:file-entry manifest:full-path="ObjectReplacements/Object 30" manifest:media-type=""/>
  <manifest:file-entry manifest:full-path="ObjectReplacements/Object 141" manifest:media-type="application/x-openoffice-gdimetafile;windows_formatname=&quot;GDIMetaFile&quot;"/>
  <manifest:file-entry manifest:full-path="ObjectReplacements/Object 40" manifest:media-type=""/>
  <manifest:file-entry manifest:full-path="ObjectReplacements/Object 140" manifest:media-type="application/x-openoffice-gdimetafile;windows_formatname=&quot;GDIMetaFile&quot;"/>
  <manifest:file-entry manifest:full-path="ObjectReplacements/Object 41" manifest:media-type=""/>
  <manifest:file-entry manifest:full-path="ObjectReplacements/Object 143" manifest:media-type="application/x-openoffice-gdimetafile;windows_formatname=&quot;GDIMetaFile&quot;"/>
  <manifest:file-entry manifest:full-path="ObjectReplacements/Object 42" manifest:media-type=""/>
  <manifest:file-entry manifest:full-path="ObjectReplacements/Object 142" manifest:media-type="application/x-openoffice-gdimetafile;windows_formatname=&quot;GDIMetaFile&quot;"/>
  <manifest:file-entry manifest:full-path="ObjectReplacements/Object 43" manifest:media-type=""/>
  <manifest:file-entry manifest:full-path="ObjectReplacements/Object 1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5" manifest:media-type=""/>
  <manifest:file-entry manifest:full-path="ObjectReplacements/Object 147" manifest:media-type="application/x-openoffice-gdimetafile;windows_formatname=&quot;GDIMetaFile&quot;"/>
  <manifest:file-entry manifest:full-path="ObjectReplacements/Object 46" manifest:media-type=""/>
  <manifest:file-entry manifest:full-path="ObjectReplacements/Object 146" manifest:media-type="application/x-openoffice-gdimetafile;windows_formatname=&quot;GDIMetaFile&quot;"/>
  <manifest:file-entry manifest:full-path="ObjectReplacements/Object 47" manifest:media-type=""/>
  <manifest:file-entry manifest:full-path="ObjectReplacements/Object 149" manifest:media-type=""/>
  <manifest:file-entry manifest:full-path="ObjectReplacements/Object 48" manifest:media-type=""/>
  <manifest:file-entry manifest:full-path="ObjectReplacements/Object 148" manifest:media-type="application/x-openoffice-gdimetafile;windows_formatname=&quot;GDIMetaFile&quot;"/>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application/x-openoffice-gdimetafile;windows_formatname=&quot;GDIMetaFile&quot;"/>
  <manifest:file-entry manifest:full-path="ObjectReplacements/Object 53" manifest:media-type=""/>
  <manifest:file-entry manifest:full-path="ObjectReplacements/Object 161" manifest:media-type=""/>
  <manifest:file-entry manifest:full-path="ObjectReplacements/Object 60" manifest:media-type=""/>
  <manifest:file-entry manifest:full-path="ObjectReplacements/Object 160" manifest:media-type="application/x-openoffice-gdimetafile;windows_formatname=&quot;GDIMetaFile&quot;"/>
  <manifest:file-entry manifest:full-path="ObjectReplacements/Object 61" manifest:media-type=""/>
  <manifest:file-entry manifest:full-path="ObjectReplacements/Object 163" manifest:media-type="application/x-openoffice-gdimetafile;windows_formatname=&quot;GDIMetaFile&quot;"/>
  <manifest:file-entry manifest:full-path="ObjectReplacements/Object 62" manifest:media-type=""/>
  <manifest:file-entry manifest:full-path="ObjectReplacements/Object 162" manifest:media-type="application/x-openoffice-gdimetafile;windows_formatname=&quot;GDIMetaFile&quot;"/>
  <manifest:file-entry manifest:full-path="ObjectReplacements/Object 63" manifest:media-type=""/>
  <manifest:file-entry manifest:full-path="ObjectReplacements/Object 165" manifest:media-type="application/x-openoffice-gdimetafile;windows_formatname=&quot;GDIMetaFile&quot;"/>
  <manifest:file-entry manifest:full-path="ObjectReplacements/Object 64" manifest:media-type=""/>
  <manifest:file-entry manifest:full-path="ObjectReplacements/Object 164" manifest:media-type="application/x-openoffice-gdimetafile;windows_formatname=&quot;GDIMetaFile&quot;"/>
  <manifest:file-entry manifest:full-path="ObjectReplacements/Object 65" manifest:media-type=""/>
  <manifest:file-entry manifest:full-path="ObjectReplacements/Object 167" manifest:media-type="application/x-openoffice-gdimetafile;windows_formatname=&quot;GDIMetaFile&quot;"/>
  <manifest:file-entry manifest:full-path="ObjectReplacements/Object 66" manifest:media-type=""/>
  <manifest:file-entry manifest:full-path="ObjectReplacements/Object 166" manifest:media-type="application/x-openoffice-gdimetafile;windows_formatname=&quot;GDIMetaFile&quot;"/>
  <manifest:file-entry manifest:full-path="ObjectReplacements/Object 67" manifest:media-type=""/>
  <manifest:file-entry manifest:full-path="ObjectReplacements/Object 169" manifest:media-type="application/x-openoffice-gdimetafile;windows_formatname=&quot;GDIMetaFile&quot;"/>
  <manifest:file-entry manifest:full-path="ObjectReplacements/Object 68" manifest:media-type=""/>
  <manifest:file-entry manifest:full-path="ObjectReplacements/Object 168" manifest:media-type="application/x-openoffice-gdimetafile;windows_formatname=&quot;GDIMetaFile&quot;"/>
  <manifest:file-entry manifest:full-path="ObjectReplacements/Object 69" manifest:media-type=""/>
  <manifest:file-entry manifest:full-path="ObjectReplacements/Object 70" manifest:media-type="application/x-openoffice-gdimetafile;windows_formatname=&quot;GDIMetaFile&quot;"/>
  <manifest:file-entry manifest:full-path="ObjectReplacements/Object 71" manifest:media-type=""/>
  <manifest:file-entry manifest:full-path="ObjectReplacements/Object 72" manifest:media-type=""/>
  <manifest:file-entry manifest:full-path="ObjectReplacements/Object 73" manifest:media-type=""/>
  <manifest:file-entry manifest:full-path="ObjectReplacements/Object 74" manifest:media-type=""/>
  <manifest:file-entry manifest:full-path="ObjectReplacements/Object 75" manifest:media-type="application/x-openoffice-gdimetafile;windows_formatname=&quot;GDIMetaFile&quot;"/>
  <manifest:file-entry manifest:full-path="ObjectReplacements/Object 76" manifest:media-type=""/>
  <manifest:file-entry manifest:full-path="ObjectReplacements/Object 77" manifest:media-type=""/>
  <manifest:file-entry manifest:full-path="ObjectReplacements/Object 78" manifest:media-type=""/>
  <manifest:file-entry manifest:full-path="ObjectReplacements/Object 79" manifest:media-type=""/>
  <manifest:file-entry manifest:full-path="ObjectReplacements/Object 80" manifest:media-type=""/>
  <manifest:file-entry manifest:full-path="ObjectReplacements/Object 81" manifest:media-type=""/>
  <manifest:file-entry manifest:full-path="ObjectReplacements/Object 82" manifest:media-type="application/x-openoffice-gdimetafile;windows_formatname=&quot;GDIMetaFile&quot;"/>
  <manifest:file-entry manifest:full-path="ObjectReplacements/Object 83" manifest:media-type=""/>
  <manifest:file-entry manifest:full-path="ObjectReplacements/Object 84"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90" manifest:media-type=""/>
  <manifest:file-entry manifest:full-path="ObjectReplacements/Object 91" manifest:media-type="application/x-openoffice-gdimetafile;windows_formatname=&quot;GDIMetaFile&quot;"/>
  <manifest:file-entry manifest:full-path="ObjectReplacements/Object 92" manifest:media-type=""/>
  <manifest:file-entry manifest:full-path="ObjectReplacements/Object 93" manifest:media-type=""/>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
  <manifest:file-entry manifest:full-path="ObjectReplacements/Object 9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14" manifest:media-type=""/>
  <manifest:file-entry manifest:full-path="ObjectReplacements/Object 11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5" manifest:media-type=""/>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 154/content.xml" manifest:media-type="text/xml"/>
  <manifest:file-entry manifest:full-path="Object 154/settings.xml" manifest:media-type="text/xml"/>
  <manifest:file-entry manifest:full-path="Object 154/" manifest:version="1.4" manifest:media-type="application/vnd.oasis.opendocument.formula"/>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120/content.xml" manifest:media-type="text/xml"/>
  <manifest:file-entry manifest:full-path="Object 120/settings.xml" manifest:media-type="text/xml"/>
  <manifest:file-entry manifest:full-path="Object 120/"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127/content.xml" manifest:media-type="text/xml"/>
  <manifest:file-entry manifest:full-path="Object 127/settings.xml" manifest:media-type="text/xml"/>
  <manifest:file-entry manifest:full-path="Object 127/"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26/content.xml" manifest:media-type="text/xml"/>
  <manifest:file-entry manifest:full-path="Object 26/settings.xml" manifest:media-type="text/xml"/>
  <manifest:file-entry manifest:full-path="Object 26/" manifest:version="1.4" manifest:media-type="application/vnd.oasis.opendocument.formula"/>
  <manifest:file-entry manifest:full-path="Object 153/content.xml" manifest:media-type="text/xml"/>
  <manifest:file-entry manifest:full-path="Object 153/settings.xml" manifest:media-type="text/xml"/>
  <manifest:file-entry manifest:full-path="Object 153/" manifest:version="1.4" manifest:media-type="application/vnd.oasis.opendocument.formula"/>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58/content.xml" manifest:media-type="text/xml"/>
  <manifest:file-entry manifest:full-path="Object 58/settings.xml" manifest:media-type="text/xml"/>
  <manifest:file-entry manifest:full-path="Object 58/" manifest:version="1.4" manifest:media-type="application/vnd.oasis.opendocument.formula"/>
  <manifest:file-entry manifest:full-path="Object 126/content.xml" manifest:media-type="text/xml"/>
  <manifest:file-entry manifest:full-path="Object 126/settings.xml" manifest:media-type="text/xml"/>
  <manifest:file-entry manifest:full-path="Object 126/"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152/content.xml" manifest:media-type="text/xml"/>
  <manifest:file-entry manifest:full-path="Object 152/settings.xml" manifest:media-type="text/xml"/>
  <manifest:file-entry manifest:full-path="Object 152/"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125/content.xml" manifest:media-type="text/xml"/>
  <manifest:file-entry manifest:full-path="Object 125/settings.xml" manifest:media-type="text/xml"/>
  <manifest:file-entry manifest:full-path="Object 125/"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151/content.xml" manifest:media-type="text/xml"/>
  <manifest:file-entry manifest:full-path="Object 151/settings.xml" manifest:media-type="text/xml"/>
  <manifest:file-entry manifest:full-path="Object 151/" manifest:version="1.4" manifest:media-type="application/vnd.oasis.opendocument.formula"/>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Object 124/content.xml" manifest:media-type="text/xml"/>
  <manifest:file-entry manifest:full-path="Object 124/settings.xml" manifest:media-type="text/xml"/>
  <manifest:file-entry manifest:full-path="Object 124/"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150/content.xml" manifest:media-type="text/xml"/>
  <manifest:file-entry manifest:full-path="Object 150/settings.xml" manifest:media-type="text/xml"/>
  <manifest:file-entry manifest:full-path="Object 150/" manifest:version="1.4" manifest:media-type="application/vnd.oasis.opendocument.formula"/>
  <manifest:file-entry manifest:full-path="Object 37/settings.xml" manifest:media-type="text/xml"/>
  <manifest:file-entry manifest:full-path="Object 37/content.xml" manifest:media-type="text/xml"/>
  <manifest:file-entry manifest:full-path="Object 37/" manifest:version="1.4" manifest:media-type="application/vnd.oasis.opendocument.formula"/>
  <manifest:file-entry manifest:full-path="Object 55/settings.xml" manifest:media-type="text/xml"/>
  <manifest:file-entry manifest:full-path="Object 55/content.xml" manifest:media-type="text/xml"/>
  <manifest:file-entry manifest:full-path="Object 55/"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4" manifest:media-type="application/vnd.oasis.opendocument.formula"/>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137/settings.xml" manifest:media-type="text/xml"/>
  <manifest:file-entry manifest:full-path="Object 137/Configurations2/" manifest:media-type="application/vnd.sun.xml.ui.configuration"/>
  <manifest:file-entry manifest:full-path="Object 137/content.xml" manifest:media-type="text/xml"/>
  <manifest:file-entry manifest:full-path="Object 137/"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136/content.xml" manifest:media-type="text/xml"/>
  <manifest:file-entry manifest:full-path="Object 136/settings.xml" manifest:media-type="text/xml"/>
  <manifest:file-entry manifest:full-path="Object 136/"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135/content.xml" manifest:media-type="text/xml"/>
  <manifest:file-entry manifest:full-path="Object 135/settings.xml" manifest:media-type="text/xml"/>
  <manifest:file-entry manifest:full-path="Object 135/"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34/content.xml" manifest:media-type="text/xml"/>
  <manifest:file-entry manifest:full-path="Object 134/settings.xml" manifest:media-type="text/xml"/>
  <manifest:file-entry manifest:full-path="Object 134/"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123/content.xml" manifest:media-type="text/xml"/>
  <manifest:file-entry manifest:full-path="Object 123/settings.xml" manifest:media-type="text/xml"/>
  <manifest:file-entry manifest:full-path="Object 123/"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129/settings.xml" manifest:media-type="text/xml"/>
  <manifest:file-entry manifest:full-path="Object 129/content.xml" manifest:media-type="text/xml"/>
  <manifest:file-entry manifest:full-path="Object 129/" manifest:version="1.4" manifest:media-type="application/vnd.oasis.opendocument.formula"/>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Object 128/content.xml" manifest:media-type="text/xml"/>
  <manifest:file-entry manifest:full-path="Object 128/settings.xml" manifest:media-type="text/xml"/>
  <manifest:file-entry manifest:full-path="Object 128/"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157/content.xml" manifest:media-type="text/xml"/>
  <manifest:file-entry manifest:full-path="Object 157/settings.xml" manifest:media-type="text/xml"/>
  <manifest:file-entry manifest:full-path="Object 157/" manifest:version="1.4" manifest:media-type="application/vnd.oasis.opendocument.formula"/>
  <manifest:file-entry manifest:full-path="Object 30/settings.xml" manifest:media-type="text/xml"/>
  <manifest:file-entry manifest:full-path="Object 30/content.xml" manifest:media-type="text/xml"/>
  <manifest:file-entry manifest:full-path="Object 30/" manifest:version="1.4" manifest:media-type="application/vnd.oasis.opendocument.formula"/>
  <manifest:file-entry manifest:full-path="Object 141/content.xml" manifest:media-type="text/xml"/>
  <manifest:file-entry manifest:full-path="Object 141/settings.xml" manifest:media-type="text/xml"/>
  <manifest:file-entry manifest:full-path="Object 141/" manifest:version="1.4" manifest:media-type="application/vnd.oasis.opendocument.formula"/>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143/settings.xml" manifest:media-type="text/xml"/>
  <manifest:file-entry manifest:full-path="Object 143/content.xml" manifest:media-type="text/xml"/>
  <manifest:file-entry manifest:full-path="Object 143/" manifest:version="1.4" manifest:media-type="application/vnd.oasis.opendocument.formula"/>
  <manifest:file-entry manifest:full-path="Object 42/settings.xml" manifest:media-type="text/xml"/>
  <manifest:file-entry manifest:full-path="Object 42/content.xml" manifest:media-type="text/xml"/>
  <manifest:file-entry manifest:full-path="Object 42/" manifest:version="1.4" manifest:media-type="application/vnd.oasis.opendocument.formula"/>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4" manifest:media-type="application/vnd.oasis.opendocument.formula"/>
  <manifest:file-entry manifest:full-path="Object 43/content.xml" manifest:media-type="text/xml"/>
  <manifest:file-entry manifest:full-path="Object 43/settings.xml" manifest:media-type="text/xml"/>
  <manifest:file-entry manifest:full-path="Object 43/" manifest:version="1.4" manifest:media-type="application/vnd.oasis.opendocument.formula"/>
  <manifest:file-entry manifest:full-path="Object 145/settings.xml" manifest:media-type="text/xml"/>
  <manifest:file-entry manifest:full-path="Object 145/content.xml" manifest:media-type="text/xml"/>
  <manifest:file-entry manifest:full-path="Object 145/" manifest:version="1.4"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164/content.xml" manifest:media-type="text/xml"/>
  <manifest:file-entry manifest:full-path="Object 164/settings.xml" manifest:media-type="text/xml"/>
  <manifest:file-entry manifest:full-path="Object 164/" manifest:version="1.4" manifest:media-type="application/vnd.oasis.opendocument.formula"/>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content.xml" manifest:media-type="text/xml"/>
  <manifest:file-entry manifest:full-path="Object 144/settings.xml" manifest:media-type="text/xml"/>
  <manifest:file-entry manifest:full-path="Object 144/content.xml" manifest:media-type="text/xml"/>
  <manifest:file-entry manifest:full-path="Object 144/" manifest:version="1.4" manifest:media-type="application/vnd.oasis.opendocument.formula"/>
  <manifest:file-entry manifest:full-path="Object 45/content.xml" manifest:media-type="text/xml"/>
  <manifest:file-entry manifest:full-path="Object 45/settings.xml" manifest:media-type="text/xml"/>
  <manifest:file-entry manifest:full-path="Object 45/" manifest:version="1.4" manifest:media-type="application/vnd.oasis.opendocument.formula"/>
  <manifest:file-entry manifest:full-path="Object 147/content.xml" manifest:media-type="text/xml"/>
  <manifest:file-entry manifest:full-path="Object 147/settings.xml" manifest:media-type="text/xml"/>
  <manifest:file-entry manifest:full-path="Object 147/" manifest:version="1.4" manifest:media-type="application/vnd.oasis.opendocument.formula"/>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146/settings.xml" manifest:media-type="text/xml"/>
  <manifest:file-entry manifest:full-path="Object 146/content.xml" manifest:media-type="text/xml"/>
  <manifest:file-entry manifest:full-path="Object 146/" manifest:version="1.4" manifest:media-type="application/vnd.oasis.opendocument.formula"/>
  <manifest:file-entry manifest:full-path="Object 47/content.xml" manifest:media-type="text/xml"/>
  <manifest:file-entry manifest:full-path="Object 47/settings.xml" manifest:media-type="text/xml"/>
  <manifest:file-entry manifest:full-path="Object 47/" manifest:version="1.4" manifest:media-type="application/vnd.oasis.opendocument.formula"/>
  <manifest:file-entry manifest:full-path="Object 149/content.xml" manifest:media-type="text/xml"/>
  <manifest:file-entry manifest:full-path="Object 149/settings.xml" manifest:media-type="text/xml"/>
  <manifest:file-entry manifest:full-path="Object 149/" manifest:version="1.4" manifest:media-type="application/vnd.oasis.opendocument.formula"/>
  <manifest:file-entry manifest:full-path="Object 48/settings.xml" manifest:media-type="text/xml"/>
  <manifest:file-entry manifest:full-path="Object 48/content.xml" manifest:media-type="text/xml"/>
  <manifest:file-entry manifest:full-path="Object 48/" manifest:version="1.4" manifest:media-type="application/vnd.oasis.opendocument.formula"/>
  <manifest:file-entry manifest:full-path="Object 148/content.xml" manifest:media-type="text/xml"/>
  <manifest:file-entry manifest:full-path="Object 148/settings.xml" manifest:media-type="text/xml"/>
  <manifest:file-entry manifest:full-path="Object 148/" manifest:version="1.4" manifest:media-type="application/vnd.oasis.opendocument.formula"/>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50/content.xml" manifest:media-type="text/xml"/>
  <manifest:file-entry manifest:full-path="Object 50/settings.xml" manifest:media-type="text/xml"/>
  <manifest:file-entry manifest:full-path="Object 50/"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53/content.xml" manifest:media-type="text/xml"/>
  <manifest:file-entry manifest:full-path="Object 53/settings.xml" manifest:media-type="text/xml"/>
  <manifest:file-entry manifest:full-path="Object 53/" manifest:version="1.4" manifest:media-type="application/vnd.oasis.opendocument.formula"/>
  <manifest:file-entry manifest:full-path="Object 161/content.xml" manifest:media-type="text/xml"/>
  <manifest:file-entry manifest:full-path="Object 161/settings.xml" manifest:media-type="text/xml"/>
  <manifest:file-entry manifest:full-path="Object 161/" manifest:version="1.4" manifest:media-type="application/vnd.oasis.opendocument.formula"/>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160/content.xml" manifest:media-type="text/xml"/>
  <manifest:file-entry manifest:full-path="Object 160/settings.xml" manifest:media-type="text/xml"/>
  <manifest:file-entry manifest:full-path="Object 160/"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163/content.xml" manifest:media-type="text/xml"/>
  <manifest:file-entry manifest:full-path="Object 163/settings.xml" manifest:media-type="text/xml"/>
  <manifest:file-entry manifest:full-path="Object 163/"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162/content.xml" manifest:media-type="text/xml"/>
  <manifest:file-entry manifest:full-path="Object 162/settings.xml" manifest:media-type="text/xml"/>
  <manifest:file-entry manifest:full-path="Object 162/" manifest:version="1.4" manifest:media-type="application/vnd.oasis.opendocument.formula"/>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4" manifest:media-type="application/vnd.oasis.opendocument.formula"/>
  <manifest:file-entry manifest:full-path="Object 64/settings.xml" manifest:media-type="text/xml"/>
  <manifest:file-entry manifest:full-path="Object 64/content.xml" manifest:media-type="text/xml"/>
  <manifest:file-entry manifest:full-path="Object 64/" manifest:version="1.4" manifest:media-type="application/vnd.oasis.opendocument.formula"/>
  <manifest:file-entry manifest:full-path="Object 167/content.xml" manifest:media-type="text/xml"/>
  <manifest:file-entry manifest:full-path="Object 167/settings.xml" manifest:media-type="text/xml"/>
  <manifest:file-entry manifest:full-path="Object 167/" manifest:version="1.4" manifest:media-type="application/vnd.oasis.opendocument.formula"/>
  <manifest:file-entry manifest:full-path="Object 66/content.xml" manifest:media-type="text/xml"/>
  <manifest:file-entry manifest:full-path="Object 66/settings.xml" manifest:media-type="text/xml"/>
  <manifest:file-entry manifest:full-path="Object 66/" manifest:version="1.4" manifest:media-type="application/vnd.oasis.opendocument.formula"/>
  <manifest:file-entry manifest:full-path="Object 166/content.xml" manifest:media-type="text/xml"/>
  <manifest:file-entry manifest:full-path="Object 166/settings.xml" manifest:media-type="text/xml"/>
  <manifest:file-entry manifest:full-path="Object 166/"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Object 169/content.xml" manifest:media-type="text/xml"/>
  <manifest:file-entry manifest:full-path="Object 169/settings.xml" manifest:media-type="text/xml"/>
  <manifest:file-entry manifest:full-path="Object 169/" manifest:version="1.4" manifest:media-type="application/vnd.oasis.opendocument.formula"/>
  <manifest:file-entry manifest:full-path="Object 68/settings.xml" manifest:media-type="text/xml"/>
  <manifest:file-entry manifest:full-path="Object 68/content.xml" manifest:media-type="text/xml"/>
  <manifest:file-entry manifest:full-path="Object 68/" manifest:version="1.4" manifest:media-type="application/vnd.oasis.opendocument.formula"/>
  <manifest:file-entry manifest:full-path="Object 168/content.xml" manifest:media-type="text/xml"/>
  <manifest:file-entry manifest:full-path="Object 168/settings.xml" manifest:media-type="text/xml"/>
  <manifest:file-entry manifest:full-path="Object 168/" manifest:version="1.4" manifest:media-type="application/vnd.oasis.opendocument.formula"/>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4" manifest:media-type="application/vnd.oasis.opendocument.formula"/>
  <manifest:file-entry manifest:full-path="Object 71/settings.xml" manifest:media-type="text/xml"/>
  <manifest:file-entry manifest:full-path="Object 71/content.xml" manifest:media-type="text/xml"/>
  <manifest:file-entry manifest:full-path="Object 71/" manifest:version="1.4" manifest:media-type="application/vnd.oasis.opendocument.formula"/>
  <manifest:file-entry manifest:full-path="Object 72/settings.xml" manifest:media-type="text/xml"/>
  <manifest:file-entry manifest:full-path="Object 72/content.xml" manifest:media-type="text/xml"/>
  <manifest:file-entry manifest:full-path="Object 72/"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4" manifest:media-type="application/vnd.oasis.opendocument.formula"/>
  <manifest:file-entry manifest:full-path="Object 76/settings.xml" manifest:media-type="text/xml"/>
  <manifest:file-entry manifest:full-path="Object 76/content.xml" manifest:media-type="text/xml"/>
  <manifest:file-entry manifest:full-path="Object 76/" manifest:version="1.4" manifest:media-type="application/vnd.oasis.opendocument.formula"/>
  <manifest:file-entry manifest:full-path="Object 77/settings.xml" manifest:media-type="text/xml"/>
  <manifest:file-entry manifest:full-path="Object 77/content.xml" manifest:media-type="text/xml"/>
  <manifest:file-entry manifest:full-path="Object 77/" manifest:version="1.4" manifest:media-type="application/vnd.oasis.opendocument.formula"/>
  <manifest:file-entry manifest:full-path="Object 78/settings.xml" manifest:media-type="text/xml"/>
  <manifest:file-entry manifest:full-path="Object 78/content.xml" manifest:media-type="text/xml"/>
  <manifest:file-entry manifest:full-path="Object 78/" manifest:version="1.4" manifest:media-type="application/vnd.oasis.opendocument.formula"/>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Object 80/settings.xml" manifest:media-type="text/xml"/>
  <manifest:file-entry manifest:full-path="Object 80/content.xml" manifest:media-type="text/xml"/>
  <manifest:file-entry manifest:full-path="Object 80/"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82/content.xml" manifest:media-type="text/xml"/>
  <manifest:file-entry manifest:full-path="Object 82/Configurations2/" manifest:media-type="application/vnd.sun.xml.ui.configuration"/>
  <manifest:file-entry manifest:full-path="Object 82/settings.xml" manifest:media-type="text/xml"/>
  <manifest:file-entry manifest:full-path="Object 82/" manifest:version="1.4" manifest:media-type="application/vnd.oasis.opendocument.formula"/>
  <manifest:file-entry manifest:full-path="Object 83/content.xml" manifest:media-type="text/xml"/>
  <manifest:file-entry manifest:full-path="Object 83/settings.xml" manifest:media-type="text/xml"/>
  <manifest:file-entry manifest:full-path="Object 83/" manifest:version="1.4" manifest:media-type="application/vnd.oasis.opendocument.formula"/>
  <manifest:file-entry manifest:full-path="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86/content.xml" manifest:media-type="text/xml"/>
  <manifest:file-entry manifest:full-path="Object 86/settings.xml" manifest:media-type="text/xml"/>
  <manifest:file-entry manifest:full-path="Object 86/" manifest:version="1.4" manifest:media-type="application/vnd.oasis.opendocument.formula"/>
  <manifest:file-entry manifest:full-path="Object 87/content.xml" manifest:media-type="text/xml"/>
  <manifest:file-entry manifest:full-path="Object 87/settings.xml" manifest:media-type="text/xml"/>
  <manifest:file-entry manifest:full-path="Object 87/" manifest:version="1.4" manifest:media-type="application/vnd.oasis.opendocument.formula"/>
  <manifest:file-entry manifest:full-path="Object 88/content.xml" manifest:media-type="text/xml"/>
  <manifest:file-entry manifest:full-path="Object 88/settings.xml" manifest:media-type="text/xml"/>
  <manifest:file-entry manifest:full-path="Object 88/" manifest:version="1.4" manifest:media-type="application/vnd.oasis.opendocument.formula"/>
  <manifest:file-entry manifest:full-path="Object 89/settings.xml" manifest:media-type="text/xml"/>
  <manifest:file-entry manifest:full-path="Object 89/content.xml" manifest:media-type="text/xml"/>
  <manifest:file-entry manifest:full-path="Object 89/" manifest:version="1.4" manifest:media-type="application/vnd.oasis.opendocument.formula"/>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4" manifest:media-type="application/vnd.oasis.opendocument.formula"/>
  <manifest:file-entry manifest:full-path="Object 92/content.xml" manifest:media-type="text/xml"/>
  <manifest:file-entry manifest:full-path="Object 92/settings.xml" manifest:media-type="text/xml"/>
  <manifest:file-entry manifest:full-path="Object 92/" manifest:version="1.4" manifest:media-type="application/vnd.oasis.opendocument.formula"/>
  <manifest:file-entry manifest:full-path="Object 93/settings.xml" manifest:media-type="text/xml"/>
  <manifest:file-entry manifest:full-path="Object 93/content.xml" manifest:media-type="text/xml"/>
  <manifest:file-entry manifest:full-path="Object 93/" manifest:version="1.4"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4" manifest:media-type="application/vnd.oasis.opendocument.formula"/>
  <manifest:file-entry manifest:full-path="Object 95/settings.xml" manifest:media-type="text/xml"/>
  <manifest:file-entry manifest:full-path="Object 95/Configurations2/" manifest:media-type="application/vnd.sun.xml.ui.configuration"/>
  <manifest:file-entry manifest:full-path="Object 95/content.xml" manifest:media-type="text/xml"/>
  <manifest:file-entry manifest:full-path="Object 95/" manifest:version="1.4" manifest:media-type="application/vnd.oasis.opendocument.formula"/>
  <manifest:file-entry manifest:full-path="Object 97/content.xml" manifest:media-type="text/xml"/>
  <manifest:file-entry manifest:full-path="Object 97/Configurations2/" manifest:media-type="application/vnd.sun.xml.ui.configuration"/>
  <manifest:file-entry manifest:full-path="Object 97/settings.xml" manifest:media-type="text/xml"/>
  <manifest:file-entry manifest:full-path="Object 97/" manifest:version="1.4" manifest:media-type="application/vnd.oasis.opendocument.formula"/>
  <manifest:file-entry manifest:full-path="Object 98/content.xml" manifest:media-type="text/xml"/>
  <manifest:file-entry manifest:full-path="Object 98/settings.xml" manifest:media-type="text/xml"/>
  <manifest:file-entry manifest:full-path="Object 98/" manifest:version="1.4" manifest:media-type="application/vnd.oasis.opendocument.formula"/>
  <manifest:file-entry manifest:full-path="Object 96/content.xml" manifest:media-type="text/xml"/>
  <manifest:file-entry manifest:full-path="Object 96/Configurations2/" manifest:media-type="application/vnd.sun.xml.ui.configuration"/>
  <manifest:file-entry manifest:full-path="Object 96/settings.xml" manifest:media-type="text/xml"/>
  <manifest:file-entry manifest:full-path="Object 96/" manifest:version="1.4" manifest:media-type="application/vnd.oasis.opendocument.formula"/>
  <manifest:file-entry manifest:full-path="Object 99/settings.xml" manifest:media-type="text/xml"/>
  <manifest:file-entry manifest:full-path="Object 99/content.xml" manifest:media-type="text/xml"/>
  <manifest:file-entry manifest:full-path="Object 99/Configurations2/" manifest:media-type="application/vnd.sun.xml.ui.configuration"/>
  <manifest:file-entry manifest:full-path="Object 99/" manifest:version="1.4" manifest:media-type="application/vnd.oasis.opendocument.formula"/>
  <manifest:file-entry manifest:full-path="Object 100/content.xml" manifest:media-type="text/xml"/>
  <manifest:file-entry manifest:full-path="Object 100/settings.xml" manifest:media-type="text/xml"/>
  <manifest:file-entry manifest:full-path="Object 100/Configurations2/" manifest:media-type="application/vnd.sun.xml.ui.configuration"/>
  <manifest:file-entry manifest:full-path="Object 100/" manifest:version="1.4"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4" manifest:media-type="application/vnd.oasis.opendocument.formula"/>
  <manifest:file-entry manifest:full-path="Object 114/settings.xml" manifest:media-type="text/xml"/>
  <manifest:file-entry manifest:full-path="Object 114/content.xml" manifest:media-type="text/xml"/>
  <manifest:file-entry manifest:full-path="Object 114/" manifest:version="1.4" manifest:media-type="application/vnd.oasis.opendocument.formula"/>
  <manifest:file-entry manifest:full-path="Object 115/content.xml" manifest:media-type="text/xml"/>
  <manifest:file-entry manifest:full-path="Object 115/Configurations2/" manifest:media-type="application/vnd.sun.xml.ui.configuration"/>
  <manifest:file-entry manifest:full-path="Object 115/settings.xml" manifest:media-type="text/xml"/>
  <manifest:file-entry manifest:full-path="Object 115/" manifest:version="1.4" manifest:media-type="application/vnd.oasis.opendocument.formula"/>
  <manifest:file-entry manifest:full-path="Object 101/content.xml" manifest:media-type="text/xml"/>
  <manifest:file-entry manifest:full-path="Object 101/settings.xml" manifest:media-type="text/xml"/>
  <manifest:file-entry manifest:full-path="Object 101/" manifest:version="1.4" manifest:media-type="application/vnd.oasis.opendocument.formula"/>
  <manifest:file-entry manifest:full-path="Object 102/content.xml" manifest:media-type="text/xml"/>
  <manifest:file-entry manifest:full-path="Object 102/settings.xml" manifest:media-type="text/xml"/>
  <manifest:file-entry manifest:full-path="Object 102/" manifest:version="1.4" manifest:media-type="application/vnd.oasis.opendocument.formula"/>
  <manifest:file-entry manifest:full-path="Object 103/content.xml" manifest:media-type="text/xml"/>
  <manifest:file-entry manifest:full-path="Object 103/settings.xml" manifest:media-type="text/xml"/>
  <manifest:file-entry manifest:full-path="Object 103/" manifest:version="1.4" manifest:media-type="application/vnd.oasis.opendocument.formula"/>
  <manifest:file-entry manifest:full-path="Object 104/content.xml" manifest:media-type="text/xml"/>
  <manifest:file-entry manifest:full-path="Object 104/settings.xml" manifest:media-type="text/xml"/>
  <manifest:file-entry manifest:full-path="Object 104/" manifest:version="1.4" manifest:media-type="application/vnd.oasis.opendocument.formula"/>
  <manifest:file-entry manifest:full-path="Object 106/content.xml" manifest:media-type="text/xml"/>
  <manifest:file-entry manifest:full-path="Object 106/settings.xml" manifest:media-type="text/xml"/>
  <manifest:file-entry manifest:full-path="Object 106/" manifest:version="1.4" manifest:media-type="application/vnd.oasis.opendocument.formula"/>
  <manifest:file-entry manifest:full-path="Object 107/content.xml" manifest:media-type="text/xml"/>
  <manifest:file-entry manifest:full-path="Object 107/settings.xml" manifest:media-type="text/xml"/>
  <manifest:file-entry manifest:full-path="Object 107/" manifest:version="1.4" manifest:media-type="application/vnd.oasis.opendocument.formula"/>
  <manifest:file-entry manifest:full-path="Object 108/content.xml" manifest:media-type="text/xml"/>
  <manifest:file-entry manifest:full-path="Object 108/settings.xml" manifest:media-type="text/xml"/>
  <manifest:file-entry manifest:full-path="Object 108/" manifest:version="1.4" manifest:media-type="application/vnd.oasis.opendocument.formula"/>
  <manifest:file-entry manifest:full-path="Object 109/content.xml" manifest:media-type="text/xml"/>
  <manifest:file-entry manifest:full-path="Object 109/settings.xml" manifest:media-type="text/xml"/>
  <manifest:file-entry manifest:full-path="Object 109/" manifest:version="1.4" manifest:media-type="application/vnd.oasis.opendocument.formula"/>
  <manifest:file-entry manifest:full-path="Object 110/settings.xml" manifest:media-type="text/xml"/>
  <manifest:file-entry manifest:full-path="Object 110/content.xml" manifest:media-type="text/xml"/>
  <manifest:file-entry manifest:full-path="Object 110/" manifest:version="1.4" manifest:media-type="application/vnd.oasis.opendocument.formula"/>
  <manifest:file-entry manifest:full-path="Object 111/settings.xml" manifest:media-type="text/xml"/>
  <manifest:file-entry manifest:full-path="Object 111/content.xml" manifest:media-type="text/xml"/>
  <manifest:file-entry manifest:full-path="Object 111/" manifest:version="1.4" manifest:media-type="application/vnd.oasis.opendocument.formula"/>
  <manifest:file-entry manifest:full-path="Object 113/settings.xml" manifest:media-type="text/xml"/>
  <manifest:file-entry manifest:full-path="Object 113/content.xml" manifest:media-type="text/xml"/>
  <manifest:file-entry manifest:full-path="Object 113/" manifest:version="1.4" manifest:media-type="application/vnd.oasis.opendocument.formula"/>
  <manifest:file-entry manifest:full-path="Object 117/content.xml" manifest:media-type="text/xml"/>
  <manifest:file-entry manifest:full-path="Object 117/settings.xml" manifest:media-type="text/xml"/>
  <manifest:file-entry manifest:full-path="Object 117/" manifest:version="1.4" manifest:media-type="application/vnd.oasis.opendocument.formula"/>
  <manifest:file-entry manifest:full-path="Object 118/content.xml" manifest:media-type="text/xml"/>
  <manifest:file-entry manifest:full-path="Object 118/settings.xml" manifest:media-type="text/xml"/>
  <manifest:file-entry manifest:full-path="Object 118/" manifest:version="1.4" manifest:media-type="application/vnd.oasis.opendocument.formula"/>
  <manifest:file-entry manifest:full-path="Object 119/content.xml" manifest:media-type="text/xml"/>
  <manifest:file-entry manifest:full-path="Object 119/settings.xml" manifest:media-type="text/xml"/>
  <manifest:file-entry manifest:full-path="Object 119/" manifest:version="1.4" manifest:media-type="application/vnd.oasis.opendocument.formula"/>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4" manifest:media-type="application/vnd.oasis.opendocument.formula"/>
  <manifest:file-entry manifest:full-path="Object 139/settings.xml" manifest:media-type="text/xml"/>
  <manifest:file-entry manifest:full-path="Object 139/content.xml" manifest:media-type="text/xml"/>
  <manifest:file-entry manifest:full-path="Object 139/" manifest:version="1.4" manifest:media-type="application/vnd.oasis.opendocument.formula"/>
  <manifest:file-entry manifest:full-path="Object 112/settings.xml" manifest:media-type="text/xml"/>
  <manifest:file-entry manifest:full-path="Object 112/content.xml" manifest:media-type="text/xml"/>
  <manifest:file-entry manifest:full-path="Object 112/" manifest:version="1.4" manifest:media-type="application/vnd.oasis.opendocument.formula"/>
  <manifest:file-entry manifest:full-path="Object 116/settings.xml" manifest:media-type="text/xml"/>
  <manifest:file-entry manifest:full-path="Object 116/content.xml" manifest:media-type="text/xml"/>
  <manifest:file-entry manifest:full-path="Object 116/" manifest:version="1.4" manifest:media-type="application/vnd.oasis.opendocument.formula"/>
  <manifest:file-entry manifest:full-path="Object 85/settings.xml" manifest:media-type="text/xml"/>
  <manifest:file-entry manifest:full-path="Object 85/content.xml" manifest:media-type="text/xml"/>
  <manifest:file-entry manifest:full-path="Object 85/" manifest:version="1.4" manifest:media-type="application/vnd.oasis.opendocument.formula"/>
  <manifest:file-entry manifest:full-path="Thumbnails/thumbnail.png" manifest:media-type="image/png"/>
  <manifest:file-entry manifest:full-path="Object 158/content.xml" manifest:media-type="text/xml"/>
  <manifest:file-entry manifest:full-path="Object 158/settings.xml" manifest:media-type="text/xml"/>
  <manifest:file-entry manifest:full-path="Object 158/" manifest:version="1.4" manifest:media-type="application/vnd.oasis.opendocument.formula"/>
  <manifest:file-entry manifest:full-path="Object 159/content.xml" manifest:media-type="text/xml"/>
  <manifest:file-entry manifest:full-path="Object 159/settings.xml" manifest:media-type="text/xml"/>
  <manifest:file-entry manifest:full-path="Object 159/"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2B30000013FF7CC862F.png" manifest:media-type="image/png"/>
  <manifest:file-entry manifest:full-path="Pictures/1000000100000178000000EAB954B0C7.png" manifest:media-type="image/png"/>
  <manifest:file-entry manifest:full-path="Pictures/10000000000001F70000015AFE3E8355.png" manifest:media-type="image/png"/>
  <manifest:file-entry manifest:full-path="Pictures/10000000000001FC0000015A6060830A.png" manifest:media-type="image/png"/>
  <manifest:file-entry manifest:full-path="Pictures/2000005C0000333A000023AF6BB58A45.svm" manifest:media-type="image/x-svm"/>
  <manifest:file-entry manifest:full-path="Pictures/2000004C00003370000023AF93148AA0.svm" manifest:media-type="image/x-svm"/>
  <manifest:file-entry manifest:full-path="Pictures/10000000000001F30000015AA6B41371.png" manifest:media-type="image/png"/>
  <manifest:file-entry manifest:full-path="Pictures/10000000000001F10000015ADDB8410E.png" manifest:media-type="image/png"/>
  <manifest:file-entry manifest:full-path="Pictures/2000005200003462000023AF43BF50A9.svm" manifest:media-type="image/x-svm"/>
  <manifest:file-entry manifest:full-path="Pictures/10000000000001F50000015A3961138D.png" manifest:media-type="image/png"/>
  <manifest:file-entry manifest:full-path="Pictures/20000055000033A6000023AF4EDD557A.svm" manifest:media-type="image/x-svm"/>
  <manifest:file-entry manifest:full-path="Pictures/2000005900003498000023AF870F2DED.svm" manifest:media-type="image/x-svm"/>
  <manifest:file-entry manifest:full-path="Pictures/10000000000001FE0000015A26F8F678.png" manifest:media-type="image/png"/>
  <manifest:file-entry manifest:full-path="Pictures/10000000000002BA00000204DE5E6809.png" manifest:media-type="image/png"/>
  <manifest:file-entry manifest:full-path="Pictures/20000054000033E4000023AF3017DA4B.svm" manifest:media-type="image/x-svm"/>
  <manifest:file-entry manifest:full-path="Pictures/2000004B000032BC000023AFE8E8B04B.svm" manifest:media-type="image/x-svm"/>
  <manifest:file-entry manifest:full-path="Pictures/10000000000001EC0000015A3E236C44.png" manifest:media-type="image/png"/>
  <manifest:file-entry manifest:full-path="Pictures/2000005000003304000023AFC1DE98B1.svm" manifest:media-type="image/x-svm"/>
  <manifest:file-entry manifest:full-path="Pictures/10000000000001EF0000015A537A2DA1.png" manifest:media-type="image/png"/>
  <manifest:file-entry manifest:full-path="Pictures/200000530000326B000023AF06C78669.svm" manifest:media-type="image/x-svm"/>
  <manifest:file-entry manifest:full-path="Pictures/10000000000001E90000015A9D6470C3.png" manifest:media-type="image/png"/>
  <manifest:file-entry manifest:full-path="Pictures/20000050000033DB000023AFDE6F381D.svm" manifest:media-type="image/x-svm"/>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6.484cm" fo:margin-left="0.009cm" fo:margin-top="0cm" fo:margin-bottom="0cm" table:align="left" style:writing-mode="lr-tb"/>
    </style:style>
    <style:style style:name="Таблица1.A" style:family="table-column">
      <style:table-column-properties style:column-width="7.622cm"/>
    </style:style>
    <style:style style:name="Таблица1.B" style:family="table-column">
      <style:table-column-properties style:column-width="2.72cm"/>
    </style:style>
    <style:style style:name="Таблица1.C" style:family="table-column">
      <style:table-column-properties style:column-width="2.649cm"/>
    </style:style>
    <style:style style:name="Таблица1.D" style:family="table-column">
      <style:table-column-properties style:column-width="3.493cm"/>
    </style:style>
    <style:style style:name="Таблица1.1" style:family="table-row">
      <style:table-row-properties fo:keep-together="auto"/>
    </style:style>
    <style:style style:name="Таблица1.A1" style:family="table-cell">
      <style:table-cell-properties style:vertical-align="middle" fo:padding-left="0.191cm" fo:padding-right="0.191cm" fo:padding-top="0cm" fo:padding-bottom="0cm" fo:border="0.5pt solid #000000" style:writing-mode="lr-tb"/>
    </style:style>
    <style:style style:name="Таблица3" style:family="table">
      <style:table-properties style:width="16.501cm" table:align="margins" style:writing-mode="lr-tb"/>
    </style:style>
    <style:style style:name="Таблица3.A" style:family="table-column">
      <style:table-column-properties style:column-width="1.796cm" style:rel-column-width="7133*"/>
    </style:style>
    <style:style style:name="Таблица3.B" style:family="table-column">
      <style:table-column-properties style:column-width="2.45cm" style:rel-column-width="9733*"/>
    </style:style>
    <style:style style:name="Таблица3.G" style:family="table-column">
      <style:table-column-properties style:column-width="2.452cm" style:rel-column-width="9737*"/>
    </style:style>
    <style:style style:name="Таблица3.A1" style:family="table-cell">
      <style:table-cell-properties style:vertical-align="middle" fo:padding="0.097cm" fo:border-left="0.5pt solid #000000" fo:border-right="none" fo:border-top="0.5pt solid #000000" fo:border-bottom="0.5pt solid #000000"/>
    </style:style>
    <style:style style:name="Таблица3.B1" style:family="table-cell">
      <style:table-cell-properties style:vertical-align="middle" fo:padding="0.097cm" fo:border="0.5pt solid #000000"/>
    </style:style>
    <style:style style:name="Таблица3.B2" style:family="table-cell">
      <style:table-cell-properties style:vertical-align="middle" fo:padding="0.097cm" fo:border-left="0.5pt solid #000000" fo:border-right="none" fo:border-top="none" fo:border-bottom="0.5pt solid #000000"/>
    </style:style>
    <style:style style:name="Таблица3.G2" style:family="table-cell">
      <style:table-cell-properties style:vertical-align="middle" fo:padding="0.097cm" fo:border-left="0.5pt solid #000000" fo:border-right="0.5pt solid #000000" fo:border-top="none" fo:border-bottom="0.5pt solid #000000"/>
    </style:style>
    <style:style style:name="Таблица3.6" style:family="table-row">
      <style:table-row-properties style:min-row-height="0.002cm"/>
    </style:style>
    <style:style style:name="Таблица2" style:family="table">
      <style:table-properties style:width="16.484cm" fo:margin-left="0.009cm" fo:margin-top="0cm" fo:margin-bottom="0cm" table:align="left" style:writing-mode="lr-tb"/>
    </style:style>
    <style:style style:name="Таблица2.A" style:family="table-column">
      <style:table-column-properties style:column-width="4.12cm"/>
    </style:style>
    <style:style style:name="Таблица2.C" style:family="table-column">
      <style:table-column-properties style:column-width="3.752cm"/>
    </style:style>
    <style:style style:name="Таблица2.D" style:family="table-column">
      <style:table-column-properties style:column-width="4.491cm"/>
    </style:style>
    <style:style style:name="Таблица2.1" style:family="table-row">
      <style:table-row-properties fo:keep-together="auto"/>
    </style:style>
    <style:style style:name="Таблица2.A1" style:family="table-cell">
      <style:table-cell-properties style:vertical-align="middle" fo:padding-left="0.191cm" fo:padding-right="0.191cm" fo:padding-top="0cm" fo:padding-bottom="0cm" fo:border="0.5pt solid #000000" style:writing-mode="lr-tb"/>
    </style:style>
    <style:style style:name="Таблица2.A2" style:family="table-cell" style:data-style-name="N114">
      <style:table-cell-properties style:vertical-align="middle" fo:padding-left="0.191cm" fo:padding-right="0.191cm" fo:padding-top="0cm" fo:padding-bottom="0cm" fo:border="0.5pt solid #000000" style:writing-mode="lr-tb"/>
    </style:style>
    <style:style style:name="Таблица2.B2" style:family="table-cell" style:data-style-name="N1">
      <style:table-cell-properties style:vertical-align="middle" fo:padding-left="0.191cm" fo:padding-right="0.191cm" fo:padding-top="0cm" fo:padding-bottom="0cm" fo:border="0.5pt solid #000000" style:writing-mode="lr-tb"/>
    </style:style>
    <style:style style:name="Таблица2.7" style:family="table-row">
      <style:table-row-properties style:min-row-height="0.561cm" fo:keep-together="auto"/>
    </style:style>
    <style:style style:name="Таблица4" style:family="table">
      <style:table-properties style:width="16.501cm" table:align="margins" style:writing-mode="lr-tb"/>
    </style:style>
    <style:style style:name="Таблица4.A" style:family="table-column">
      <style:table-column-properties style:column-width="5.5cm" style:rel-column-width="21845*"/>
    </style:style>
    <style:style style:name="Таблица4.A1" style:family="table-cell">
      <style:table-cell-properties style:vertical-align="middle" fo:padding="0.097cm" fo:border-left="0.5pt solid #000000" fo:border-right="none" fo:border-top="0.5pt solid #000000" fo:border-bottom="0.5pt solid #000000"/>
    </style:style>
    <style:style style:name="Таблица4.C1" style:family="table-cell">
      <style:table-cell-properties style:vertical-align="middle" fo:padding="0.097cm" fo:border="0.5pt solid #000000"/>
    </style:style>
    <style:style style:name="Таблица4.A2" style:family="table-cell" style:data-style-name="N0">
      <style:table-cell-properties style:vertical-align="middle" fo:padding="0.097cm" fo:border-left="0.5pt solid #000000" fo:border-right="none" fo:border-top="none" fo:border-bottom="0.5pt solid #000000"/>
    </style:style>
    <style:style style:name="Таблица4.B2" style:family="table-cell" style:data-style-name="N1">
      <style:table-cell-properties style:vertical-align="middle" fo:padding="0.097cm" fo:border-left="0.5pt solid #000000" fo:border-right="none" fo:border-top="none" fo:border-bottom="0.5pt solid #000000"/>
    </style:style>
    <style:style style:name="Таблица4.C2" style:family="table-cell" style:data-style-name="N1">
      <style:table-cell-properties style:vertical-align="middle" fo:padding="0.097cm" fo:border-left="0.5pt solid #000000" fo:border-right="0.5pt solid #000000" fo:border-top="none" fo:border-bottom="0.5pt solid #000000"/>
    </style:style>
    <style:style style:name="Таблица5" style:family="table">
      <style:table-properties style:width="16.501cm" table:align="margins" style:writing-mode="lr-tb"/>
    </style:style>
    <style:style style:name="Таблица5.A" style:family="table-column">
      <style:table-column-properties style:column-width="2.057cm" style:rel-column-width="8168*"/>
    </style:style>
    <style:style style:name="Таблица5.B" style:family="table-column">
      <style:table-column-properties style:column-width="2.067cm" style:rel-column-width="8210*"/>
    </style:style>
    <style:style style:name="Таблица5.C" style:family="table-column">
      <style:table-column-properties style:column-width="2.064cm" style:rel-column-width="8196*"/>
    </style:style>
    <style:style style:name="Таблица5.D" style:family="table-column">
      <style:table-column-properties style:column-width="2.062cm" style:rel-column-width="8189*"/>
    </style:style>
    <style:style style:name="Таблица5.H" style:family="table-column">
      <style:table-column-properties style:column-width="2.064cm" style:rel-column-width="8198*"/>
    </style:style>
    <style:style style:name="Таблица5.A1" style:family="table-cell">
      <style:table-cell-properties style:vertical-align="middle" fo:padding="0.097cm" fo:border-left="0.5pt solid #000000" fo:border-right="none" fo:border-top="0.5pt solid #000000" fo:border-bottom="0.5pt solid #000000"/>
    </style:style>
    <style:style style:name="Таблица5.H1" style:family="table-cell">
      <style:table-cell-properties style:vertical-align="middle" fo:padding="0.097cm" fo:border="0.5pt solid #000000"/>
    </style:style>
    <style:style style:name="Таблица5.A2" style:family="table-cell" style:data-style-name="N0">
      <style:table-cell-properties style:vertical-align="middle" fo:padding="0.097cm" fo:border-left="0.5pt solid #000000" fo:border-right="none" fo:border-top="none" fo:border-bottom="0.5pt solid #000000"/>
    </style:style>
    <style:style style:name="Таблица5.B2" style:family="table-cell" style:data-style-name="N1">
      <style:table-cell-properties style:vertical-align="middle" fo:padding="0.097cm" fo:border-left="0.5pt solid #000000" fo:border-right="none" fo:border-top="none" fo:border-bottom="0.5pt solid #000000"/>
    </style:style>
    <style:style style:name="Таблица5.H2" style:family="table-cell" style:data-style-name="N114">
      <style:table-cell-properties style:vertical-align="middle" fo:padding="0.097cm" fo:border-left="0.5pt solid #000000" fo:border-right="0.5pt solid #000000" fo:border-top="none" fo:border-bottom="0.5pt solid #000000"/>
    </style:style>
    <style:style style:name="Таблица6" style:family="table" style:master-page-name="">
      <style:table-properties style:width="16.501cm" style:page-number="auto" table:align="margins" style:writing-mode="lr-tb"/>
    </style:style>
    <style:style style:name="Таблица6.A" style:family="table-column">
      <style:table-column-properties style:column-width="2.083cm" style:rel-column-width="1181*"/>
    </style:style>
    <style:style style:name="Таблица6.B" style:family="table-column">
      <style:table-column-properties style:column-width="2.036cm" style:rel-column-width="1154*"/>
    </style:style>
    <style:style style:name="Таблица6.C" style:family="table-column">
      <style:table-column-properties style:column-width="2.069cm" style:rel-column-width="1173*"/>
    </style:style>
    <style:style style:name="Таблица6.D" style:family="table-column">
      <style:table-column-properties style:column-width="2.062cm" style:rel-column-width="1169*"/>
    </style:style>
    <style:style style:name="Таблица6.F" style:family="table-column">
      <style:table-column-properties style:column-width="2.064cm" style:rel-column-width="1170*"/>
    </style:style>
    <style:style style:name="Таблица6.1" style:family="table-row">
      <style:table-row-properties style:min-row-height="0.914cm"/>
    </style:style>
    <style:style style:name="Таблица6.A1" style:family="table-cell">
      <style:table-cell-properties style:vertical-align="middle" fo:padding="0.097cm" fo:border-left="0.5pt solid #000000" fo:border-right="none" fo:border-top="0.5pt solid #000000" fo:border-bottom="0.5pt solid #000000" style:writing-mode="page"/>
    </style:style>
    <style:style style:name="Таблица6.C1" style:family="table-cell">
      <style:table-cell-properties style:vertical-align="middle" fo:padding="0.097cm" fo:border="0.5pt solid #000000" style:writing-mode="page"/>
    </style:style>
    <style:style style:name="Таблица6.A2" style:family="table-cell">
      <style:table-cell-properties style:vertical-align="middle" fo:padding="0.097cm" fo:border-left="0.5pt solid #000000" fo:border-right="none" fo:border-top="none" fo:border-bottom="0.5pt solid #000000" style:writing-mode="page"/>
    </style:style>
    <style:style style:name="Таблица6.C2" style:family="table-cell" style:data-style-name="N0">
      <style:table-cell-properties style:vertical-align="middle" fo:padding="0.097cm" fo:border-left="0.5pt solid #000000" fo:border-right="none" fo:border-top="none" fo:border-bottom="0.5pt solid #000000" style:writing-mode="page"/>
    </style:style>
    <style:style style:name="Таблица6.H2" style:family="table-cell" style:data-style-name="N0">
      <style:table-cell-properties style:vertical-align="middle" fo:padding="0.097cm" fo:border-left="0.5pt solid #000000" fo:border-right="0.5pt solid #000000" fo:border-top="none" fo:border-bottom="0.5pt solid #000000" style:writing-mode="page"/>
    </style:style>
    <style:style style:name="Таблица6.C9" style:family="table-cell" style:data-style-name="N2">
      <style:table-cell-properties style:vertical-align="middle" fo:padding="0.097cm" fo:border-left="0.5pt solid #000000" fo:border-right="none" fo:border-top="none" fo:border-bottom="0.5pt solid #000000" style:writing-mode="page"/>
    </style:style>
    <style:style style:name="Таблица6.H9" style:family="table-cell" style:data-style-name="N2">
      <style:table-cell-properties style:vertical-align="middle" fo:padding="0.097cm" fo:border-left="0.5pt solid #000000" fo:border-right="0.5pt solid #000000" fo:border-top="none" fo:border-bottom="0.5pt solid #000000" style:writing-mode="page"/>
    </style:style>
    <style:style style:name="Таблица6.G10" style:family="table-cell" style:data-style-name="N2">
      <style:table-cell-properties style:vertical-align="middle" fo:background-color="#ff0000" fo:padding="0.097cm" fo:border-left="0.5pt solid #000000" fo:border-right="none" fo:border-top="none" fo:border-bottom="0.5pt solid #000000" style:writing-mode="page">
        <style:background-image/>
      </style:table-cell-properties>
    </style:style>
    <style:style style:name="Таблица6.H10" style:family="table-cell" style:data-style-name="N2">
      <style:table-cell-properties style:vertical-align="middle" fo:background-color="#ff0000" fo:padding="0.097cm" fo:border-left="0.5pt solid #000000" fo:border-right="0.5pt solid #000000" fo:border-top="none" fo:border-bottom="0.5pt solid #000000" style:writing-mode="page">
        <style:background-image/>
      </style:table-cell-properties>
    </style:style>
    <style:style style:name="Таблица6.C21" style:family="table-cell" style:data-style-name="N0">
      <style:table-cell-properties style:vertical-align="middle" fo:background-color="#ff0000" fo:padding="0.097cm" fo:border-left="0.5pt solid #000000" fo:border-right="none" fo:border-top="none" fo:border-bottom="0.5pt solid #000000" style:writing-mode="page">
        <style:background-image/>
      </style:table-cell-properties>
    </style:style>
    <style:style style:name="Таблица7" style:family="table" style:master-page-name="">
      <style:table-properties style:width="16.501cm" style:page-number="auto" table:align="margins" style:writing-mode="lr-tb"/>
    </style:style>
    <style:style style:name="Таблица7.A" style:family="table-column">
      <style:table-column-properties style:column-width="2.062cm" style:rel-column-width="8191*"/>
    </style:style>
    <style:style style:name="Таблица7.1" style:family="table-row">
      <style:table-row-properties style:min-row-height="1.476cm"/>
    </style:style>
    <style:style style:name="Таблица7.A1" style:family="table-cell">
      <style:table-cell-properties style:vertical-align="middle" fo:padding="0.097cm" fo:border-left="0.5pt solid #000000" fo:border-right="none" fo:border-top="0.5pt solid #000000" fo:border-bottom="0.5pt solid #000000"/>
    </style:style>
    <style:style style:name="Таблица7.C1" style:family="table-cell">
      <style:table-cell-properties style:vertical-align="middle" fo:padding="0.097cm" fo:border="0.5pt solid #000000"/>
    </style:style>
    <style:style style:name="Таблица7.C2" style:family="table-cell" style:data-style-name="N0">
      <style:table-cell-properties style:vertical-align="middle" fo:padding="0.097cm" fo:border-left="0.5pt solid #000000" fo:border-right="none" fo:border-top="none" fo:border-bottom="0.5pt solid #000000"/>
    </style:style>
    <style:style style:name="Таблица7.H2" style:family="table-cell" style:data-style-name="N0">
      <style:table-cell-properties style:vertical-align="middle" fo:padding="0.097cm" fo:border-left="0.5pt solid #000000" fo:border-right="0.5pt solid #000000" fo:border-top="none" fo:border-bottom="0.5pt solid #000000"/>
    </style:style>
    <style:style style:name="Таблица7.A3" style:family="table-cell">
      <style:table-cell-properties style:vertical-align="middle" fo:padding="0.097cm" fo:border-left="0.5pt solid #000000" fo:border-right="none" fo:border-top="none" fo:border-bottom="0.5pt solid #000000"/>
    </style:style>
    <style:style style:name="Таблица7.B3" style:family="table-cell">
      <style:table-cell-properties style:vertical-align="middle" fo:padding="0.097cm" fo:border-left="0.5pt solid #000000" fo:border-right="none" fo:border-top="none" fo:border-bottom="0.5pt solid #000000"/>
    </style:style>
    <style:style style:name="Таблица7.C3" style:family="table-cell" style:data-style-name="N2">
      <style:table-cell-properties style:vertical-align="middle" fo:padding="0.097cm" fo:border-left="0.5pt solid #000000" fo:border-right="none" fo:border-top="none" fo:border-bottom="0.5pt solid #000000"/>
    </style:style>
    <style:style style:name="Таблица7.H3" style:family="table-cell" style:data-style-name="N2">
      <style:table-cell-properties style:vertical-align="middle" fo:padding="0.097cm" fo:border-left="0.5pt solid #000000" fo:border-right="0.5pt solid #000000" fo:border-top="none" fo:border-bottom="0.5pt solid #000000"/>
    </style:style>
    <style:style style:name="Таблица7.A4" style:family="table-cell">
      <style:table-cell-properties style:vertical-align="middle" fo:padding="0.097cm" fo:border-left="0.5pt solid #000000" fo:border-right="none" fo:border-top="none" fo:border-bottom="0.5pt solid #000000"/>
    </style:style>
    <style:style style:name="Таблица7.B4" style:family="table-cell">
      <style:table-cell-properties style:vertical-align="middle" fo:padding="0.097cm" fo:border-left="0.5pt solid #000000" fo:border-right="none" fo:border-top="none" fo:border-bottom="0.5pt solid #000000"/>
    </style:style>
    <style:style style:name="Таблица7.A5" style:family="table-cell">
      <style:table-cell-properties style:vertical-align="middle" fo:padding="0.097cm" fo:border-left="0.5pt solid #000000" fo:border-right="none" fo:border-top="none" fo:border-bottom="0.5pt solid #000000"/>
    </style:style>
    <style:style style:name="Таблица7.B5" style:family="table-cell">
      <style:table-cell-properties style:vertical-align="middle" fo:padding="0.097cm" fo:border-left="0.5pt solid #000000" fo:border-right="none" fo:border-top="none" fo:border-bottom="0.5pt solid #000000"/>
    </style:style>
    <style:style style:name="Таблица7.A6" style:family="table-cell">
      <style:table-cell-properties style:vertical-align="middle" fo:padding="0.097cm" fo:border-left="0.5pt solid #000000" fo:border-right="none" fo:border-top="none" fo:border-bottom="0.5pt solid #000000"/>
    </style:style>
    <style:style style:name="Таблица7.B6" style:family="table-cell">
      <style:table-cell-properties style:vertical-align="middle" fo:padding="0.097cm" fo:border-left="0.5pt solid #000000" fo:border-right="none" fo:border-top="none" fo:border-bottom="0.5pt solid #000000"/>
    </style:style>
    <style:style style:name="Таблица7.A7" style:family="table-cell">
      <style:table-cell-properties style:vertical-align="middle" fo:padding="0.097cm" fo:border-left="0.5pt solid #000000" fo:border-right="none" fo:border-top="none" fo:border-bottom="0.5pt solid #000000"/>
    </style:style>
    <style:style style:name="Таблица7.B7" style:family="table-cell">
      <style:table-cell-properties style:vertical-align="middle" fo:padding="0.097cm" fo:border-left="0.5pt solid #000000" fo:border-right="none" fo:border-top="none" fo:border-bottom="0.5pt solid #000000"/>
    </style:style>
    <style:style style:name="Таблица7.A8" style:family="table-cell">
      <style:table-cell-properties style:vertical-align="middle" fo:padding="0.097cm" fo:border-left="0.5pt solid #000000" fo:border-right="none" fo:border-top="none" fo:border-bottom="0.5pt solid #000000"/>
    </style:style>
    <style:style style:name="Таблица7.B8" style:family="table-cell">
      <style:table-cell-properties style:vertical-align="middle" fo:padding="0.097cm" fo:border-left="0.5pt solid #000000" fo:border-right="none" fo:border-top="none" fo:border-bottom="0.5pt solid #000000"/>
    </style:style>
    <style:style style:name="Таблица7.A9" style:family="table-cell">
      <style:table-cell-properties style:vertical-align="middle" fo:padding="0.097cm" fo:border-left="0.5pt solid #000000" fo:border-right="none" fo:border-top="none" fo:border-bottom="0.5pt solid #000000"/>
    </style:style>
    <style:style style:name="Таблица7.B9" style:family="table-cell">
      <style:table-cell-properties style:vertical-align="middle" fo:padding="0.097cm" fo:border-left="0.5pt solid #000000" fo:border-right="none" fo:border-top="none" fo:border-bottom="0.5pt solid #000000"/>
    </style:style>
    <style:style style:name="Таблица7.A10" style:family="table-cell">
      <style:table-cell-properties style:vertical-align="middle" fo:padding="0.097cm" fo:border-left="0.5pt solid #000000" fo:border-right="none" fo:border-top="none" fo:border-bottom="0.5pt solid #000000"/>
    </style:style>
    <style:style style:name="Таблица7.B10" style:family="table-cell">
      <style:table-cell-properties style:vertical-align="middle" fo:padding="0.097cm" fo:border-left="0.5pt solid #000000" fo:border-right="none" fo:border-top="none" fo:border-bottom="0.5pt solid #000000"/>
    </style:style>
    <style:style style:name="P1" style:family="paragraph" style:parent-style-name="Title">
      <style:paragraph-properties fo:margin-top="0cm" fo:margin-bottom="0.139cm" style:contextual-spacing="false"/>
    </style:style>
    <style:style style:name="P2" style:family="paragraph" style:parent-style-name="Standard">
      <style:paragraph-properties fo:text-align="center" style:justify-single-word="false" loext:word-spacing-minimum="75%" loext:word-spacing-maximum="133%"/>
    </style:style>
    <style:style style:name="P3" style:family="paragraph" style:parent-style-name="Standard">
      <style:paragraph-properties fo:text-align="right" style:justify-single-word="false" loext:word-spacing-minimum="75%" loext:word-spacing-maximum="133%"/>
    </style:style>
    <style:style style:name="P4" style:family="paragraph" style:parent-style-name="Contents_20_1">
      <style:paragraph-properties>
        <style:tab-stops>
          <style:tab-stop style:position="16.4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499cm" style:type="right" style:leader-style="dotted" style:leader-text="."/>
        </style:tab-stops>
      </style:paragraph-properties>
    </style:style>
    <style:style style:name="P7" style:family="paragraph" style:parent-style-name="Heading_20_1" style:list-style-name="">
      <style:paragraph-properties fo:margin-top="0cm" fo:margin-bottom="0.141cm" style:contextual-spacing="true" fo:line-height="116%" fo:text-align="center" style:justify-single-word="false" fo:keep-together="always" fo:orphans="2" fo:widows="2" loext:word-spacing-minimum="75%" loext:word-spacing-maximum="133%"/>
      <style:text-properties officeooo:paragraph-rsid="003cdd3c"/>
    </style:style>
    <style:style style:name="P8" style:family="paragraph" style:parent-style-name="Heading_20_1">
      <style:paragraph-properties fo:margin-top="0cm" fo:margin-bottom="0.141cm" style:contextual-spacing="true" fo:break-before="page"/>
      <style:text-properties officeooo:paragraph-rsid="003cdd3c"/>
    </style:style>
    <style:style style:name="P9" style:family="paragraph" style:parent-style-name="Standard">
      <style:paragraph-properties fo:margin-left="0cm" fo:margin-top="0cm" fo:margin-bottom="0.282cm" style:contextual-spacing="true" fo:text-align="center" style:justify-single-word="false" fo:text-indent="0cm" style:auto-text-indent="false"/>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margin-left="0cm" fo:text-align="left" style:justify-single-word="false" fo:text-indent="0cm" style:auto-text-indent="false" loext:word-spacing-minimum="75%" loext:word-spacing-maximum="133%"/>
    </style:style>
    <style:style style:name="P12" style:family="paragraph" style:parent-style-name="Standard" style:list-style-name="WWNum2">
      <style:paragraph-properties fo:margin-left="0cm" fo:text-indent="1.251cm" style:auto-text-indent="false"/>
    </style:style>
    <style:style style:name="P13" style:family="paragraph" style:parent-style-name="Standard">
      <style:paragraph-properties fo:margin-left="0cm" fo:text-align="center" style:justify-single-word="false" fo:text-indent="0cm" style:auto-text-indent="false"/>
    </style:style>
    <style:style style:name="P14" style:family="paragraph" style:parent-style-name="Table">
      <style:paragraph-properties fo:keep-with-next="always"/>
    </style:style>
    <style:style style:name="P15" style:family="paragraph" style:parent-style-name="Standard">
      <loext:graphic-properties draw:fill="none"/>
      <style:paragraph-properties fo:margin-left="0cm" fo:margin-right="0cm" fo:margin-top="0cm" fo:margin-bottom="0cm" style:contextual-spacing="true" fo:line-height="100%" fo:text-align="center" style:justify-single-word="false" fo:orphans="2" fo:widows="2" fo:text-indent="0cm" style:auto-text-indent="false" fo:background-color="transparent" style:writing-mode="lr-tb"/>
      <style:text-properties fo:font-size="12pt" fo:language="ru" fo:country="RU" style:letter-kerning="true" style:font-name-asian="Aptos1" style:font-size-asian="12pt" style:language-asian="en" style:country-asian="US" style:font-size-complex="11pt" style:language-complex="ar" style:country-complex="SA"/>
    </style:style>
    <style:style style:name="P16" style:family="paragraph" style:parent-style-name="Standard">
      <loext:graphic-properties draw:fill="none"/>
      <style:paragraph-properties fo:margin-left="0cm" fo:margin-right="0cm" fo:margin-top="0cm" fo:margin-bottom="0cm" style:contextual-spacing="true" fo:line-height="100%" fo:text-align="center" style:justify-single-word="false" fo:orphans="2" fo:widows="2" fo:text-indent="0cm" style:auto-text-indent="false" fo:background-color="transparent" style:writing-mode="lr-tb"/>
      <style:text-properties fo:language="ru" fo:country="RU" style:letter-kerning="true" style:font-name-asian="Aptos1" style:language-asian="en" style:country-asian="US" style:language-complex="ar" style:country-complex="SA"/>
    </style:style>
    <style:style style:name="P17" style:family="paragraph" style:parent-style-name="Standard">
      <loext:graphic-properties draw:fill="none"/>
      <style:paragraph-properties fo:margin-left="0cm" fo:margin-right="0cm" fo:margin-top="0cm" fo:margin-bottom="0cm" style:contextual-spacing="true" fo:line-height="100%" fo:text-align="center" style:justify-single-word="false" fo:orphans="2" fo:widows="2" fo:text-indent="0cm" style:auto-text-indent="false" fo:background-color="transparent" style:writing-mode="lr-tb"/>
      <style:text-properties fo:font-size="12pt" fo:language="ru" fo:country="RU" officeooo:paragraph-rsid="000a5cf3" style:letter-kerning="true" style:font-name-asian="Aptos1" style:font-size-asian="12pt" style:language-asian="en" style:country-asian="US" style:font-size-complex="11pt" style:language-complex="ar" style:country-complex="SA"/>
    </style:style>
    <style:style style:name="P18" style:family="paragraph" style:parent-style-name="Standard">
      <loext:graphic-properties draw:fill="solid" draw:fill-color="#ffffff"/>
      <style:paragraph-properties fo:margin-top="0cm" fo:margin-bottom="0cm" style:contextual-spacing="false" fo:background-color="#ffffff"/>
    </style:style>
    <style:style style:name="P19" style:family="paragraph" style:parent-style-name="Standard">
      <style:paragraph-properties fo:margin-top="0cm" fo:margin-bottom="0cm" style:contextual-spacing="false" fo:text-align="center" style:justify-single-word="false" loext:word-spacing-minimum="75%" loext:word-spacing-maximum="133%"/>
    </style:style>
    <style:style style:name="P20" style:family="paragraph" style:parent-style-name="Standard">
      <loext:graphic-properties draw:fill="solid" draw:fill-color="#ffffff"/>
      <style:paragraph-properties fo:margin-top="0cm" fo:margin-bottom="0cm" style:contextual-spacing="false" fo:background-color="#ffffff"/>
      <style:text-properties fo:color="#0f1115" loext:opacity="100%" style:letter-kerning="false" style:font-name-asian="Times New Roman1" style:language-asian="ru" style:country-asian="RU" style:font-name-complex="Times New Roman1" style:font-size-complex="14pt"/>
    </style:style>
    <style:style style:name="P21" style:family="paragraph" style:parent-style-name="Heading_20_2">
      <style:paragraph-properties fo:break-before="page"/>
    </style:style>
    <style:style style:name="P22" style:family="paragraph" style:parent-style-name="ds-markdown-paragraph">
      <loext:graphic-properties draw:fill="solid" draw:fill-color="#ffffff"/>
      <style:paragraph-properties fo:margin-top="0cm" fo:margin-bottom="0cm" style:contextual-spacing="false" fo:line-height="150%" fo:text-indent="1.251cm" style:auto-text-indent="false" fo:background-color="#ffffff"/>
    </style:style>
    <style:style style:name="P23" style:family="paragraph" style:parent-style-name="ds-markdown-paragraph">
      <loext:graphic-properties draw:fill="solid" draw:fill-color="#ffffff"/>
      <style:paragraph-properties fo:margin-left="0cm" fo:margin-top="0cm" fo:margin-bottom="0cm" style:contextual-spacing="false" fo:line-height="150%" fo:text-align="center" style:justify-single-word="false" fo:text-indent="0cm" style:auto-text-indent="false" fo:background-color="#ffffff" loext:word-spacing-minimum="75%" loext:word-spacing-maximum="133%"/>
    </style:style>
    <style:style style:name="P24" style:family="paragraph" style:parent-style-name="Standard">
      <loext:graphic-properties draw:fill="solid" draw:fill-color="#ffffff"/>
      <style:paragraph-properties fo:margin-top="0cm" fo:margin-bottom="0cm" style:contextual-spacing="false" fo:text-align="left" style:justify-single-word="false" fo:background-color="#ffffff" loext:word-spacing-minimum="75%" loext:word-spacing-maximum="133%"/>
    </style:style>
    <style:style style:name="P25" style:family="paragraph" style:parent-style-name="Standard">
      <style:paragraph-properties fo:margin-left="0cm" fo:margin-top="0cm" fo:margin-bottom="0cm" style:contextual-spacing="false" fo:text-align="center" style:justify-single-word="false" fo:text-indent="0cm" style:auto-text-indent="false" loext:word-spacing-minimum="75%" loext:word-spacing-maximum="133%"/>
    </style:style>
    <style:style style:name="P26" style:family="paragraph" style:parent-style-name="Standard">
      <loext:graphic-properties draw:fill="solid" draw:fill-color="#ffffff"/>
      <style:paragraph-properties fo:margin-top="0cm" fo:margin-bottom="0cm" style:contextual-spacing="false" fo:text-align="left" style:justify-single-word="false" fo:background-color="#ffffff" loext:word-spacing-minimum="75%" loext:word-spacing-maximum="133%"/>
      <style:text-properties fo:color="#0f1115" loext:opacity="100%" style:letter-kerning="false" style:font-name-asian="Times New Roman1" style:language-asian="ru" style:country-asian="RU" style:font-name-complex="Times New Roman1" style:font-size-complex="14pt"/>
    </style:style>
    <style:style style:name="P27" style:family="paragraph" style:parent-style-name="Standard">
      <loext:graphic-properties draw:fill="solid" draw:fill-color="#ffffff"/>
      <style:paragraph-properties fo:margin-top="0cm" fo:margin-bottom="0cm" style:contextual-spacing="false" fo:text-align="left" style:justify-single-word="false" fo:background-color="#ffffff" loext:word-spacing-minimum="75%" loext:word-spacing-maximum="133%"/>
      <style:text-properties fo:color="#0f1115" loext:opacity="100%" fo:language="el" fo:country="GR" officeooo:rsid="0019a650" officeooo:paragraph-rsid="0019a650" style:letter-kerning="false" style:font-name-asian="Times New Roman1" style:language-asian="ru" style:country-asian="RU" style:font-name-complex="Times New Roman1" style:font-size-complex="14pt"/>
    </style:style>
    <style:style style:name="P28" style:family="paragraph" style:parent-style-name="Standard">
      <style:paragraph-properties fo:margin-left="0cm" fo:margin-top="0cm" fo:margin-bottom="0cm" style:contextual-spacing="true" fo:text-align="center" style:justify-single-word="false" fo:text-indent="0cm" style:auto-text-indent="false" loext:word-spacing-minimum="75%" loext:word-spacing-maximum="133%"/>
    </style:style>
    <style:style style:name="P29" style:family="paragraph" style:parent-style-name="Standard">
      <loext:graphic-properties draw:fill="solid" draw:fill-color="#ffffff"/>
      <style:paragraph-properties fo:margin-top="0cm" fo:margin-bottom="0cm" style:contextual-spacing="false" fo:background-color="#ffffff"/>
      <style:text-properties officeooo:paragraph-rsid="00326f52"/>
    </style:style>
    <style:style style:name="P30" style:family="paragraph" style:parent-style-name="Standard">
      <style:paragraph-properties fo:margin-top="0cm" fo:margin-bottom="0cm" style:contextual-spacing="false" fo:text-align="center" style:justify-single-word="false" fo:text-indent="0cm" style:auto-text-indent="false" loext:word-spacing-minimum="75%" loext:word-spacing-maximum="133%"/>
      <style:text-properties officeooo:paragraph-rsid="00326f52"/>
    </style:style>
    <style:style style:name="P31" style:family="paragraph" style:parent-style-name="Standard">
      <style:paragraph-properties fo:margin-left="0cm" fo:text-align="center" style:justify-single-word="false" fo:text-indent="0cm" style:auto-text-indent="false" loext:word-spacing-minimum="75%" loext:word-spacing-maximum="133%"/>
    </style:style>
    <style:style style:name="P32"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text-indent="0cm" style:auto-text-indent="false" fo:background-color="transparent" text:number-lines="false" text:line-number="0" style:writing-mode="lr-tb"/>
      <style:text-properties fo:font-size="12pt" fo:language="en" fo:country="US" officeooo:rsid="000f72ce" officeooo:paragraph-rsid="000f72ce" style:font-size-asian="12pt" style:font-size-complex="12pt"/>
    </style:style>
    <style:style style:name="P33"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text-indent="0cm" style:auto-text-indent="false" fo:background-color="transparent" text:number-lines="false" text:line-number="0" style:writing-mode="lr-tb"/>
      <style:text-properties fo:font-size="12pt" fo:language="ru" fo:country="RU" officeooo:rsid="000f72ce" officeooo:paragraph-rsid="000f72ce" style:font-size-asian="12pt" style:font-size-complex="12pt"/>
    </style:style>
    <style:style style:name="P34"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text-indent="0cm" style:auto-text-indent="false" fo:background-color="transparent" text:number-lines="false" text:line-number="0" style:writing-mode="lr-tb"/>
      <style:text-properties fo:font-size="12pt" officeooo:rsid="000f72ce" officeooo:paragraph-rsid="000f72ce" style:font-size-asian="12pt" style:font-size-complex="12pt"/>
    </style:style>
    <style:style style:name="P35"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text-indent="0cm" style:auto-text-indent="false" fo:background-color="transparent" text:number-lines="false" text:line-number="0" style:writing-mode="lr-tb"/>
      <style:text-properties fo:font-size="12pt" style:font-size-asian="12pt" style:font-size-complex="12pt"/>
    </style:style>
    <style:style style:name="P36" style:family="paragraph" style:parent-style-name="Standard">
      <style:text-properties officeooo:paragraph-rsid="00326f52"/>
    </style:style>
    <style:style style:name="P37" style:family="paragraph" style:parent-style-name="Формула">
      <style:text-properties officeooo:paragraph-rsid="00326f52"/>
    </style:style>
    <style:style style:name="P38" style:family="paragraph" style:parent-style-name="Standard" style:master-page-name="">
      <loext:graphic-properties draw:fill="none"/>
      <style:paragraph-properties fo:margin-left="0cm" fo:margin-right="0cm" fo:margin-top="0cm" fo:margin-bottom="0.282cm" style:contextual-spacing="true" fo:line-height="150%" fo:text-align="center" style:justify-single-word="false" fo:orphans="2" fo:widows="2" fo:text-indent="0cm" style:auto-text-indent="false" style:page-number="auto" fo:background-color="transparent" style:writing-mode="lr-tb" loext:word-spacing-minimum="75%" loext:word-spacing-maximum="133%"/>
    </style:style>
    <style:style style:name="P39" style:family="paragraph" style:parent-style-name="Standard">
      <style:paragraph-properties fo:margin-top="0.101cm" fo:margin-bottom="0cm" style:contextual-spacing="false" fo:line-height="115%" fo:text-align="center" style:justify-single-word="false" fo:orphans="2" fo:widows="2" fo:text-indent="0cm" style:auto-text-indent="false" loext:word-spacing-minimum="75%" loext:word-spacing-maximum="133%"/>
      <style:text-properties fo:language="ru" fo:country="RU" style:letter-kerning="true" style:font-name-asian="Aptos1" style:language-asian="en" style:country-asian="US" style:font-size-complex="12pt" style:language-complex="ar" style:country-complex="SA"/>
    </style:style>
    <style:style style:name="P40" style:family="paragraph" style:parent-style-name="Table_20_Contents">
      <loext:graphic-properties draw:fill="none"/>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writing-mode="lr-tb"/>
    </style:style>
    <style:style style:name="P41" style:family="paragraph" style:parent-style-name="Standard" style:list-style-name="WWNum30">
      <style:text-properties officeooo:rsid="001ae0f6" officeooo:paragraph-rsid="001ae0f6"/>
    </style:style>
    <style:style style:name="P42" style:family="paragraph" style:parent-style-name="Standard" style:list-style-name="WWNum30">
      <style:paragraph-properties fo:margin-left="0cm" fo:text-align="center" style:justify-single-word="false" fo:text-indent="0cm" style:auto-text-indent="false"/>
      <style:text-properties officeooo:rsid="001ae0f6" officeooo:paragraph-rsid="001ae0f6"/>
    </style:style>
    <style:style style:name="P43" style:family="paragraph" style:parent-style-name="Table_20_Contents">
      <style:paragraph-properties fo:margin-left="0cm" fo:margin-right="0cm" fo:margin-top="0cm" fo:margin-bottom="0cm" style:contextual-spacing="false" fo:line-height="100%" fo:text-align="center" style:justify-single-word="false" fo:text-indent="0cm" style:auto-text-indent="false"/>
      <style:text-properties fo:font-style="italic" fo:font-weight="bold" style:font-style-asian="italic" style:font-style-complex="italic"/>
    </style:style>
    <style:style style:name="P44" style:family="paragraph" style:parent-style-name="Table_20_Contents">
      <style:paragraph-properties fo:margin-left="0cm" fo:margin-right="0cm" fo:margin-top="0cm" fo:margin-bottom="0cm" style:contextual-spacing="false" fo:line-height="100%" fo:text-align="center" style:justify-single-word="false" fo:text-indent="0cm" style:auto-text-indent="false"/>
      <style:text-properties fo:language="en" fo:country="US" fo:font-weight="bold" officeooo:rsid="001b7e89" officeooo:paragraph-rsid="001b7e89"/>
    </style:style>
    <style:style style:name="P45" style:family="paragraph" style:parent-style-name="Table_20_Contents">
      <style:paragraph-properties fo:margin-left="0cm" fo:margin-right="0cm" fo:margin-top="0cm" fo:margin-bottom="0cm" style:contextual-spacing="false" fo:line-height="100%" fo:text-align="center" style:justify-single-word="false" fo:text-indent="0cm" style:auto-text-indent="false"/>
    </style:style>
    <style:style style:name="P46"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text-indent="0cm" style:auto-text-indent="false" fo:background-color="transparent" text:number-lines="false" text:line-number="0" style:writing-mode="lr-tb"/>
    </style:style>
    <style:style style:name="P47" style:family="paragraph" style:parent-style-name="Standard">
      <style:paragraph-properties style:writing-mode="lr-tb" style:writing-mode-automatic="false"/>
    </style:style>
    <style:style style:name="P48" style:family="paragraph" style:parent-style-name="Table_20_Contents">
      <style:paragraph-properties fo:margin-left="0cm" fo:margin-right="0cm" fo:margin-top="0cm" fo:margin-bottom="0cm" style:contextual-spacing="false" fo:line-height="100%" fo:text-align="center" style:justify-single-word="false" fo:text-indent="0cm" style:auto-text-indent="false"/>
      <style:text-properties fo:font-size="12pt" fo:font-style="italic" fo:font-weight="normal" style:font-size-asian="12pt" style:font-style-asian="italic" style:font-weight-asian="normal" style:font-size-complex="12pt" style:font-style-complex="italic" style:font-weight-complex="normal"/>
    </style:style>
    <style:style style:name="P49" style:family="paragraph" style:parent-style-name="Table_20_Contents">
      <style:paragraph-properties fo:margin-left="0cm" fo:margin-right="0cm" fo:margin-top="0cm" fo:margin-bottom="0cm" style:contextual-spacing="false" fo:line-height="100%" fo:text-align="center" style:justify-single-word="false" fo:text-indent="0cm" style:auto-text-indent="false"/>
      <style:text-properties fo:font-size="12pt" fo:language="el" fo:country="GR" fo:font-style="italic" fo:font-weight="normal" officeooo:rsid="00229b55" officeooo:paragraph-rsid="00229b55" style:font-size-asian="12pt" style:font-style-asian="italic" style:font-weight-asian="normal" style:font-size-complex="12pt" style:font-style-complex="italic" style:font-weight-complex="normal"/>
    </style:style>
    <style:style style:name="P50" style:family="paragraph" style:parent-style-name="Table_20_Contents">
      <style:paragraph-properties fo:margin-left="0cm" fo:margin-right="0cm" fo:margin-top="0cm" fo:margin-bottom="0cm" style:contextual-spacing="false" fo:line-height="100%" fo:text-align="center" style:justify-single-word="false" fo:text-indent="0cm" style:auto-text-indent="false"/>
      <style:text-properties fo:font-size="12pt" style:font-size-asian="12pt" style:font-size-complex="12pt"/>
    </style:style>
    <style:style style:name="P51" style:family="paragraph" style:parent-style-name="Standard">
      <style:paragraph-properties fo:margin-left="0cm" fo:text-indent="0cm" style:auto-text-indent="false"/>
    </style:style>
    <style:style style:name="P52" style:family="paragraph" style:parent-style-name="Heading_20_1">
      <style:paragraph-properties fo:break-before="page"/>
    </style:style>
    <style:style style:name="P53" style:family="paragraph" style:parent-style-name="Standard">
      <style:paragraph-properties fo:margin-top="0cm" fo:margin-bottom="0cm" style:contextual-spacing="false"/>
      <style:text-properties officeooo:paragraph-rsid="0023c2a8"/>
    </style:style>
    <style:style style:name="P54" style:family="paragraph" style:parent-style-name="Standard" style:list-style-name="L1">
      <style:text-properties officeooo:paragraph-rsid="0023c2a8"/>
    </style:style>
    <style:style style:name="P55" style:family="paragraph" style:parent-style-name="Standard">
      <style:paragraph-properties fo:margin-left="0cm" fo:margin-right="0cm" fo:line-height="116%" fo:text-align="center" style:justify-single-word="false" fo:text-indent="0cm" style:auto-text-indent="false" style:writing-mode="lr-tb"/>
      <style:text-properties officeooo:paragraph-rsid="0023c2a8"/>
    </style:style>
    <style:style style:name="P56" style:family="paragraph" style:parent-style-name="Standard">
      <style:paragraph-properties fo:margin-left="0cm" fo:margin-right="0cm" fo:line-height="116%" fo:text-align="center" style:justify-single-word="false" fo:text-indent="0cm" style:auto-text-indent="false" style:writing-mode="lr-tb"/>
    </style:style>
    <style:style style:name="P57" style:family="paragraph" style:parent-style-name="Standard">
      <style:text-properties officeooo:paragraph-rsid="0024dde6"/>
    </style:style>
    <style:style style:name="P58" style:family="paragraph" style:parent-style-name="Standard" style:list-style-name="L2">
      <style:text-properties officeooo:paragraph-rsid="0024dde6"/>
    </style:style>
    <style:style style:name="P59" style:family="paragraph" style:parent-style-name="Standard" style:list-style-name="L2">
      <style:text-properties officeooo:rsid="0024dde6" officeooo:paragraph-rsid="002629e5"/>
    </style:style>
    <style:style style:name="P60" style:family="paragraph" style:parent-style-name="Standard" style:list-style-name="L2">
      <style:text-properties officeooo:rsid="0024dde6" officeooo:paragraph-rsid="0024dde6"/>
    </style:style>
    <style:style style:name="P61" style:family="paragraph" style:parent-style-name="Standard">
      <style:paragraph-properties fo:margin-left="0cm" fo:text-align="center" style:justify-single-word="false" fo:text-indent="0cm" style:auto-text-indent="false"/>
      <style:text-properties officeooo:rsid="0024dde6" officeooo:paragraph-rsid="0024dde6"/>
    </style:style>
    <style:style style:name="P62" style:family="paragraph" style:parent-style-name="Standard">
      <style:text-properties officeooo:rsid="0024dde6" officeooo:paragraph-rsid="0024dde6"/>
    </style:style>
    <style:style style:name="P63" style:family="paragraph" style:parent-style-name="Standard">
      <style:paragraph-properties fo:margin-left="0cm" fo:text-indent="0cm" style:auto-text-indent="false"/>
      <style:text-properties officeooo:paragraph-rsid="0024dde6"/>
    </style:style>
    <style:style style:name="P64" style:family="paragraph" style:parent-style-name="Standard">
      <style:paragraph-properties fo:margin-left="0cm" fo:margin-right="0cm" fo:line-height="116%" fo:text-indent="0cm" style:auto-text-indent="false" style:writing-mode="lr-tb"/>
    </style:style>
    <style:style style:name="P65" style:family="paragraph" style:parent-style-name="Standard">
      <style:text-properties officeooo:paragraph-rsid="00273001"/>
    </style:style>
    <style:style style:name="P66" style:family="paragraph" style:parent-style-name="Standard">
      <style:paragraph-properties fo:margin-left="0cm" fo:text-indent="0cm" style:auto-text-indent="false"/>
      <style:text-properties officeooo:paragraph-rsid="00273001"/>
    </style:style>
    <style:style style:name="P67" style:family="paragraph" style:parent-style-name="Standard">
      <style:text-properties officeooo:paragraph-rsid="0028763b"/>
    </style:style>
    <style:style style:name="P68" style:family="paragraph" style:parent-style-name="Standard" style:list-style-name="L3">
      <style:text-properties fo:language="en" fo:country="US" officeooo:rsid="00273001" officeooo:paragraph-rsid="0028763b"/>
    </style:style>
    <style:style style:name="P69" style:family="paragraph" style:parent-style-name="Standard" style:list-style-name="L3">
      <style:text-properties officeooo:rsid="00273001" officeooo:paragraph-rsid="00273001"/>
    </style:style>
    <style:style style:name="P70" style:family="paragraph" style:parent-style-name="Standard" style:list-style-name="L3">
      <style:text-properties officeooo:paragraph-rsid="002a44be"/>
    </style:style>
    <style:style style:name="P71" style:family="paragraph" style:parent-style-name="Standard" style:list-style-name="L4">
      <style:paragraph-properties fo:line-height="116%" style:writing-mode="lr-tb"/>
      <style:text-properties officeooo:paragraph-rsid="002bdeb9"/>
    </style:style>
    <style:style style:name="P72" style:family="paragraph" style:parent-style-name="Standard">
      <style:paragraph-properties fo:margin-left="0cm" fo:margin-right="0cm" fo:line-height="116%" fo:text-indent="0cm" style:auto-text-indent="false" style:writing-mode="lr-tb"/>
      <style:text-properties fo:font-weight="bold" style:font-weight-asian="bold" style:font-weight-complex="bold"/>
    </style:style>
    <style:style style:name="P73" style:family="paragraph" style:parent-style-name="Standard">
      <style:paragraph-properties fo:margin-left="0cm" fo:margin-right="0cm" fo:line-height="116%" fo:text-indent="0cm" style:auto-text-indent="false" style:writing-mode="lr-tb"/>
      <style:text-properties officeooo:paragraph-rsid="002d4551"/>
    </style:style>
    <style:style style:name="P74"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text-indent="0cm" style:auto-text-indent="false" fo:background-color="transparent" text:number-lines="false" text:line-number="0" style:writing-mode="lr-tb"/>
      <style:text-properties fo:font-size="12pt" fo:font-weight="bold" style:font-size-asian="12pt" style:font-size-complex="12pt"/>
    </style:style>
    <style:style style:name="P75"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text-indent="0cm" style:auto-text-indent="false" fo:background-color="transparent" text:number-lines="false" text:line-number="0" style:writing-mode="lr-tb"/>
      <style:text-properties fo:color="#000000" loext:opacity="100%" fo:font-size="12pt" fo:font-weight="bold" style:font-size-asian="12pt" style:font-weight-asian="bold" style:font-size-complex="12pt" style:font-weight-complex="bold"/>
    </style:style>
    <style:style style:name="P76" style:family="paragraph" style:parent-style-name="Standard">
      <style:paragraph-properties fo:margin-left="0cm" fo:margin-right="0cm" fo:line-height="116%" fo:text-align="center" style:justify-single-word="false" fo:text-indent="0cm" style:auto-text-indent="false" style:writing-mode="lr-tb"/>
      <style:text-properties officeooo:paragraph-rsid="002df647"/>
    </style:style>
    <style:style style:name="P77" style:family="paragraph" style:parent-style-name="Standard">
      <style:text-properties officeooo:paragraph-rsid="00372fbd"/>
    </style:style>
    <style:style style:name="P78" style:family="paragraph" style:parent-style-name="Text_20_body">
      <style:paragraph-properties fo:margin-left="0cm" fo:text-align="center" style:justify-single-word="false" fo:text-indent="0cm" style:auto-text-indent="false"/>
      <style:text-properties officeooo:paragraph-rsid="00372fbd"/>
    </style:style>
    <style:style style:name="P79" style:family="paragraph" style:parent-style-name="Text_20_body">
      <style:paragraph-properties fo:margin-left="0cm" fo:text-align="center" style:justify-single-word="false" fo:text-indent="0cm" style:auto-text-indent="false"/>
      <style:text-properties fo:font-weight="bold" officeooo:rsid="00368d76" officeooo:paragraph-rsid="00368d76" style:font-weight-asian="bold" style:font-weight-complex="bold"/>
    </style:style>
    <style:style style:name="P80" style:family="paragraph" style:parent-style-name="Text_20_body">
      <style:paragraph-properties fo:margin-left="0cm" fo:text-align="center" style:justify-single-word="false" fo:text-indent="0cm" style:auto-text-indent="false"/>
    </style:style>
    <style:style style:name="P81" style:family="paragraph" style:parent-style-name="Text_20_body">
      <style:paragraph-properties fo:margin-left="0cm" fo:text-align="justify" style:justify-single-word="false" fo:text-indent="0cm" style:auto-text-indent="false"/>
    </style:style>
    <style:style style:name="P82" style:family="paragraph" style:parent-style-name="Text_20_body">
      <style:paragraph-properties fo:margin-left="0cm" fo:text-align="center" style:justify-single-word="false" fo:text-indent="0cm" style:auto-text-indent="false"/>
      <style:text-properties fo:font-weight="bold" officeooo:rsid="00368d76" officeooo:paragraph-rsid="00372fbd" style:font-weight-asian="bold" style:font-weight-complex="bold"/>
    </style:style>
    <style:style style:name="P83" style:family="paragraph" style:parent-style-name="Text_20_body">
      <style:paragraph-properties fo:margin-left="0cm" fo:text-align="justify" style:justify-single-word="false" fo:text-indent="0cm" style:auto-text-indent="false"/>
      <style:text-properties officeooo:paragraph-rsid="00372fbd"/>
    </style:style>
    <style:style style:name="P84" style:family="paragraph" style:parent-style-name="Text_20_body">
      <style:paragraph-properties fo:text-align="justify" style:justify-single-word="false"/>
      <style:text-properties officeooo:paragraph-rsid="00372fbd"/>
    </style:style>
    <style:style style:name="P85" style:family="paragraph" style:parent-style-name="Text_20_body">
      <style:paragraph-properties fo:margin-left="0cm" fo:text-align="center" style:justify-single-word="false" fo:text-indent="0cm" style:auto-text-indent="false"/>
      <style:text-properties fo:font-weight="bold" style:font-weight-asian="bold" style:font-weight-complex="bold"/>
    </style:style>
    <style:style style:name="P86" style:family="paragraph" style:parent-style-name="Text_20_body">
      <style:paragraph-properties fo:text-align="justify" style:justify-single-word="false"/>
    </style:style>
    <style:style style:name="P87" style:family="paragraph" style:parent-style-name="Text_20_body">
      <style:paragraph-properties fo:margin-left="0cm" fo:text-align="justify" style:justify-single-word="false" fo:text-indent="0cm" style:auto-text-indent="false"/>
      <style:text-properties officeooo:paragraph-rsid="00399b5a"/>
    </style:style>
    <style:style style:name="P88" style:family="paragraph" style:parent-style-name="Text_20_body">
      <style:paragraph-properties fo:margin-left="0cm" fo:text-align="center" style:justify-single-word="false" fo:text-indent="0cm" style:auto-text-indent="false"/>
      <style:text-properties officeooo:paragraph-rsid="00399b5a"/>
    </style:style>
    <style:style style:name="P89" style:family="paragraph" style:parent-style-name="Text_20_body">
      <style:paragraph-properties fo:margin-left="0cm" fo:text-indent="0cm" style:auto-text-indent="false"/>
      <style:text-properties officeooo:paragraph-rsid="00399b5a"/>
    </style:style>
    <style:style style:name="P90" style:family="paragraph" style:parent-style-name="Text_20_body">
      <style:text-properties officeooo:paragraph-rsid="00399b5a"/>
    </style:style>
    <style:style style:name="P91" style:family="paragraph" style:parent-style-name="Table_20_Contents">
      <loext:graphic-properties draw:fill="none"/>
      <style:paragraph-properties fo:margin-left="0cm" fo:margin-right="0cm" fo:margin-top="0cm" fo:margin-bottom="0cm" style:contextual-spacing="false" fo:line-height="150%" fo:text-align="center" style:justify-single-word="false" fo:orphans="0" fo:widows="0" fo:text-indent="0cm" style:auto-text-indent="false" fo:background-color="transparent" text:number-lines="false" text:line-number="0" style:writing-mode="lr-tb"/>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4pt" style:font-size-asian="14pt" style:font-size-complex="26pt"/>
    </style:style>
    <style:style style:name="T3" style:family="text">
      <style:text-properties fo:font-weight="bold" style:font-weight-asian="bold" style:font-weight-complex="bold"/>
    </style:style>
    <style:style style:name="T4" style:family="text">
      <style:text-properties fo:color="#0f1115" loext:opacity="100%" style:letter-kerning="false" style:font-name-asian="Times New Roman1" style:language-asian="ru" style:country-asian="RU" style:font-name-complex="Times New Roman1" style:font-size-complex="14pt"/>
    </style:style>
    <style:style style:name="T5" style:family="text">
      <style:text-properties style:letter-kerning="false" style:font-name-asian="Times New Roman1" style:language-asian="ru" style:country-asian="RU" style:font-name-complex="Times New Roman1" style:font-size-complex="14pt"/>
    </style:style>
    <style:style style:name="T6" style:family="text">
      <style:text-properties fo:color="#0f1115" loext:opacity="100%" fo:font-size="14pt" style:font-size-asian="14pt" style:font-size-complex="14pt"/>
    </style:style>
    <style:style style:name="T7" style:family="text">
      <style:text-properties fo:color="#0f1115" loext:opacity="100%" fo:font-size="14pt" fo:font-style="italic" style:font-size-asian="14pt" style:font-style-asian="italic" style:font-size-complex="14pt" style:font-style-complex="italic"/>
    </style:style>
    <style:style style:name="T8" style:family="text">
      <style:text-properties fo:color="#0f1115" loext:opacity="100%" style:text-position="super 58%" fo:font-size="14pt" style:font-size-asian="14pt" style:font-size-complex="14pt"/>
    </style:style>
    <style:style style:name="T9" style:family="text">
      <style:text-properties fo:color="#0f1115" loext:opacity="100%" style:letter-kerning="false" fo:background-color="#ffffff" loext:char-shading-value="0" style:font-name-asian="Times New Roman1" style:language-asian="ru" style:country-asian="RU" style:font-name-complex="Times New Roman1" style:font-size-complex="14pt"/>
    </style:style>
    <style:style style:name="T10" style:family="text">
      <style:text-properties fo:language="en" fo:country="US" style:letter-kerning="false" style:font-name-asian="Times New Roman1" style:language-asian="ru" style:country-asian="RU" style:font-name-complex="Times New Roman1" style:font-size-complex="14pt"/>
    </style:style>
    <style:style style:name="T11" style:family="text">
      <style:text-properties fo:color="#0f1115" loext:opacity="100%" fo:font-style="italic" style:letter-kerning="false" style:font-name-asian="Times New Roman1" style:language-asian="ru" style:country-asian="RU" style:font-style-asian="italic" style:font-name-complex="Times New Roman1" style:font-size-complex="14pt" style:font-style-complex="italic"/>
    </style:style>
    <style:style style:name="T12" style:family="text">
      <style:text-properties fo:font-size="14pt" style:font-size-asian="14pt" style:font-name-complex="Times New Roman1" style:font-size-complex="14pt"/>
    </style:style>
    <style:style style:name="T13" style:family="text">
      <style:text-properties fo:font-style="italic" style:font-style-asian="italic" style:font-style-complex="italic"/>
    </style:style>
    <style:style style:name="T14" style:family="text">
      <style:text-properties fo:font-style="italic" officeooo:rsid="00123456" style:font-style-asian="italic" style:font-style-complex="italic"/>
    </style:style>
    <style:style style:name="T15" style:family="text">
      <style:text-properties fo:language="en" fo:country="US"/>
    </style:style>
    <style:style style:name="T16" style:family="text">
      <style:text-properties officeooo:rsid="0019ebcd"/>
    </style:style>
    <style:style style:name="T17" style:family="text">
      <style:text-properties fo:language="ru" fo:country="RU" officeooo:rsid="0019ebcd"/>
    </style:style>
    <style:style style:name="T18" style:family="text">
      <style:text-properties style:text-position="sub 58%" officeooo:rsid="001b7e89"/>
    </style:style>
    <style:style style:name="T19" style:family="text">
      <style:text-properties style:text-position="0% 100%" officeooo:rsid="001b7e89"/>
    </style:style>
    <style:style style:name="T20" style:family="text">
      <style:text-properties style:text-position="0% 100%" fo:language="ru" fo:country="RU"/>
    </style:style>
    <style:style style:name="T21" style:family="text">
      <style:text-properties style:text-position="sub 58%" fo:language="ru" fo:country="RU"/>
    </style:style>
    <style:style style:name="T22" style:family="text">
      <style:text-properties style:text-position="super 58%" fo:language="ru" fo:country="RU"/>
    </style:style>
    <style:style style:name="T23" style:family="text">
      <style:text-properties fo:language="en" fo:country="US" fo:font-style="italic" officeooo:rsid="00229b55" style:font-style-asian="italic" style:font-style-complex="italic"/>
    </style:style>
    <style:style style:name="T24" style:family="text">
      <style:text-properties style:text-position="sub 58%" fo:language="ru" fo:country="RU" fo:font-style="italic" officeooo:rsid="00229b55" style:font-style-asian="italic" style:font-style-complex="italic"/>
    </style:style>
    <style:style style:name="T25" style:family="text">
      <style:text-properties style:text-position="0% 100%" fo:language="ru" fo:country="RU" officeooo:rsid="00229b55"/>
    </style:style>
    <style:style style:name="T26" style:family="text">
      <style:text-properties style:text-position="sub 58%"/>
    </style:style>
    <style:style style:name="T27" style:family="text">
      <style:text-properties style:text-position="0% 100%" officeooo:rsid="00229b55"/>
    </style:style>
    <style:style style:name="T28" style:family="text">
      <style:text-properties style:text-position="sub 58%" officeooo:rsid="00237ef8"/>
    </style:style>
    <style:style style:name="T29" style:family="text">
      <style:text-properties officeooo:rsid="00237ef8"/>
    </style:style>
    <style:style style:name="T30" style:family="text">
      <style:text-properties style:text-position="sub 58%" fo:language="el" fo:country="GR" officeooo:rsid="00237ef8"/>
    </style:style>
    <style:style style:name="T31" style:family="text">
      <style:text-properties fo:language="el" fo:country="GR" officeooo:rsid="00237ef8"/>
    </style:style>
    <style:style style:name="T32" style:family="text">
      <style:text-properties fo:language="ru" fo:country="RU" officeooo:rsid="00237ef8"/>
    </style:style>
    <style:style style:name="T33" style:family="text">
      <style:text-properties style:text-position="super 58%" fo:language="en" fo:country="US" officeooo:rsid="00237ef8"/>
    </style:style>
    <style:style style:name="T34" style:family="text">
      <style:text-properties fo:font-weight="normal" style:font-weight-asian="normal" style:font-weight-complex="normal"/>
    </style:style>
    <style:style style:name="T35" style:family="text">
      <style:text-properties officeooo:rsid="0024dde6"/>
    </style:style>
    <style:style style:name="T36" style:family="text">
      <style:text-properties fo:language="en" fo:country="US" fo:font-style="italic" officeooo:rsid="002629e5" style:font-style-asian="italic" style:font-style-complex="italic"/>
    </style:style>
    <style:style style:name="T37" style:family="text">
      <style:text-properties style:text-position="sub 58%" fo:language="en" fo:country="US" fo:font-style="italic" officeooo:rsid="002629e5" style:font-style-asian="italic" style:font-style-complex="italic"/>
    </style:style>
    <style:style style:name="T38" style:family="text">
      <style:text-properties style:text-position="0% 100%" fo:language="en" fo:country="US" officeooo:rsid="002629e5"/>
    </style:style>
    <style:style style:name="T39" style:family="text">
      <style:text-properties style:text-position="0% 100%" fo:language="ru" fo:country="RU" officeooo:rsid="002629e5"/>
    </style:style>
    <style:style style:name="T40" style:family="text">
      <style:text-properties style:text-position="sub 58%" fo:font-style="italic" officeooo:rsid="002629e5" style:font-style-asian="italic" style:font-style-complex="italic"/>
    </style:style>
    <style:style style:name="T41" style:family="text">
      <style:text-properties fo:font-style="italic" officeooo:rsid="002629e5" style:font-style-asian="italic" style:font-style-complex="italic"/>
    </style:style>
    <style:style style:name="T42" style:family="text">
      <style:text-properties style:text-position="sub 58%" fo:font-style="italic" style:font-style-asian="italic" style:font-style-complex="italic"/>
    </style:style>
    <style:style style:name="T43" style:family="text">
      <style:text-properties fo:font-family="'Liberation Mono'" style:font-family-generic="roman" style:font-pitch="variable" fo:font-size="11pt" fo:font-style="normal" fo:font-weight="normal" style:font-size-asian="11pt" style:font-style-asian="normal" style:font-weight-asian="normal"/>
    </style:style>
    <style:style style:name="T44" style:family="text">
      <style:text-properties fo:font-family="Arial" style:font-family-generic="roman" style:font-pitch="variable" style:font-name-complex="Arial1"/>
    </style:style>
    <style:style style:name="T45" style:family="text">
      <style:text-properties officeooo:rsid="00273001"/>
    </style:style>
    <style:style style:name="T46" style:family="text">
      <style:text-properties fo:language="ru" fo:country="RU"/>
    </style:style>
    <style:style style:name="T47" style:family="text">
      <style:text-properties fo:language="ru" fo:country="RU" officeooo:rsid="0024dde6"/>
    </style:style>
    <style:style style:name="T48" style:family="text">
      <style:text-properties fo:language="ru" fo:country="RU" officeooo:rsid="0028763b"/>
    </style:style>
    <style:style style:name="T49" style:family="text">
      <style:text-properties officeooo:rsid="0028763b"/>
    </style:style>
    <style:style style:name="T50" style:family="text">
      <style:text-properties officeooo:rsid="002a44be"/>
    </style:style>
    <style:style style:name="T51" style:family="text">
      <style:text-properties fo:language="en" fo:country="US" officeooo:rsid="00273001"/>
    </style:style>
    <style:style style:name="T52" style:family="text">
      <style:text-properties style:text-position="sub 58%" fo:language="ru" fo:country="RU" officeooo:rsid="00273001"/>
    </style:style>
    <style:style style:name="T53" style:family="text">
      <style:text-properties fo:language="ru" fo:country="RU" officeooo:rsid="00273001"/>
    </style:style>
    <style:style style:name="T54" style:family="text">
      <style:text-properties fo:language="ru" fo:country="RU" officeooo:rsid="002a44be"/>
    </style:style>
    <style:style style:name="T55" style:family="text">
      <style:text-properties officeooo:rsid="002d4551"/>
    </style:style>
    <style:style style:name="T56" style:family="text">
      <style:text-properties fo:language="en" fo:country="US" fo:font-style="italic" officeooo:rsid="002d4551" style:font-style-asian="italic" style:font-style-complex="italic"/>
    </style:style>
    <style:style style:name="T57" style:family="text">
      <style:text-properties fo:language="en" fo:country="US" officeooo:rsid="002d4551"/>
    </style:style>
    <style:style style:name="T58" style:family="text">
      <style:text-properties officeooo:rsid="00368d76"/>
    </style:style>
    <style:style style:name="T59" style:family="text">
      <style:text-properties officeooo:rsid="00372fbd"/>
    </style:style>
    <style:style style:name="T60" style:family="text">
      <style:text-properties officeooo:rsid="00390584"/>
    </style:style>
    <style:style style:name="T61" style:family="text">
      <style:text-properties officeooo:rsid="00399b5a"/>
    </style:style>
    <style:style style:name="T62" style:family="text">
      <style:text-properties fo:font-family="'Liberation Mono'" style:font-family-generic="roman" style:font-pitch="variable" fo:font-size="11pt" fo:font-style="normal" fo:font-weight="normal" officeooo:rsid="00399b5a" style:font-size-asian="11pt" style:font-style-asian="normal" style:font-weight-asian="normal"/>
    </style:style>
    <style:style style:name="T63" style:family="text">
      <style:text-properties fo:language="el" fo:country="GR" officeooo:rsid="00399b5a"/>
    </style:style>
    <style:style style:name="fr1" style:family="graphic" style:parent-style-name="Frame">
      <style:graphic-properties fo:margin-left="0cm" fo:margin-right="0.318cm" fo:margin-top="0cm" fo:margin-bottom="0cm" style:wrap="parallel" style:number-wrapped-paragraphs="no-limit" style:vertical-pos="middle" style:vertical-rel="baseline" style:horizontal-pos="left" style:horizontal-rel="page-content"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loext:decorative="false"/>
    </style:style>
    <style:style style:name="fr3" style:family="graphic" style:parent-style-name="Formula">
      <style:graphic-properties fo:margin-left="0cm" fo:margin-right="0cm" fo:margin-top="0cm" fo:margin-bottom="0cm" style:vertical-pos="from-top" style:horizontal-pos="from-left" style:horizontal-rel="paragraph-content" draw:ole-draw-aspect="1"/>
    </style:style>
    <style:style style:name="fr4" style:family="graphic" style:parent-style-name="Frame">
      <style:graphic-properties fo:margin-left="0.318cm" fo:margin-right="0.318cm" fo:margin-top="0cm" fo:margin-bottom="0cm" style:wrap="parallel" style:number-wrapped-paragraphs="no-limit" style:vertical-pos="middle" style:vertical-rel="baseline" style:horizontal-pos="center" style:horizontal-rel="page-content"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loext:decorative="false"/>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171cm, 0cm, 0cm, 0cm)" draw:luminance="0%" draw:contrast="0%" draw:red="0%" draw:green="0%" draw:blue="0%" draw:gamma="100%" draw:color-inversion="false" draw:image-opacity="100%" draw:color-mode="standard" loext:rel-width-rel="paragraph"/>
    </style:style>
    <style:style style:name="fr11" style:family="graphic" style:parent-style-name="Formula">
      <style:graphic-properties style:vertical-pos="from-top" draw:ole-draw-aspect="1"/>
    </style:style>
    <style:style style:name="fr1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office:automatic-styles>
  <office:body>
    <office:text text:use-soft-page-breaks="true">
      <text:variable-decls>
        <text:variable-decl office:value-type="float" text:name="t1s"/>
        <text:variable-decl office:value-type="float" text:name="t1_in"/>
        <text:variable-decl office:value-type="float" text:name="t1_out"/>
        <text:variable-decl office:value-type="float" text:name="t1_pv"/>
        <text:variable-decl office:value-type="float" text:name="D_pr"/>
        <text:variable-decl office:value-type="float" text:name="alpha_pr"/>
        <text:variable-decl office:value-type="float" text:name="d_n"/>
        <text:variable-decl office:value-type="float" text:name="delta_tr"/>
        <text:variable-decl office:value-type="float" text:name="dk_n"/>
        <text:variable-decl office:value-type="float" text:name="delta_k"/>
        <text:variable-decl office:value-type="float" text:name="dt_zap"/>
        <text:variable-decl office:value-type="float" text:name="p1"/>
        <text:variable-decl office:value-type="float" text:name="t1_"/>
        <text:variable-decl office:value-type="float" text:name="rho1"/>
        <text:variable-decl office:value-type="float" text:name="mu1"/>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Министерство науки и высшего образования Российской Федерации</text:span></text:p>
      <text:p text:style-name="Title" loext:marker-style-name="T2"><text:span text:style-name="T2">Федеральное государственное бюджетное образовательное учреждение высшего образования</text:span><text:span text:style-name="T2"/></text:p>
      <text:p text:style-name="Title" loext:marker-style-name="T2"><text:span text:style-name="T2">«Ивановский государственный энергетический университет </text:span><text:span text:style-name="T2"/></text:p>
      <text:p text:style-name="Title" loext:marker-style-name="T2"><text:span text:style-name="T2">имени В.И. Ленина»</text:span><text:span text:style-name="T2"/></text:p>
      <text:p text:style-name="P2">Кафедра «Атомные электрические станции»</text:p>
      <text:p text:style-name="Standard"/>
      <text:p text:style-name="Standard"/>
      <text:p text:style-name="Standard"/>
      <text:p text:style-name="Standard"/>
      <text:p text:style-name="Standard"/>
      <text:p text:style-name="Title">Курсовая работа</text:p>
      <text:p text:style-name="Title">по теме: «Проектирование парогенератора АЭС с ВВЭР»</text:p>
      <text:p text:style-name="Standard"/>
      <text:p text:style-name="Standard"/>
      <text:p text:style-name="Standard"/>
      <text:p text:style-name="Standard"/>
      <text:p text:style-name="Standard"/>
      <text:p text:style-name="Standard"/>
      <text:p text:style-name="P3">Выполнила: студентка</text:p>
      <text:p text:style-name="P3">группы 4-12А</text:p>
      <text:p text:style-name="P3">Захарова У.С.</text:p>
      <text:p text:style-name="P3">Проверил: Степанов В.Ф.</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Иваново 2026</text:p>
      <text:p text:style-name="Title"><text:bookmark-start text:name="__RefHeading___Toc5697_953335161"/><text:soft-page-break/><text:span text:style-name="T3">Оглавление</text:span><text:bookmark-end text:name="__RefHeading___Toc5697_953335161"/></text:p>
      <text:table-of-content text:style-name="Sect1" text:protected="true" text:name="Оглавление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text:a xlink:type="simple" xlink:href="#__RefHeading___Toc3298_953335161" office:name="Определение конструктивной расчетной схемы ПГ" text:style-name="Index_20_Link" text:visited-style-name="Index_20_Link">1. Определение конструктивной расчетной схемы ПГ<text:tab/>3</text:a></text:p>
          <text:p text:style-name="P4"><text:a xlink:type="simple" xlink:href="#__RefHeading___Toc3296_953335161" office:name="Тепловой расчёт парогенератора" text:style-name="Index_20_Link" text:visited-style-name="Index_20_Link">2. Тепловой расчёт парогенератора<text:tab/>6</text:a></text:p>
          <text:p text:style-name="P5"><text:a xlink:type="simple" xlink:href="#__RefHeading___Toc2897_953335161" office:name="Принятые допущения в тепловом расчёте" text:style-name="Index_20_Link" text:visited-style-name="Index_20_Link">2.1. Принятые допущения в тепловом расчёте<text:tab/>6</text:a></text:p>
          <text:p text:style-name="P5"><text:a xlink:type="simple" xlink:href="#__RefHeading___Toc2897_953335161" office:name="Принятые допущения в тепловом расчёте" text:style-name="Index_20_Link" text:visited-style-name="Index_20_Link">2.1. Принятые допущения в тепловом расчёте<text:tab/>6</text:a></text:p>
          <text:p text:style-name="P5"><text:a xlink:type="simple" xlink:href="#__RefHeading___Toc2899_953335161" office:name="Алгоритм расчёта" text:style-name="Index_20_Link" text:visited-style-name="Index_20_Link">2.2. Алгоритм расчёта<text:tab/>8</text:a></text:p>
          <text:p text:style-name="P5"><text:a xlink:type="simple" xlink:href="#__RefHeading___Toc2899_953335161" office:name="Алгоритм расчёта" text:style-name="Index_20_Link" text:visited-style-name="Index_20_Link">2.2. Алгоритм расчёта<text:tab/>8</text:a></text:p>
          <text:p text:style-name="P6"><text:a xlink:type="simple" xlink:href="#__RefHeading___Toc2901_953335161" office:name="Теплофизические характеристики теплоносителя" text:style-name="Index_20_Link" text:visited-style-name="Index_20_Link">2.2.1. Теплофизические характеристики теплоносителя<text:tab/>8</text:a></text:p>
          <text:p text:style-name="P6"><text:a xlink:type="simple" xlink:href="#__RefHeading___Toc2901_953335161" office:name="Теплофизические характеристики теплоносителя" text:style-name="Index_20_Link" text:visited-style-name="Index_20_Link">2.2.1. Теплофизические характеристики теплоносителя<text:tab/>8</text:a></text:p>
          <text:p text:style-name="P6"><text:a xlink:type="simple" xlink:href="#__RefHeading___Toc2903_953335161" office:name="Теплофизические характеристики рабочего тела" text:style-name="Index_20_Link" text:visited-style-name="Index_20_Link">2.2.2. Теплофизические характеристики рабочего тела<text:tab/>9</text:a></text:p>
          <text:p text:style-name="P6"><text:a xlink:type="simple" xlink:href="#__RefHeading___Toc2903_953335161" office:name="Теплофизические характеристики рабочего тела" text:style-name="Index_20_Link" text:visited-style-name="Index_20_Link">2.2.2. Теплофизические характеристики рабочего тела<text:tab/>9</text:a></text:p>
          <text:p text:style-name="P6"><text:a xlink:type="simple" xlink:href="#__RefHeading___Toc2905_953335161" office:name="Материальный и тепловой балансы ПГ" text:style-name="Index_20_Link" text:visited-style-name="Index_20_Link">2.2.3. Материальный и тепловой балансы ПГ<text:tab/>9</text:a></text:p>
          <text:p text:style-name="P6"><text:a xlink:type="simple" xlink:href="#__RefHeading___Toc2905_953335161" office:name="Материальный и тепловой балансы ПГ" text:style-name="Index_20_Link" text:visited-style-name="Index_20_Link">2.2.3. Материальный и тепловой балансы ПГ<text:tab/>9</text:a></text:p>
          <text:p text:style-name="P6"><text:a xlink:type="simple" xlink:href="#__RefHeading___Toc2907_953335161" office:name="Расчёт коэффициента теплопередачи" text:style-name="Index_20_Link" text:visited-style-name="Index_20_Link">2.2.4. Расчёт коэффициента теплопередачи<text:tab/>10</text:a></text:p>
          <text:p text:style-name="P6"><text:a xlink:type="simple" xlink:href="#__RefHeading___Toc2907_953335161" office:name="Расчёт коэффициента теплопередачи" text:style-name="Index_20_Link" text:visited-style-name="Index_20_Link">2.2.4. Расчёт коэффициента теплопередачи<text:tab/>10</text:a></text:p>
          <text:p text:style-name="P6"><text:a xlink:type="simple" xlink:href="#__RefHeading___Toc2909_953335161" office:name="Расчет площади поверхности теплообмена" text:style-name="Index_20_Link" text:visited-style-name="Index_20_Link">2.2.5. Расчет площади поверхности теплообмена<text:tab/>13</text:a></text:p>
          <text:p text:style-name="P6"><text:a xlink:type="simple" xlink:href="#__RefHeading___Toc2909_953335161" office:name="Расчет площади поверхности теплообмена" text:style-name="Index_20_Link" text:visited-style-name="Index_20_Link">2.2.5. Расчет площади поверхности теплообмена<text:tab/>13</text:a></text:p>
          <text:p text:style-name="P4"><text:a xlink:type="simple" xlink:href="#__RefHeading___Toc3294_953335161" office:name="Конструкционный расчет парогенератора" text:style-name="Index_20_Link" text:visited-style-name="Index_20_Link">3. Конструкционный расчет парогенератора<text:tab/>17</text:a></text:p>
          <text:p text:style-name="P5"><text:a xlink:type="simple" xlink:href="#__RefHeading___Toc2911_953335161" office:name="Алгоритм конструкционного расчета" text:style-name="Index_20_Link" text:visited-style-name="Index_20_Link">3.1. Алгоритм конструкционного расчета<text:tab/>17</text:a></text:p>
          <text:p text:style-name="P5"><text:a xlink:type="simple" xlink:href="#__RefHeading___Toc2911_953335161" office:name="Алгоритм конструкционного расчета" text:style-name="Index_20_Link" text:visited-style-name="Index_20_Link">3.1. Алгоритм конструкционного расчета<text:tab/>17</text:a></text:p>
          <text:p text:style-name="P6"><text:a xlink:type="simple" xlink:href="#__RefHeading___Toc2913_953335161" office:name="Определение количества трубок и их рядов" text:style-name="Index_20_Link" text:visited-style-name="Index_20_Link">3.1.1. Определение количества трубок и их рядов<text:tab/>17</text:a></text:p>
          <text:p text:style-name="P6"><text:a xlink:type="simple" xlink:href="#__RefHeading___Toc2913_953335161" office:name="Определение количества трубок и их рядов" text:style-name="Index_20_Link" text:visited-style-name="Index_20_Link">3.1.1. Определение количества трубок и их рядов<text:tab/>17</text:a></text:p>
          <text:p text:style-name="P6"><text:a xlink:type="simple" xlink:href="#__RefHeading___Toc2915_953335161" office:name="Определение внутреннего диаметра корпуса ПГ" text:style-name="Index_20_Link" text:visited-style-name="Index_20_Link">3.1.2. Определение внутреннего диаметра корпуса ПГ<text:tab/>18</text:a></text:p>
          <text:p text:style-name="P6"><text:a xlink:type="simple" xlink:href="#__RefHeading___Toc2915_953335161" office:name="Определение внутреннего диаметра корпуса ПГ" text:style-name="Index_20_Link" text:visited-style-name="Index_20_Link">3.1.2. Определение внутреннего диаметра корпуса ПГ<text:tab/>18</text:a></text:p>
          <text:p text:style-name="P6"><text:a xlink:type="simple" xlink:href="#__RefHeading___Toc2917_953335161" office:name="Определение длины трубок ПТО" text:style-name="Index_20_Link" text:visited-style-name="Index_20_Link">3.1.3. Определение длины трубок ПТО<text:tab/>19</text:a></text:p>
          <text:p text:style-name="P6"><text:a xlink:type="simple" xlink:href="#__RefHeading___Toc2917_953335161" office:name="Определение длины трубок ПТО" text:style-name="Index_20_Link" text:visited-style-name="Index_20_Link">3.1.3. Определение длины трубок ПТО<text:tab/>19</text:a></text:p>
          <text:p text:style-name="P6"><text:a xlink:type="simple" xlink:href="#__RefHeading___Toc2919_953335161" office:name="Определение длины корпуса ПГ" text:style-name="Index_20_Link" text:visited-style-name="Index_20_Link">3.1.4. Определение длины корпуса ПГ<text:tab/>19</text:a></text:p>
          <text:p text:style-name="P6"><text:a xlink:type="simple" xlink:href="#__RefHeading___Toc2919_953335161" office:name="Определение длины корпуса ПГ" text:style-name="Index_20_Link" text:visited-style-name="Index_20_Link">3.1.4. Определение длины корпуса ПГ<text:tab/>19</text:a></text:p>
          <text:p text:style-name="P6"><text:a xlink:type="simple" xlink:href="#__RefHeading___Toc2921_953335161" office:name="Определение размеров патрубков на корпусе ПГ" text:style-name="Index_20_Link" text:visited-style-name="Index_20_Link">3.1.5. Определение размеров патрубков на корпусе ПГ<text:tab/>20</text:a></text:p>
          <text:p text:style-name="P6"><text:a xlink:type="simple" xlink:href="#__RefHeading___Toc2921_953335161" office:name="Определение размеров патрубков на корпусе ПГ" text:style-name="Index_20_Link" text:visited-style-name="Index_20_Link">3.1.5. Определение размеров патрубков на корпусе ПГ<text:tab/>20</text:a></text:p>
          <text:p text:style-name="P4"><text:a xlink:type="simple" xlink:href="#__RefHeading___Toc10974_953335161" office:name="Гидравлический расчет ПГ" text:style-name="Index_20_Link" text:visited-style-name="Index_20_Link"><text:soft-page-break/>4. Гидравлический расчет ПГ<text:tab/>24</text:a></text:p>
          <text:p text:style-name="P5"><text:a xlink:type="simple" xlink:href="#__RefHeading___Toc10972_953335161" office:name="Расчет гидравлических потерь по тракту теплоносителя" text:style-name="Index_20_Link" text:visited-style-name="Index_20_Link">4.1. Расчет гидравлических потерь по тракту теплоносителя<text:tab/>24</text:a></text:p>
          <text:p text:style-name="P5"><text:a xlink:type="simple" xlink:href="#__RefHeading___Toc10972_953335161" office:name="Расчет гидравлических потерь по тракту теплоносителя" text:style-name="Index_20_Link" text:visited-style-name="Index_20_Link">4.1. Расчет гидравлических потерь по тракту теплоносителя<text:tab/>24</text:a></text:p>
        </text:index-body>
      </text:table-of-content>
      <text:p text:style-name="P7"/>
      <text:list xml:id="list4153261830" text:style-name="Numbering_20_123">
        <text:list-item>
          <text:p text:style-name="P8"><text:bookmark-start text:name="_Toc225600175"/><text:bookmark-start text:name="__RefHeading___Toc3298_953335161"/>Определение конструктивной расчетной схемы ПГ<text:bookmark-end text:name="_Toc225600175"/><text:bookmark-end text:name="__RefHeading___Toc3298_953335161"/></text:p>
        </text:list-item>
      </text:list>
      <text:p text:style-name="Standard">Состав и вид конструктивной схемы парогенератора определяются, прежде всего, видом теплоносителя и его температурным перепадом. ВВЭР используют в качестве теплоносителя воду под давлением. Поскольку вода является низкотемпературным теплоносителем, чей температурный перепад в ПГ не превышает 40 °С, то перегрев пара при установке в нём пароперегревателя не может превышать 25 ÷ 30 °С. Любая попытка повысить величину перегрева будет приводить к снижению температуры насыщения производимого пара, а значит, и его давления. Заметный перегрев при водном теплоносителе может быть получен только при низких значениях давления насыщенного пара. Но известно, что перегрев пара целесообразен только тогда, когда исчерпаны возможности повышения давления насыщенного пара. Можно увеличить перегрев пара и за счет снижения температурного напора на входе в ПГ, но это приведет к росту площади поверхности теплообмена. Поэтому практически все ПГ с водным теплоносителем работают без перегрева и вырабатывают насыщенный пар.</text:p>
      <text:p text:style-name="Standard">В случае незначительного перепада температур теплоносителя в парогенераторе введение экономайзерного участка в тепловую схему в малой степени способствует повышению температуры насыщения рабочего тела (и давления генерируемого пара). В то же время это может привести к усложнению конструкции ПГ, увеличению его габаритов и стоимости. Поэтому тепловая схема парогенераторов РУ с водой под давлением, как правило, состоит только из испарителя. При объединении экономайзера и испарителя их общая поверхность нагрева ничем не разделена и омывается водой с температурой насыщения. Производство пара идет по всей поверхности. Подогрев питательной воды до температуры насыщения в таких ПГ осуществляется в кипящем водяном пространстве ПГ за счет частичной конденсации образующегося пара.</text:p>
      <text:p text:style-name="Standard">Так как давление теплоносителя значительно больше давления рабочего тела, то теплоноситель направляется по трубной системе, а рабочее тело – в межтрубное пространство. Наиболее удобным при этом оказывается вариант с погруженной поверхностью теплообмена. Поверхность теплообмена выполняется, как правило, из U-образных трубок. Для ПГ с погруженной поверхностью теплообмена единственно возможный вариант организации движения рабочего тела – многократная естественная циркуляция с кипением в межтрубном пространстве. В таком ПГ существует большое количество контуров циркуляции, в которых подъемное движение образующегося пара происходит в межтрубном пространстве трубных пучков, а опускное движение <text:soft-page-break/>отсепарированной воды – в коридорах, образованных корпусом ПГ и трубным пучком поверхности теплообмена.</text:p>
      <text:p text:style-name="Standard">При таких условиях удобнее использовать встроенную сепарацию пара, когда сепарационные устройства размещаются в одном корпусе с испарительной поверхностью.</text:p>
      <text:p text:style-name="Standard">Корпус ПГ может выполняться как горизонтально, так и вертикально. В России применяются горизонтальные ПГ с погруженной поверхностью теплообмена и внутренними коллекторами.</text:p>
      <text:p text:style-name="Standard">Таким образом, упрощенную расчетную схему ПГ АЭС с ВВЭР можно представить в виде как на рис. 1.</text:p>
      <text:p text:style-name="P9"><draw:frame draw:style-name="fr1" draw:name="Врезка2" text:anchor-type="as-char" svg:width="13.025cm" draw:z-index="0"><draw:text-box fo:min-height="6.466cm"><text:p text:style-name="Drawing"><draw:frame draw:style-name="fr2" draw:name="Рисунок 1" text:anchor-type="as-char" svg:width="13.025cm" style:rel-width="100%" svg:height="6.011cm" style:rel-height="scale" draw:z-index="1"><draw:image xlink:href="Pictures/10000001000002B30000013FF7CC862F.png" xlink:type="simple" xlink:show="embed" xlink:actuate="onLoad" draw:mime-type="image/png"/></draw:frame>Рисунок <text:sequence text:ref-name="refDrawing1" text:name="Drawing" text:formula="ooow:Drawing+1" style:num-format="1">1</text:sequence><text:s/>– Принципиальная схема ПГ с погруженной поверхностью теплообмена</text:p></draw:text-box></draw:frame></text:p>
      <text:p text:style-name="P10"/>
      <text:p text:style-name="P11"><draw:frame draw:style-name="fr3" draw:name="Объект1" text:anchor-type="as-char" svg:y="-0.379cm" svg:width="0.448cm" svg:height="0.534cm" draw:z-index="4"><draw:object xlink:href="./Object 1" xlink:type="simple" xlink:show="embed" xlink:actuate="onLoad"/><draw:image xlink:href="./ObjectReplacements/Object 1" xlink:type="simple" xlink:show="embed" xlink:actuate="onLoad"/></draw:frame> – расход теплоносителя через ПГ;<text:line-break/><draw:frame draw:style-name="fr3" draw:name="Объект2" text:anchor-type="as-char" svg:y="-0.439cm" svg:width="0.877cm" svg:height="0.594cm" draw:z-index="5"><draw:object xlink:href="./Object 2" xlink:type="simple" xlink:show="embed" xlink:actuate="onLoad"/><draw:image xlink:href="./ObjectReplacements/Object 2" xlink:type="simple" xlink:show="embed" xlink:actuate="onLoad"/></draw:frame> – температура и давление теплоносителя на входе в ПГ;<text:line-break/><draw:frame draw:style-name="fr3" draw:name="Объект3" text:anchor-type="as-char" svg:y="-0.439cm" svg:width="0.961cm" svg:height="0.594cm" draw:z-index="6"><draw:object xlink:href="./Object 3" xlink:type="simple" xlink:show="embed" xlink:actuate="onLoad"/><draw:image xlink:href="./ObjectReplacements/Object 3" xlink:type="simple" xlink:show="embed" xlink:actuate="onLoad"/></draw:frame> – температура и давление теплоносителя на выходе из ПГ;<text:line-break/><draw:frame draw:style-name="fr3" draw:name="Объект4" text:anchor-type="as-char" svg:y="-0.379cm" svg:width="0.711cm" svg:height="0.534cm" draw:z-index="7"><draw:object xlink:href="./Object 4" xlink:type="simple" xlink:show="embed" xlink:actuate="onLoad"/><draw:image xlink:href="./ObjectReplacements/Object 4" xlink:type="simple" xlink:show="embed" xlink:actuate="onLoad"/></draw:frame> и <draw:frame draw:style-name="fr3" draw:name="Объект5" text:anchor-type="as-char" svg:y="-0.379cm" svg:width="0.545cm" svg:height="0.534cm" draw:z-index="8"><draw:object xlink:href="./Object 5" xlink:type="simple" xlink:show="embed" xlink:actuate="onLoad"/><draw:image xlink:href="./ObjectReplacements/Object 5" xlink:type="simple" xlink:show="embed" xlink:actuate="onLoad"/></draw:frame> – расходы питательной воды и пара;<text:line-break/><draw:frame draw:style-name="fr3" draw:name="Объект6" text:anchor-type="as-char" svg:y="-0.379cm" svg:width="0.658cm" svg:height="0.534cm" draw:z-index="9"><draw:object xlink:href="./Object 6" xlink:type="simple" xlink:show="embed" xlink:actuate="onLoad"/><draw:image xlink:href="./ObjectReplacements/Object 6" xlink:type="simple" xlink:show="embed" xlink:actuate="onLoad"/></draw:frame> и <draw:frame draw:style-name="fr3" draw:name="Объект7" text:anchor-type="as-char" svg:y="-0.379cm" svg:width="0.427cm" svg:height="0.534cm" draw:z-index="10"><draw:object xlink:href="./Object 7" xlink:type="simple" xlink:show="embed" xlink:actuate="onLoad"/><draw:image xlink:href="./ObjectReplacements/Object 7" xlink:type="simple" xlink:show="embed" xlink:actuate="onLoad"/></draw:frame> – давление питательной воды и давление рабочего тела в объёме ПГ;<text:line-break/><draw:frame draw:style-name="fr3" draw:name="Объект8" text:anchor-type="as-char" svg:y="-0.379cm" svg:width="0.515cm" svg:height="0.534cm" draw:z-index="11"><draw:object xlink:href="./Object 8" xlink:type="simple" xlink:show="embed" xlink:actuate="onLoad"/><draw:image xlink:href="./ObjectReplacements/Object 8" xlink:type="simple" xlink:show="embed" xlink:actuate="onLoad"/></draw:frame> и <draw:frame draw:style-name="fr3" draw:name="Объект9" text:anchor-type="as-char" svg:y="-0.379cm" svg:width="0.284cm" svg:height="0.534cm" draw:z-index="12"><draw:object xlink:href="./Object 9" xlink:type="simple" xlink:show="embed" xlink:actuate="onLoad"/><draw:image xlink:href="./ObjectReplacements/Object 9" xlink:type="simple" xlink:show="embed" xlink:actuate="onLoad"/></draw:frame> – температура питательной воды и температура пара в объёме ПГ;<text:line-break/><draw:frame draw:style-name="fr3" draw:name="Объект10" text:anchor-type="as-char" svg:y="-0.379cm" svg:width="0.457cm" svg:height="0.534cm" draw:z-index="13"><draw:object xlink:href="./Object 10" xlink:type="simple" xlink:show="embed" xlink:actuate="onLoad"/><draw:image xlink:href="./ObjectReplacements/Object 10" xlink:type="simple" xlink:show="embed" xlink:actuate="onLoad"/></draw:frame> – температура насыщения при давлении <draw:frame draw:style-name="fr3" draw:name="Объект11" text:anchor-type="as-char" svg:y="-0.379cm" svg:width="0.427cm" svg:height="0.534cm" draw:z-index="14"><draw:object xlink:href="./Object 11" xlink:type="simple" xlink:show="embed" xlink:actuate="onLoad"/><draw:image xlink:href="./ObjectReplacements/Object 11" xlink:type="simple" xlink:show="embed" xlink:actuate="onLoad"/></draw:frame>;<text:line-break/><draw:frame draw:style-name="fr3" draw:name="Объект12" text:anchor-type="as-char" svg:y="-0.379cm" svg:width="0.356cm" svg:height="0.534cm" draw:z-index="15"><draw:object xlink:href="./Object 12" xlink:type="simple" xlink:show="embed" xlink:actuate="onLoad"/><draw:image xlink:href="./ObjectReplacements/Object 12" xlink:type="simple" xlink:show="embed" xlink:actuate="onLoad"/></draw:frame> и <draw:frame draw:style-name="fr3" draw:name="Объект13" text:anchor-type="as-char" svg:y="-0.379cm" svg:width="0.365cm" svg:height="0.534cm" draw:z-index="16"><draw:object xlink:href="./Object 13" xlink:type="simple" xlink:show="embed" xlink:actuate="onLoad"/><draw:image xlink:href="./ObjectReplacements/Object 13" xlink:type="simple" xlink:show="embed" xlink:actuate="onLoad"/></draw:frame> – энтальпия и степень сухости пара на выходе из ПГ;<text:line-break/><draw:frame draw:style-name="fr3" draw:name="Объект14" text:anchor-type="as-char" svg:y="-0.379cm" svg:width="0.684cm" svg:height="0.534cm" draw:z-index="17"><draw:object xlink:href="./Object 14" xlink:type="simple" xlink:show="embed" xlink:actuate="onLoad"/><draw:image xlink:href="./ObjectReplacements/Object 14" xlink:type="simple" xlink:show="embed" xlink:actuate="onLoad"/></draw:frame> и <draw:frame draw:style-name="fr3" draw:name="Объект15" text:anchor-type="as-char" svg:y="-0.379cm" svg:width="0.561cm" svg:height="0.534cm" draw:z-index="18"><draw:object xlink:href="./Object 15" xlink:type="simple" xlink:show="embed" xlink:actuate="onLoad"/><draw:image xlink:href="./ObjectReplacements/Object 15" xlink:type="simple" xlink:show="embed" xlink:actuate="onLoad"/></draw:frame> – расход и энтальпия продувочной воды.</text:p>
      <text:p text:style-name="Standard">Здесь и далее используются следующие правила обозначения параметров:</text:p>
      <text:list text:style-name="WWNum2">
        <text:list-item>
          <text:p text:style-name="P12">подстрочный индекс 1 означает, что это параметр теплоносителя;</text:p>
        </text:list-item>
        <text:list-item>
          <text:p text:style-name="P12">подстрочный индекс 2 – параметр рабочего тела;</text:p>
        </text:list-item>
        <text:list-item>
          <text:p text:style-name="P12">одиночный верхний штрих (“) указывает на то, что указан параметр на входе в элемент (кроме обозначения энтальпий);</text:p>
        </text:list-item>
        <text:list-item>
          <text:p text:style-name="P12"><text:soft-page-break/>двойной штрих (““) относится к параметру на выходе (кроме обозначения энтальпий).</text:p>
        </text:list-item>
      </text:list>
      <text:p text:style-name="Standard">t-Q диаграмма такого парогенератора приведена на рис.2.</text:p>
      <text:p text:style-name="P13"><draw:frame draw:style-name="fr4" draw:name="Врезка3" text:anchor-type="as-char" svg:width="15.392cm" draw:z-index="2"><draw:text-box fo:min-height="6.219cm"><text:p text:style-name="Drawing"><draw:frame draw:style-name="fr5" draw:name="Изображение2" text:anchor-type="paragraph" svg:width="8.158cm" style:rel-width="53%" svg:height="5.075cm" style:rel-height="scale" draw:z-index="3"><draw:image xlink:href="Pictures/1000000100000178000000EAB954B0C7.png" xlink:type="simple" xlink:show="embed" xlink:actuate="onLoad" draw:mime-type="image/png"/></draw:frame>Рисунок <text:sequence text:ref-name="refDrawing2" text:name="Drawing" text:formula="ooow:Drawing+1" style:num-format="1">2</text:sequence><text:s/>– t-Q диаграмма для ПГ с погруженной поверхностью теплообмена</text:p></draw:text-box></draw:frame></text:p>
      <text:p text:style-name="P11"><draw:frame draw:style-name="fr3" draw:name="Объект16" text:anchor-type="as-char" svg:y="-0.379cm" svg:width="0.423cm" svg:height="0.534cm" draw:z-index="19"><draw:object xlink:href="./Object 16" xlink:type="simple" xlink:show="embed" xlink:actuate="onLoad"/><draw:image xlink:href="./ObjectReplacements/Object 16" xlink:type="simple" xlink:show="embed" xlink:actuate="onLoad"/></draw:frame> – давление теплоносителя в первом контуре;<text:line-break/><draw:frame draw:style-name="fr3" draw:name="Объект17" text:anchor-type="as-char" svg:y="-0.379cm" svg:width="0.453cm" svg:height="0.534cm" draw:z-index="20"><draw:object xlink:href="./Object 17" xlink:type="simple" xlink:show="embed" xlink:actuate="onLoad"/><draw:image xlink:href="./ObjectReplacements/Object 17" xlink:type="simple" xlink:show="embed" xlink:actuate="onLoad"/></draw:frame> – температура насыщения при давлении <draw:frame draw:style-name="fr3" draw:name="Объект18" text:anchor-type="as-char" svg:y="-0.379cm" svg:width="0.423cm" svg:height="0.534cm" draw:z-index="21"><draw:object xlink:href="./Object 18" xlink:type="simple" xlink:show="embed" xlink:actuate="onLoad"/><draw:image xlink:href="./ObjectReplacements/Object 18" xlink:type="simple" xlink:show="embed" xlink:actuate="onLoad"/></draw:frame>;<text:line-break/><draw:frame draw:style-name="fr3" draw:name="Объект19" text:anchor-type="as-char" svg:y="-0.379cm" svg:width="0.986cm" svg:height="0.534cm" draw:z-index="22"><draw:object xlink:href="./Object 19" xlink:type="simple" xlink:show="embed" xlink:actuate="onLoad"/><draw:image xlink:href="./ObjectReplacements/Object 19" xlink:type="simple" xlink:show="embed" xlink:actuate="onLoad"/></draw:frame> – температурный запас до кипения теплоносителя;<text:line-break/><draw:frame draw:style-name="fr3" draw:name="Объект20" text:anchor-type="as-char" svg:y="-0.379cm" svg:width="0.669cm" svg:height="0.534cm" draw:z-index="23"><draw:object xlink:href="./Object 20" xlink:type="simple" xlink:show="embed" xlink:actuate="onLoad"/><draw:image xlink:href="./ObjectReplacements/Object 20" xlink:type="simple" xlink:show="embed" xlink:actuate="onLoad"/></draw:frame> – наименьшее значение температурного напора (на выходе теплоносителя из ПГ);<text:line-break/><draw:frame draw:style-name="fr3" draw:name="Объект21" text:anchor-type="as-char" svg:y="-0.379cm" svg:width="0.582cm" svg:height="0.534cm" draw:z-index="24"><draw:object xlink:href="./Object 21" xlink:type="simple" xlink:show="embed" xlink:actuate="onLoad"/><draw:image xlink:href="./ObjectReplacements/Object 21" xlink:type="simple" xlink:show="embed" xlink:actuate="onLoad"/></draw:frame> – наибольшее значение температурного напора (на входе теплоносителя в ПГ);<text:line-break/><draw:frame draw:style-name="fr3" draw:name="Объект22" text:anchor-type="as-char" svg:y="-0.439cm" svg:width="0.284cm" svg:height="0.594cm" draw:z-index="25"><draw:object xlink:href="./Object 22" xlink:type="simple" xlink:show="embed" xlink:actuate="onLoad"/><draw:image xlink:href="./ObjectReplacements/Object 22" xlink:type="simple" xlink:show="embed" xlink:actuate="onLoad"/></draw:frame> – температура рабочего тела на входе в ПГ;<text:line-break/><draw:frame draw:style-name="fr3" draw:name="Объект23" text:anchor-type="as-char" svg:y="-0.439cm" svg:width="0.323cm" svg:height="0.594cm" draw:z-index="26"><draw:object xlink:href="./Object 23" xlink:type="simple" xlink:show="embed" xlink:actuate="onLoad"/><draw:image xlink:href="./ObjectReplacements/Object 23" xlink:type="simple" xlink:show="embed" xlink:actuate="onLoad"/></draw:frame> – температура рабочего тела на выходе из ПГ.</text:p>
      <text:p text:style-name="P14">Таблица <text:sequence text:ref-name="refTable0" text:name="Table" text:formula="ooow:Table+1" style:num-format="1">1</text:sequence><text:s/>– Исходные данные к конструктивному расчёту ПГ</text:p>
      <table:table table:name="Таблица1" table:style-name="Таблица1">
        <table:table-column table:style-name="Таблица1.A"/>
        <table:table-column table:style-name="Таблица1.B"/>
        <table:table-column table:style-name="Таблица1.C"/>
        <table:table-column table:style-name="Таблица1.D"/>
        <table:table-header-rows>
          <table:table-row table:style-name="Таблица1.1">
            <table:table-cell table:style-name="Таблица1.A1" office:value-type="string">
              <text:p text:style-name="P15">Наименование параметра</text:p>
            </table:table-cell>
            <table:table-cell table:style-name="Таблица1.A1" office:value-type="string">
              <text:p text:style-name="P15">Обозначение</text:p>
            </table:table-cell>
            <table:table-cell table:style-name="Таблица1.A1" office:value-type="string">
              <text:p text:style-name="P15">Размерность</text:p>
            </table:table-cell>
            <table:table-cell table:style-name="Таблица1.A1" office:value-type="string">
              <text:p text:style-name="P15">Значение</text:p>
            </table:table-cell>
          </table:table-row>
        </table:table-header-rows>
        <table:table-row table:style-name="Таблица1.1">
          <table:table-cell table:style-name="Таблица1.A1" office:value-type="string">
            <text:p text:style-name="P15">Вид теплоносителя</text:p>
          </table:table-cell>
          <table:table-cell table:style-name="Таблица1.A1" office:value-type="string">
            <text:p text:style-name="P15">–</text:p>
          </table:table-cell>
          <table:table-cell table:style-name="Таблица1.A1" office:value-type="string">
            <text:p text:style-name="P15">–</text:p>
          </table:table-cell>
          <table:table-cell table:style-name="Таблица1.A1" office:value-type="string">
            <text:p text:style-name="P15">Вода под давлением</text:p>
          </table:table-cell>
        </table:table-row>
        <table:table-row table:style-name="Таблица1.1">
          <table:table-cell table:style-name="Таблица1.A1" office:value-type="string">
            <text:p text:style-name="P15">Температура теплоносителя на входе в ПГ</text:p>
          </table:table-cell>
          <table:table-cell table:style-name="Таблица1.A1" office:value-type="string">
            <text:p text:style-name="P16"><draw:frame draw:style-name="fr3" draw:name="Объект24" text:anchor-type="as-char" svg:y="-0.439cm" svg:width="0.28cm" svg:height="0.594cm" draw:z-index="79"><draw:object xlink:href="./Object 24" xlink:type="simple" xlink:show="embed" xlink:actuate="onLoad"/><draw:image xlink:href="./ObjectReplacements/Object 24" xlink:type="simple" xlink:show="embed" xlink:actuate="onLoad"/></draw:frame></text:p>
          </table:table-cell>
          <table:table-cell table:style-name="Таблица1.A1" office:value-type="string">
            <text:p text:style-name="P15">°С</text:p>
          </table:table-cell>
          <table:table-cell table:style-name="Таблица1.A1" office:value-type="string">
            <text:p text:style-name="P15"><text:variable-set text:name="t1_in" office:value-type="float" office:value="310" style:data-style-name="N0">310</text:variable-set></text:p>
          </table:table-cell>
        </table:table-row>
        <table:table-row table:style-name="Таблица1.1">
          <table:table-cell table:style-name="Таблица1.A1" office:value-type="string">
            <text:p text:style-name="P15">Температура теплоносителя на выходе из ПГ</text:p>
          </table:table-cell>
          <table:table-cell table:style-name="Таблица1.A1" office:value-type="string">
            <text:p text:style-name="P16"><draw:frame draw:style-name="fr3" draw:name="Объект25" text:anchor-type="as-char" svg:y="-0.439cm" svg:width="0.323cm" svg:height="0.594cm" draw:z-index="80"><draw:object xlink:href="./Object 25" xlink:type="simple" xlink:show="embed" xlink:actuate="onLoad"/><draw:image xlink:href="./ObjectReplacements/Object 25" xlink:type="simple" xlink:show="embed" xlink:actuate="onLoad"/></draw:frame></text:p>
          </table:table-cell>
          <table:table-cell table:style-name="Таблица1.A1" office:value-type="string">
            <text:p text:style-name="P15">°С</text:p>
          </table:table-cell>
          <table:table-cell table:style-name="Таблица1.A1" office:value-type="string">
            <text:p text:style-name="P15"><text:variable-set text:name="t1_out" office:value-type="float" office:value="282" style:data-style-name="N0">282</text:variable-set></text:p>
          </table:table-cell>
        </table:table-row>
        <table:table-row table:style-name="Таблица1.1">
          <table:table-cell table:style-name="Таблица1.A1" office:value-type="string">
            <text:p text:style-name="P15">Температура питательной воды</text:p>
          </table:table-cell>
          <table:table-cell table:style-name="Таблица1.A1" office:value-type="string">
            <text:p text:style-name="P16"><draw:frame draw:style-name="fr3" draw:name="Объект26" text:anchor-type="as-char" svg:y="-0.379cm" svg:width="0.515cm" svg:height="0.534cm" draw:z-index="81"><draw:object xlink:href="./Object 26" xlink:type="simple" xlink:show="embed" xlink:actuate="onLoad"/><draw:image xlink:href="./ObjectReplacements/Object 26" xlink:type="simple" xlink:show="embed" xlink:actuate="onLoad"/></draw:frame></text:p>
          </table:table-cell>
          <table:table-cell table:style-name="Таблица1.A1" office:value-type="string">
            <text:p text:style-name="P15">°С</text:p>
          </table:table-cell>
          <table:table-cell table:style-name="Таблица1.A1" office:value-type="string">
            <text:p text:style-name="P15"><text:variable-set text:name="t1_pv" office:value-type="float" office:value="225" style:data-style-name="N0">225</text:variable-set></text:p>
          </table:table-cell>
        </table:table-row>
        <table:table-row table:style-name="Таблица1.1">
          <table:table-cell table:style-name="Таблица1.A1" office:value-type="string">
            <text:p text:style-name="P15">Паропроизводительность ПГ</text:p>
          </table:table-cell>
          <table:table-cell table:style-name="Таблица1.A1" office:value-type="string">
            <text:p text:style-name="P16"><draw:frame draw:style-name="fr3" draw:name="Объект27" text:anchor-type="as-char" svg:y="-0.379cm" svg:width="0.684cm" svg:height="0.534cm" draw:z-index="82"><draw:object xlink:href="./Object 27" xlink:type="simple" xlink:show="embed" xlink:actuate="onLoad"/><draw:image xlink:href="./ObjectReplacements/Object 27" xlink:type="simple" xlink:show="embed" xlink:actuate="onLoad"/></draw:frame></text:p>
          </table:table-cell>
          <table:table-cell table:style-name="Таблица1.A1" office:value-type="string">
            <text:p text:style-name="P15">кг/с</text:p>
          </table:table-cell>
          <table:table-cell table:style-name="Таблица1.A1" office:value-type="string">
            <text:p text:style-name="P15"><text:variable-set text:name="D_pr" office:value-type="float" office:value="320" style:data-style-name="N0">320</text:variable-set></text:p>
          </table:table-cell>
        </table:table-row>
        <table:table-row table:style-name="Таблица1.1">
          <table:table-cell table:style-name="Таблица1.A1" office:value-type="string">
            <text:p text:style-name="P15">Относительный расход непрерывной продувки</text:p>
          </table:table-cell>
          <table:table-cell table:style-name="Таблица1.A1" office:value-type="string">
            <text:p text:style-name="P16"><draw:frame draw:style-name="fr3" draw:name="Объект28" text:anchor-type="as-char" svg:y="-0.379cm" svg:width="0.624cm" svg:height="0.534cm" draw:z-index="83"><draw:object xlink:href="./Object 28" xlink:type="simple" xlink:show="embed" xlink:actuate="onLoad"/><draw:image xlink:href="./ObjectReplacements/Object 28" xlink:type="simple" xlink:show="embed" xlink:actuate="onLoad"/></draw:frame></text:p>
          </table:table-cell>
          <table:table-cell table:style-name="Таблица1.A1" office:value-type="string">
            <text:p text:style-name="P15">%</text:p>
          </table:table-cell>
          <table:table-cell table:style-name="Таблица1.A1" office:value-type="string">
            <text:p text:style-name="P17"><text:variable-set text:name="alpha_pr" office:value-type="float" office:value="0.7" style:data-style-name="N0">0,7</text:variable-set></text:p>
          </table:table-cell>
        </table:table-row>
        <table:table-row table:style-name="Таблица1.1">
          <table:table-cell table:style-name="Таблица1.A1" office:value-type="string">
            <text:p text:style-name="P15">Наружный диаметр трубок ПТО</text:p>
          </table:table-cell>
          <table:table-cell table:style-name="Таблица1.A1" office:value-type="string">
            <text:p text:style-name="P16"><draw:frame draw:style-name="fr3" draw:name="Объект29" text:anchor-type="as-char" svg:y="-0.379cm" svg:width="0.471cm" svg:height="0.534cm" draw:z-index="84"><draw:object xlink:href="./Object 29" xlink:type="simple" xlink:show="embed" xlink:actuate="onLoad"/><draw:image xlink:href="./ObjectReplacements/Object 29" xlink:type="simple" xlink:show="embed" xlink:actuate="onLoad"/></draw:frame></text:p>
          </table:table-cell>
          <table:table-cell table:style-name="Таблица1.A1" office:value-type="string">
            <text:p text:style-name="P15">мм</text:p>
          </table:table-cell>
          <table:table-cell table:style-name="Таблица1.A1" office:value-type="string">
            <text:p text:style-name="P15"><text:variable-set text:name="d_n" office:value-type="float" office:value="16" style:data-style-name="N0">16</text:variable-set></text:p>
          </table:table-cell>
        </table:table-row>
        <table:table-row table:style-name="Таблица1.1">
          <table:table-cell table:style-name="Таблица1.A1" office:value-type="string">
            <text:p text:style-name="P15">Толщина стенки трубки ПТО</text:p>
          </table:table-cell>
          <table:table-cell table:style-name="Таблица1.A1" office:value-type="string">
            <text:p text:style-name="P16"><draw:frame draw:style-name="fr3" draw:name="Объект30" text:anchor-type="as-char" svg:y="-0.379cm" svg:width="0.54cm" svg:height="0.534cm" draw:z-index="85"><draw:object xlink:href="./Object 30" xlink:type="simple" xlink:show="embed" xlink:actuate="onLoad"/><draw:image xlink:href="./ObjectReplacements/Object 30" xlink:type="simple" xlink:show="embed" xlink:actuate="onLoad"/></draw:frame></text:p>
          </table:table-cell>
          <table:table-cell table:style-name="Таблица1.A1" office:value-type="string">
            <text:p text:style-name="P15">мм</text:p>
          </table:table-cell>
          <table:table-cell table:style-name="Таблица1.A1" office:value-type="string">
            <text:p text:style-name="P15"><text:variable-set text:name="delta_tr" office:value-type="float" office:value="1.5" style:data-style-name="N0">1,5</text:variable-set></text:p>
          </table:table-cell>
        </table:table-row>
        <table:table-row table:style-name="Таблица1.1">
          <table:table-cell table:style-name="Таблица1.A1" office:value-type="string">
            <text:p text:style-name="P15">Наружный диаметр коллекторов теплоносителя</text:p>
          </table:table-cell>
          <table:table-cell table:style-name="Таблица1.A1" office:value-type="string">
            <text:p text:style-name="P16"><draw:frame draw:style-name="fr3" draw:name="Объект31" text:anchor-type="as-char" svg:y="-0.439cm" svg:width="0.471cm" svg:height="0.594cm" draw:z-index="86"><draw:object xlink:href="./Object 31" xlink:type="simple" xlink:show="embed" xlink:actuate="onLoad"/><draw:image xlink:href="./ObjectReplacements/Object 31" xlink:type="simple" xlink:show="embed" xlink:actuate="onLoad"/></draw:frame></text:p>
          </table:table-cell>
          <table:table-cell table:style-name="Таблица1.A1" office:value-type="string">
            <text:p text:style-name="P15">мм</text:p>
          </table:table-cell>
          <table:table-cell table:style-name="Таблица1.A1" office:value-type="string">
            <text:p text:style-name="P15"><text:variable-set text:name="dk_n" office:value-type="float" office:value="1100" style:data-style-name="N0">1100</text:variable-set></text:p>
          </table:table-cell>
        </table:table-row>
        <table:table-row table:style-name="Таблица1.1">
          <table:table-cell table:style-name="Таблица1.A1" office:value-type="string">
            <text:p text:style-name="P15">Толщина стенки коллектора</text:p>
          </table:table-cell>
          <table:table-cell table:style-name="Таблица1.A1" office:value-type="string">
            <text:p text:style-name="P16"><draw:frame draw:style-name="fr3" draw:name="Объект32" text:anchor-type="as-char" svg:y="-0.379cm" svg:width="0.446cm" svg:height="0.534cm" draw:z-index="87"><draw:object xlink:href="./Object 32" xlink:type="simple" xlink:show="embed" xlink:actuate="onLoad"/><draw:image xlink:href="./ObjectReplacements/Object 32" xlink:type="simple" xlink:show="embed" xlink:actuate="onLoad"/></draw:frame></text:p>
          </table:table-cell>
          <table:table-cell table:style-name="Таблица1.A1" office:value-type="string">
            <text:p text:style-name="P15">мм</text:p>
          </table:table-cell>
          <table:table-cell table:style-name="Таблица1.A1" office:value-type="string">
            <text:p text:style-name="P15"><text:variable-set text:name="delta_k" office:value-type="float" office:value="140" style:data-style-name="N0">140</text:variable-set></text:p>
          </table:table-cell>
        </table:table-row>
      </table:table>
      <text:p text:style-name="Standard"/>
      <text:list text:continue-list="list4153261830" text:style-name="Numbering_20_123">
        <text:list-item>
          <text:p text:style-name="Heading_20_1"><text:bookmark-start text:name="_Toc225600176"/><text:bookmark-start text:name="__RefHeading___Toc3296_953335161"/><text:soft-page-break/>Тепловой расчёт парогенератора<text:bookmark-end text:name="_Toc225600176"/><text:bookmark-end text:name="__RefHeading___Toc3296_953335161"/></text:p>
          <text:list>
            <text:list-item>
              <text:h text:style-name="Heading_20_2" text:outline-level="2"><text:bookmark-start text:name="_Toc225600177"/><text:bookmark-start text:name="__RefHeading___Toc2897_953335161"/>Принятые допущения в тепловом расчёте<text:bookmark-end text:name="_Toc225600177"/><text:bookmark-end text:name="__RefHeading___Toc2897_953335161"/></text:h>
            </text:list-item>
          </text:list>
        </text:list-item>
      </text:list>
      <text:p text:style-name="P18" loext:marker-style-name="T4"><text:span text:style-name="T4">Потеря давления теплоносителя для существующих ПГ данного типа составляет:</text:span><text:span text:style-name="T4"/></text:p>
      <text:p text:style-name="P19" loext:marker-style-name="T5"><draw:frame draw:style-name="fr3" draw:name="Объект33" text:anchor-type="as-char" svg:y="-0.744cm" svg:width="5.602cm" svg:height="1.251cm" draw:z-index="27"><draw:object xlink:href="./Object 33" xlink:type="simple" xlink:show="embed" xlink:actuate="onLoad"/><draw:image xlink:href="./ObjectReplacements/Object 33" xlink:type="simple" xlink:show="embed" xlink:actuate="onLoad"/></draw:frame></text:p>
      <text:p text:style-name="P18" loext:marker-style-name="T4"><text:span text:style-name="T4">На основании этого на данном этапе расчёта парогенератора пренебрегаем величиной </text:span><draw:frame draw:style-name="fr3" draw:name="Объект34" text:anchor-type="as-char" svg:y="-0.379cm" svg:width="0.727cm" svg:height="0.534cm" draw:z-index="28"><draw:object xlink:href="./Object 34" xlink:type="simple" xlink:show="embed" xlink:actuate="onLoad"/><draw:image xlink:href="./ObjectReplacements/Object 34" xlink:type="simple" xlink:show="embed" xlink:actuate="onLoad"/></draw:frame><text:span text:style-name="T4"> и считаем, что:</text:span></text:p>
      <text:p text:style-name="P19" loext:marker-style-name="T5"><draw:frame draw:style-name="fr3" draw:name="Объект35" text:anchor-type="as-char" svg:y="-0.439cm" svg:width="2.057cm" svg:height="0.594cm" draw:z-index="29"><draw:object xlink:href="./Object 35" xlink:type="simple" xlink:show="embed" xlink:actuate="onLoad"/><draw:image xlink:href="./ObjectReplacements/Object 35" xlink:type="simple" xlink:show="embed" xlink:actuate="onLoad"/></draw:frame></text:p>
      <text:p text:style-name="P18" loext:marker-style-name="T4"><text:span text:style-name="T4">Здесь: </text:span><draw:frame draw:style-name="fr3" draw:name="Объект36" text:anchor-type="as-char" svg:y="-0.379cm" svg:width="0.397cm" svg:height="0.534cm" draw:z-index="30"><draw:object xlink:href="./Object 36" xlink:type="simple" xlink:show="embed" xlink:actuate="onLoad"/><draw:image xlink:href="./ObjectReplacements/Object 36" xlink:type="simple" xlink:show="embed" xlink:actuate="onLoad"/></draw:frame><text:span text:style-name="T4"> – среднее давление теплоносителя в трубной поверхности ПГ, по которому будут определены все теплофизические характеристики теплоносителя.</text:span></text:p>
      <text:p text:style-name="P18" loext:marker-style-name="T4"><text:span text:style-name="T4">Теплоноситель – вода под давлением, что означает, что температура теплоносителя на выходе из реактора (на входе в парогенератор) меньше температуры насыщения при давлении теплоносителя на определенную величину. Эта разность температур (</text:span><draw:frame draw:style-name="fr3" draw:name="Объект37" text:anchor-type="as-char" svg:y="-0.439cm" svg:width="2.258cm" svg:height="0.594cm" draw:z-index="31"><draw:object xlink:href="./Object 37" xlink:type="simple" xlink:show="embed" xlink:actuate="onLoad"/><draw:image xlink:href="./ObjectReplacements/Object 37" xlink:type="simple" xlink:show="embed" xlink:actuate="onLoad"/></draw:frame><text:span text:style-name="T4">) (рис. 2) должна быть не менее 15 °С.</text:span></text:p>
      <text:p text:style-name="P18" loext:marker-style-name="T4"><text:span text:style-name="T4">Задавшись величиной запаса до кипения, определяется температура насыщения при давлении в первом контуре, и уже по ней – давление теплоносителя.</text:span><text:span text:style-name="T4"/></text:p>
      <text:p text:style-name="P18" loext:marker-style-name="T4"><text:span text:style-name="T4">По подобной схеме определяется и давление рабочего тела </text:span><draw:frame draw:style-name="fr3" draw:name="Объект38" text:anchor-type="as-char" svg:y="-0.379cm" svg:width="0.4cm" svg:height="0.534cm" draw:z-index="32"><draw:object xlink:href="./Object 38" xlink:type="simple" xlink:show="embed" xlink:actuate="onLoad"/><draw:image xlink:href="./ObjectReplacements/Object 38" xlink:type="simple" xlink:show="embed" xlink:actuate="onLoad"/></draw:frame><text:span text:style-name="T4"> в паровом пространстве ПГ. При этом задаётся величина минимального температурного напора, после чего по заданной температуре теплоносителя вычисляется температура насыщения при давлении пара в объёме ПГ и само давление<text:line-break/> (рис. 2).</text:span></text:p>
      <text:p text:style-name="P18" loext:marker-style-name="T4"><text:span text:style-name="T4">Потерей давления генерируемого пара в паровом пространстве ПГ пренебрегаем. Все теплофизические характеристики рабочего тела определяем по давлению </text:span><draw:frame draw:style-name="fr3" draw:name="Объект39" text:anchor-type="as-char" svg:y="-0.379cm" svg:width="0.4cm" svg:height="0.534cm" draw:z-index="33"><draw:object xlink:href="./Object 39" xlink:type="simple" xlink:show="embed" xlink:actuate="onLoad"/><draw:image xlink:href="./ObjectReplacements/Object 39" xlink:type="simple" xlink:show="embed" xlink:actuate="onLoad"/></draw:frame><text:span text:style-name="T4"> и считаем, что </text:span><draw:frame draw:style-name="fr3" draw:name="Объект40" text:anchor-type="as-char" svg:y="-0.379cm" svg:width="1.27cm" svg:height="0.534cm" draw:z-index="34"><draw:object xlink:href="./Object 40" xlink:type="simple" xlink:show="embed" xlink:actuate="onLoad"/><draw:image xlink:href="./ObjectReplacements/Object 40" xlink:type="simple" xlink:show="embed" xlink:actuate="onLoad"/></draw:frame><text:span text:style-name="T4">.</text:span></text:p>
      <text:p text:style-name="P20" loext:marker-style-name="T4">Парогенератор генерирует сухой насыщенный пар со степенью сухости, значение которой близко к 1. При этом влажность пара не может быть более 0,2 %.</text:p>
      <text:list text:continue-numbering="true" text:style-name="Numbering_20_123">
        <text:list-item>
          <text:list>
            <text:list-item>
              <text:h text:style-name="P21" text:outline-level="2"><text:bookmark-start text:name="__RefHeading___Toc2899_953335161"/>Алгоритм расчёта<text:bookmark-end text:name="__RefHeading___Toc2899_953335161"/></text:h>
              <text:list>
                <text:list-item>
                  <text:h text:style-name="Heading_20_3" text:outline-level="3"><text:bookmark-start text:name="__RefHeading___Toc2901_953335161"/>Теплофизические характеристики теплоносителя<text:bookmark-end text:name="__RefHeading___Toc2901_953335161"/></text:h>
                </text:list-item>
              </text:list>
            </text:list-item>
          </text:list>
        </text:list-item>
      </text:list>
      <text:p text:style-name="P22" loext:marker-style-name="T6"><text:span text:style-name="T6">Принимаем запас до кипения </text:span><text:span text:style-name="T6"/></text:p>
      <text:p text:style-name="P23" loext:marker-style-name="T6"><text:span text:style-name="T6">Δtзап = </text:span><text:span text:style-name="T6"><text:variable-set text:name="dt_zap" office:value-type="float" office:value="20" style:data-style-name="N0">20</text:variable-set></text:span><text:span text:style-name="T6"><text:s/>°С.</text:span></text:p>
      <text:p text:style-name="P22" loext:marker-style-name="T6"><text:span text:style-name="T6">Температура насыщения при давлении теплоносителя в первом контуре, °С</text:span><text:span text:style-name="T6"/></text:p>
      <text:p text:style-name="P23" loext:marker-style-name="T6"><text:span text:style-name="T7">t₁s = t′₁ + Δtзап</text:span><text:span text:style-name="T6"> = </text:span><text:span text:style-name="T6"><text:variable-get text:name="t1_in" style:data-style-name="N0">310</text:variable-get></text:span><text:span text:style-name="T6">+</text:span><text:span text:style-name="T6"><text:variable-get text:name="dt_zap" style:data-style-name="N0">20</text:variable-get></text:span><text:span text:style-name="T6"> = </text:span><text:span text:style-name="T6"><text:variable-set text:name="t1s" text:formula="ooow:t1_in + dt_zap" office:value-type="float" office:value="330" style:data-style-name="N0">330</text:variable-set></text:span><text:span text:style-name="T6">.</text:span></text:p>
      <text:p text:style-name="P22" loext:marker-style-name="T6"><text:span text:style-name="T6">Давление теплоносителя на выходе из ядерного реактора при температуре насыщения, МПа</text:span><text:span text:style-name="T6"/></text:p>
      <text:p text:style-name="P23" loext:marker-style-name="T6"><text:span text:style-name="T7">p₁ = f(t₁s)</text:span><text:span text:style-name="T6"> = </text:span><text:span text:style-name="T6"><text:variable-set text:name="p1" office:value-type="float" office:value="12.86" style:data-style-name="N0">12,86</text:variable-set></text:span></text:p>
      <text:p text:style-name="P22" loext:marker-style-name="T6"><text:span text:style-name="Emphasis"><text:span text:style-name="T6">Примечание.</text:span></text:span><text:span text:style-name="T6"> Здесь и далее выражением f(…) будем обозначать отыскание термодинамических и теплофизических параметров по таблицам свойств воды.</text:span></text:p>
      <text:p text:style-name="P22" loext:marker-style-name="T6"><text:span text:style-name="T6">Средняя температура теплоносителя в трубках поверхности теплообмена парогенератора, °С</text:span><text:span text:style-name="T6"/></text:p>
      <text:p text:style-name="P23" loext:marker-style-name="T6"><text:span text:style-name="T7">t̅₁ = (t′₁ + t″₁)/2</text:span><text:span text:style-name="T6"> = (</text:span><text:span text:style-name="T6"><text:variable-get text:name="t1_in" style:data-style-name="N0">310</text:variable-get></text:span><text:span text:style-name="T6">+</text:span><text:span text:style-name="T6"><text:variable-get text:name="t1_out" style:data-style-name="N0">282</text:variable-get></text:span><text:span text:style-name="T6">)/2 = </text:span><text:span text:style-name="T6"><text:variable-set text:name="t1_" text:formula="ooow:(t1_in + t1_out) / 2" office:value-type="float" office:value="296" style:data-style-name="N0">296</text:variable-set></text:span><text:span text:style-name="T6">.</text:span></text:p>
      <text:p text:style-name="P22" loext:marker-style-name="T6"><text:span text:style-name="T6">Средняя плотность теплоносителя в трубках ПТО ПГ, кг/м³</text:span><text:span text:style-name="T6"/></text:p>
      <text:p text:style-name="P23" loext:marker-style-name="T6"><text:span text:style-name="T7">ρ₁ = f(p₁, t̅₁)</text:span><text:span text:style-name="T6"> = </text:span><text:span text:style-name="T6"><text:variable-set text:name="rho1" office:value-type="float" office:value="729.74" style:data-style-name="N0">729,74</text:variable-set></text:span><text:span text:style-name="T6">.</text:span></text:p>
      <text:p text:style-name="P22" loext:marker-style-name="T6"><text:span text:style-name="T6">Коэффициент динамической вязкости теплоносителя, Па·с</text:span><text:span text:style-name="T6"/></text:p>
      <text:p text:style-name="P23" loext:marker-style-name="T6"><text:span text:style-name="T7">μ₁ = f(p₁, t̅₁)</text:span><text:span text:style-name="T6"> = </text:span><text:span text:style-name="T6"><text:variable-set text:name="mu1" text:formula="ooow:8,917" office:value-type="float" office:value="8.917" style:data-style-name="N0">8,92</text:variable-set></text:span><draw:frame draw:style-name="fr3" draw:name="Объект41" text:anchor-type="as-char" svg:y="-0.379cm" svg:width="0.245cm" svg:height="0.471cm" draw:z-index="35"><draw:object xlink:href="./Object 41" xlink:type="simple" xlink:show="embed" xlink:actuate="onLoad"/><draw:image xlink:href="./ObjectReplacements/Object 41" xlink:type="simple" xlink:show="embed" xlink:actuate="onLoad"/></draw:frame><text:span text:style-name="T6">10</text:span><text:span text:style-name="T8">-5</text:span><text:span text:style-name="T6">.</text:span></text:p>
      <text:p text:style-name="P22" loext:marker-style-name="T6"><text:span text:style-name="T6">Коэффициент кинематической вязкости теплоносителя, м²/с</text:span><text:span text:style-name="T6"/></text:p>
      <text:p text:style-name="P23" loext:marker-style-name="T6"><text:span text:style-name="T7">ν₁ = μ₁/ρ₁</text:span><text:span text:style-name="T6"> = 8,917</text:span><draw:frame draw:style-name="fr3" draw:name="Объект42" text:anchor-type="as-char" svg:y="-0.379cm" svg:width="0.245cm" svg:height="0.471cm" draw:z-index="36"><draw:object xlink:href="./Object 42" xlink:type="simple" xlink:show="embed" xlink:actuate="onLoad"/><draw:image xlink:href="./ObjectReplacements/Object 42" xlink:type="simple" xlink:show="embed" xlink:actuate="onLoad"/></draw:frame><text:span text:style-name="T6">10</text:span><text:span text:style-name="T8">-5</text:span><text:span text:style-name="T6">/729,74 = 1,222*10</text:span><text:span text:style-name="T8">-7</text:span><text:span text:style-name="T6">.</text:span></text:p>
      <text:p text:style-name="P22" loext:marker-style-name="T6"><text:span text:style-name="T6">Средняя теплопроводность теплоносителя, Вт/(м·°С)</text:span><text:span text:style-name="T6"/></text:p>
      <text:p text:style-name="P23" loext:marker-style-name="T6"><text:span text:style-name="T7">λ₁ = f(p₁, t̅₁)</text:span><text:span text:style-name="T6"> = 0,562.</text:span></text:p>
      <text:p text:style-name="P22" loext:marker-style-name="T6"><text:span text:style-name="T6">Изобарная теплоёмкость теплоносителя, кДж/(кг·°С)</text:span><text:span text:style-name="T6"/></text:p>
      <text:p text:style-name="P23" loext:marker-style-name="T6"><text:span text:style-name="T7">cₚ₁ = f(p₁, t̅₁)</text:span><text:span text:style-name="T6"> = 5,45.</text:span></text:p>
      <text:p text:style-name="P22" loext:marker-style-name="T6"><text:span text:style-name="T6">Число Прандтля для теплоносителя</text:span><text:span text:style-name="T6"/></text:p>
      <text:p text:style-name="P23" loext:marker-style-name="T6"><text:span text:style-name="T7">Pr₁ = f(p₁, t̅₁) </text:span><text:span text:style-name="T6">= 0,865.</text:span></text:p>
      <text:list text:continue-numbering="true" text:style-name="Numbering_20_123">
        <text:list-item>
          <text:list>
            <text:list-item>
              <text:list>
                <text:list-item>
                  <text:h text:style-name="Heading_20_3" text:outline-level="3"><text:bookmark-start text:name="__RefHeading___Toc2903_953335161"/><text:soft-page-break/>Теплофизические характеристики рабочего тела<text:bookmark-end text:name="__RefHeading___Toc2903_953335161"/></text:h>
                </text:list-item>
              </text:list>
            </text:list-item>
          </text:list>
        </text:list-item>
      </text:list>
      <text:p text:style-name="P24" loext:marker-style-name="T4"><text:span text:style-name="T4">Зададимся величиной минимального температурного напора в парогенераторе, °С:</text:span><text:span text:style-name="T4"/></text:p>
      <text:p text:style-name="P25" loext:marker-style-name="T5"><draw:frame draw:style-name="fr3" draw:name="Объект43" text:anchor-type="as-char" svg:y="-0.379cm" svg:width="1.538cm" svg:height="0.534cm" draw:z-index="37"><draw:object xlink:href="./Object 43" xlink:type="simple" xlink:show="embed" xlink:actuate="onLoad"/><draw:image xlink:href="./ObjectReplacements/Object 43" xlink:type="simple" xlink:show="embed" xlink:actuate="onLoad"/></draw:frame><text:span text:style-name="T9">.</text:span></text:p>
      <text:p text:style-name="P24" loext:marker-style-name="T4"><text:span text:style-name="T4">Температура насыщения (соответственно, и температура рабочего тела в объёме ПГ), °С:</text:span><text:span text:style-name="T4"/></text:p>
      <text:p text:style-name="P25" loext:marker-style-name="T5"><draw:frame draw:style-name="fr3" draw:name="Объект44" text:anchor-type="as-char" svg:y="-0.439cm" svg:width="5.475cm" svg:height="0.594cm" draw:z-index="38"><draw:object xlink:href="./Object 44" xlink:type="simple" xlink:show="embed" xlink:actuate="onLoad"/><draw:image xlink:href="./ObjectReplacements/Object 44" xlink:type="simple" xlink:show="embed" xlink:actuate="onLoad"/></draw:frame></text:p>
      <text:p text:style-name="P24" loext:marker-style-name="T4"><text:span text:style-name="T4">Давление рабочего тела в ПГ, МПа:</text:span><text:span text:style-name="T4"/></text:p>
      <text:p text:style-name="P25" loext:marker-style-name="T5"><draw:frame draw:style-name="fr3" draw:name="Объект45" text:anchor-type="as-char" svg:y="-0.388cm" svg:width="3.362cm" svg:height="0.543cm" draw:z-index="39"><draw:object xlink:href="./Object 45" xlink:type="simple" xlink:show="embed" xlink:actuate="onLoad"/><draw:image xlink:href="./ObjectReplacements/Object 45" xlink:type="simple" xlink:show="embed" xlink:actuate="onLoad"/></draw:frame></text:p>
      <text:p text:style-name="P24" loext:marker-style-name="T4"><text:span text:style-name="T4">Энтальпия питательной воды на входе в ПГ, кДж/кг:</text:span><text:span text:style-name="T4"/></text:p>
      <text:p text:style-name="P25" loext:marker-style-name="T5"><draw:frame draw:style-name="fr3" draw:name="Объект46" text:anchor-type="as-char" svg:y="-0.388cm" svg:width="4.47cm" svg:height="0.543cm" draw:z-index="40"><draw:object xlink:href="./Object 46" xlink:type="simple" xlink:show="embed" xlink:actuate="onLoad"/><draw:image xlink:href="./ObjectReplacements/Object 46" xlink:type="simple" xlink:show="embed" xlink:actuate="onLoad"/></draw:frame></text:p>
      <text:p text:style-name="P24" loext:marker-style-name="T4"><text:span text:style-name="T4">Продувочная вода и «котловая» вода в объёме ПГ представляют собой воду на линии насыщения при давлении рабочего тела </text:span><draw:frame draw:style-name="fr3" draw:name="Объект47" text:anchor-type="as-char" svg:y="-0.379cm" svg:width="0.4cm" svg:height="0.534cm" draw:z-index="41"><draw:object xlink:href="./Object 47" xlink:type="simple" xlink:show="embed" xlink:actuate="onLoad"/><draw:image xlink:href="./ObjectReplacements/Object 47" xlink:type="simple" xlink:show="embed" xlink:actuate="onLoad"/></draw:frame><text:span text:style-name="T4">. Поэтому энтальпия продувочной воды, кДж/кг:</text:span></text:p>
      <text:p text:style-name="P25" loext:marker-style-name="T5"><draw:frame draw:style-name="fr3" draw:name="Объект48" text:anchor-type="as-char" svg:y="-0.439cm" svg:width="4.247cm" svg:height="0.594cm" draw:z-index="42"><draw:object xlink:href="./Object 48" xlink:type="simple" xlink:show="embed" xlink:actuate="onLoad"/><draw:image xlink:href="./ObjectReplacements/Object 48" xlink:type="simple" xlink:show="embed" xlink:actuate="onLoad"/></draw:frame></text:p>
      <text:p text:style-name="P24" loext:marker-style-name="T4"><text:span text:style-name="T4">Энтальпия сухого насыщенного пара при давлении рабочего тела </text:span><draw:frame draw:style-name="fr3" draw:name="Объект49" text:anchor-type="as-char" svg:y="-0.379cm" svg:width="0.4cm" svg:height="0.534cm" draw:z-index="43"><draw:object xlink:href="./Object 49" xlink:type="simple" xlink:show="embed" xlink:actuate="onLoad"/><draw:image xlink:href="./ObjectReplacements/Object 49" xlink:type="simple" xlink:show="embed" xlink:actuate="onLoad"/></draw:frame><text:span text:style-name="T4">, кДж/кг:</text:span></text:p>
      <text:p text:style-name="P25" loext:marker-style-name="T10"><draw:frame draw:style-name="fr3" draw:name="Объект50" text:anchor-type="as-char" svg:y="-0.439cm" svg:width="3.872cm" svg:height="0.594cm" draw:z-index="44"><draw:object xlink:href="./Object 50" xlink:type="simple" xlink:show="embed" xlink:actuate="onLoad"/><draw:image xlink:href="./ObjectReplacements/Object 50" xlink:type="simple" xlink:show="embed" xlink:actuate="onLoad"/></draw:frame></text:p>
      <text:p text:style-name="P24" loext:marker-style-name="T4"><text:span text:style-name="T4">На основании опыта эксплуатации ПГ данного типа по эффективности осушения пара сепарационными устройствами в паровом объёме ПГ, принимаем степень сухости генерируемого пара на выходе из ПГ:</text:span><text:span text:style-name="T4"/></text:p>
      <text:p text:style-name="P25" loext:marker-style-name="T10"><draw:frame draw:style-name="fr3" draw:name="Объект51" text:anchor-type="as-char" svg:y="-0.379cm" svg:width="1.757cm" svg:height="0.534cm" draw:z-index="45"><draw:object xlink:href="./Object 51" xlink:type="simple" xlink:show="embed" xlink:actuate="onLoad"/><draw:image xlink:href="./ObjectReplacements/Object 51" xlink:type="simple" xlink:show="embed" xlink:actuate="onLoad"/></draw:frame></text:p>
      <text:p text:style-name="P24" loext:marker-style-name="T4"><text:span text:style-name="T4">Энтальпия осушенного пара на выходе из ПГ, кДж/кг:</text:span><text:span text:style-name="T4"/></text:p>
      <text:p text:style-name="P25" loext:marker-style-name="T10"><draw:frame draw:style-name="fr3" draw:name="Объект52" text:anchor-type="as-char" svg:y="-0.439cm" svg:width="12.76cm" svg:height="0.594cm" draw:z-index="46"><draw:object xlink:href="./Object 52" xlink:type="simple" xlink:show="embed" xlink:actuate="onLoad"/><draw:image xlink:href="./ObjectReplacements/Object 52" xlink:type="simple" xlink:show="embed" xlink:actuate="onLoad"/></draw:frame></text:p>
      <text:p text:style-name="P24" loext:marker-style-name="T4"><text:span text:style-name="T4">Удельный объём пара на выходе из ПГ, м³/кг:</text:span><text:span text:style-name="T4"/></text:p>
      <text:p text:style-name="P25" loext:marker-style-name="T10"><draw:frame draw:style-name="fr3" draw:name="Объект53" text:anchor-type="as-char" svg:y="-0.439cm" svg:width="12.266cm" svg:height="0.594cm" draw:z-index="47"><draw:object xlink:href="./Object 53" xlink:type="simple" xlink:show="embed" xlink:actuate="onLoad"/><draw:image xlink:href="./ObjectReplacements/Object 53" xlink:type="simple" xlink:show="embed" xlink:actuate="onLoad"/></draw:frame></text:p>
      <text:p text:style-name="P26" loext:marker-style-name="T4">Плотность пара на выходе из ПГ, кг/м³:</text:p>
      <text:p text:style-name="P27"/>
      <text:p text:style-name="P25" loext:marker-style-name="T10"><draw:frame draw:style-name="fr3" draw:name="Объект54" text:anchor-type="as-char" svg:y="-0.621cm" svg:width="4.32cm" svg:height="1.067cm" draw:z-index="49"><draw:object xlink:href="./Object 54" xlink:type="simple" xlink:show="embed" xlink:actuate="onLoad"/><draw:image xlink:href="./ObjectReplacements/Object 54" xlink:type="simple" xlink:show="embed" xlink:actuate="onLoad"/></draw:frame></text:p>
      <text:p text:style-name="P24" loext:marker-style-name="T4"><text:span text:style-name="T4">Плотность питательной воды на входе в ПГ, кг/м³:</text:span><text:span text:style-name="T4"/></text:p>
      <text:p text:style-name="P28"><draw:frame draw:style-name="fr3" draw:name="Объект55" text:anchor-type="as-char" svg:y="-0.388cm" svg:width="4.279cm" svg:height="0.543cm" draw:z-index="50"><draw:object xlink:href="./Object 55" xlink:type="simple" xlink:show="embed" xlink:actuate="onLoad"/><draw:image xlink:href="./ObjectReplacements/Object 55" xlink:type="simple" xlink:show="embed" xlink:actuate="onLoad"/></draw:frame></text:p>
      <text:list text:continue-numbering="true" text:style-name="Numbering_20_123">
        <text:list-item>
          <text:list>
            <text:list-item>
              <text:list>
                <text:list-item>
                  <text:h text:style-name="Heading_20_3" text:outline-level="3"><text:bookmark-start text:name="__RefHeading___Toc2905_953335161"/><text:span text:style-name="Заголовок_20_1_20_Знак"><text:span text:style-name="T1">Материальный и тепловой балансы ПГ</text:span></text:span><text:bookmark-end text:name="__RefHeading___Toc2905_953335161"/></text:h>
                </text:list-item>
              </text:list>
            </text:list-item>
          </text:list>
        </text:list-item>
      </text:list>
      <text:p text:style-name="P29" loext:marker-style-name="T4"><text:span text:style-name="T4">Величина непрерывной продувки ПГ, кг/с</text:span></text:p>
      <text:p text:style-name="P30" loext:marker-style-name="T5"><draw:frame draw:style-name="fr3" draw:name="Объект56" text:anchor-type="as-char" svg:y="-0.379cm" svg:width="7.523cm" svg:height="0.534cm" draw:z-index="48"><draw:object xlink:href="./Object 56" xlink:type="simple" xlink:show="embed" xlink:actuate="onLoad"/><draw:image xlink:href="./ObjectReplacements/Object 56" xlink:type="simple" xlink:show="embed" xlink:actuate="onLoad"/></draw:frame></text:p>
      <text:p text:style-name="P18" loext:marker-style-name="T4"><text:soft-page-break/><text:span text:style-name="T11">Примечание:</text:span><text:span text:style-name="T4"> </text:span><draw:frame draw:style-name="fr3" draw:name="Объект57" text:anchor-type="as-char" svg:y="-0.379cm" svg:width="0.596cm" svg:height="0.534cm" draw:z-index="51"><draw:object xlink:href="./Object 57" xlink:type="simple" xlink:show="embed" xlink:actuate="onLoad"/><draw:image xlink:href="./ObjectReplacements/Object 57" xlink:type="simple" xlink:show="embed" xlink:actuate="onLoad"/></draw:frame><text:span text:style-name="T4"> – относительный расход непрерывной продувки в долях от единицы. Для реальных АЭС величина продувки определяется водно-химическим режимом второго контура и составляет 0,5–1,0% от паропроизводительности ПГ.</text:span></text:p>
      <text:p text:style-name="P18" loext:marker-style-name="T4"><text:span text:style-name="T4">Расход питательной воды, подаваемой в ПГ, кг/с</text:span></text:p>
      <text:p text:style-name="P25" loext:marker-style-name="T5"><draw:frame draw:style-name="fr3" draw:name="Объект58" text:anchor-type="as-char" svg:y="-0.379cm" svg:width="6.324cm" svg:height="0.534cm" draw:z-index="52"><draw:object xlink:href="./Object 58" xlink:type="simple" xlink:show="embed" xlink:actuate="onLoad"/><draw:image xlink:href="./ObjectReplacements/Object 58" xlink:type="simple" xlink:show="embed" xlink:actuate="onLoad"/></draw:frame></text:p>
      <text:p text:style-name="P18" loext:marker-style-name="T4"><text:span text:style-name="T4">Количество теплоты, получаемое рабочим телом в ПГ, кВт</text:span></text:p>
      <text:p text:style-name="P25" loext:marker-style-name="T5"><draw:frame draw:style-name="fr3" draw:name="Объект59" text:anchor-type="as-char" svg:y="-0.594cm" svg:width="11.568cm" svg:height="1.074cm" draw:z-index="53"><draw:object xlink:href="./Object 59" xlink:type="simple" xlink:show="embed" xlink:actuate="onLoad"/><draw:image xlink:href="./ObjectReplacements/Object 59" xlink:type="simple" xlink:show="embed" xlink:actuate="onLoad"/></draw:frame></text:p>
      <text:p text:style-name="P18" loext:marker-style-name="T4"><text:span text:style-name="T4">Коэффициент полезного действия парогенератора данного типа в зависимости от величины тепловых потерь в окружающую среду составляет</text:span></text:p>
      <text:p text:style-name="P25" loext:marker-style-name="T5"><draw:frame draw:style-name="fr3" draw:name="Объект60" text:anchor-type="as-char" svg:y="-0.379cm" svg:width="2.741cm" svg:height="0.534cm" draw:z-index="54"><draw:object xlink:href="./Object 60" xlink:type="simple" xlink:show="embed" xlink:actuate="onLoad"/><draw:image xlink:href="./ObjectReplacements/Object 60" xlink:type="simple" xlink:show="embed" xlink:actuate="onLoad"/></draw:frame></text:p>
      <text:p text:style-name="P18" loext:marker-style-name="T4"><text:span text:style-name="T4">Количество теплоты, передаваемое теплоносителем в ПГ, кВт</text:span></text:p>
      <text:p text:style-name="P25" loext:marker-style-name="T5"><draw:frame draw:style-name="fr3" draw:name="Объект61" text:anchor-type="as-char" svg:y="-0.684cm" svg:width="6.152cm" svg:height="1.131cm" draw:z-index="55"><draw:object xlink:href="./Object 61" xlink:type="simple" xlink:show="embed" xlink:actuate="onLoad"/><draw:image xlink:href="./ObjectReplacements/Object 61" xlink:type="simple" xlink:show="embed" xlink:actuate="onLoad"/></draw:frame></text:p>
      <text:p text:style-name="P18" loext:marker-style-name="T4"><text:span text:style-name="T4">Расход теплоносителя через трубную систему поверхности теплообмена ПГ, кг/с:</text:span></text:p>
      <text:p text:style-name="P28" loext:marker-style-name="T12"><draw:frame draw:style-name="fr3" draw:name="Объект62" text:anchor-type="as-char" svg:y="-0.684cm" svg:width="8.225cm" svg:height="1.191cm" draw:z-index="56"><draw:object xlink:href="./Object 62" xlink:type="simple" xlink:show="embed" xlink:actuate="onLoad"/><draw:image xlink:href="./ObjectReplacements/Object 62" xlink:type="simple" xlink:show="embed" xlink:actuate="onLoad"/></draw:frame></text:p>
      <text:list xml:id="list235508330324937" text:continue-numbering="true" text:style-name="Numbering_20_123">
        <text:list-item>
          <text:list>
            <text:list-item>
              <text:list>
                <text:list-item>
                  <text:h text:style-name="Heading_20_3" text:outline-level="3"><text:bookmark-start text:name="__RefHeading___Toc2907_953335161"/>Расчёт коэффициента теплопередачи<text:bookmark-end text:name="__RefHeading___Toc2907_953335161"/></text:h>
                </text:list-item>
              </text:list>
            </text:list-item>
          </text:list>
        </text:list-item>
      </text:list>
      <text:p text:style-name="Standard">Для вновь проектируемого ПГ АЭС с погруженной поверхностью теплообмена суммарную величину термического сопротивления загрязнений можно принять:</text:p>
      <text:p text:style-name="P31"><draw:frame draw:style-name="fr3" draw:name="Объект63" text:anchor-type="as-char" svg:y="-0.439cm" svg:width="7.541cm" svg:height="0.594cm" draw:z-index="57"><draw:object xlink:href="./Object 63" xlink:type="simple" xlink:show="embed" xlink:actuate="onLoad"/><draw:image xlink:href="./ObjectReplacements/Object 63" xlink:type="simple" xlink:show="embed" xlink:actuate="onLoad"/></draw:frame></text:p>
      <text:p text:style-name="Standard">Теплопроводность материала трубки поверхности теплообмена определяется при средней температуре теплоносителя по табл. 2:</text:p>
      <text:p text:style-name="P31"><draw:frame draw:style-name="fr3" draw:name="Объект64" text:anchor-type="as-char" svg:y="-0.388cm" svg:width="5.057cm" svg:height="0.543cm" draw:z-index="60"><draw:object xlink:href="./Object 64" xlink:type="simple" xlink:show="embed" xlink:actuate="onLoad"/><draw:image xlink:href="./ObjectReplacements/Object 64" xlink:type="simple" xlink:show="embed" xlink:actuate="onLoad"/></draw:frame></text:p>
      <text:p text:style-name="P14">Таблица <text:sequence text:ref-name="refTable1" text:name="Table" text:formula="ooow:Table+1" style:num-format="1">2</text:sequence><text:s/>– Коэффициент теплопроводности некоторых сталей, Вт/(м·град)</text:p>
      <table:table table:name="Таблица3" table:style-name="Таблица3">
        <table:table-column table:style-name="Таблица3.A"/>
        <table:table-column table:style-name="Таблица3.B" table:number-columns-repeated="5"/>
        <table:table-column table:style-name="Таблица3.G"/>
        <table:table-header-rows>
          <table:table-row>
            <table:table-cell table:style-name="Таблица3.A1" table:number-rows-spanned="2" office:value-type="string">
              <text:p text:style-name="P32">t, °C</text:p>
            </table:table-cell>
            <table:table-cell table:style-name="Таблица3.B1" table:number-columns-spanned="6" office:value-type="string">
              <text:p text:style-name="P33">Марка стали</text:p>
            </table:table-cell>
            <table:covered-table-cell/>
            <table:covered-table-cell/>
            <table:covered-table-cell/>
            <table:covered-table-cell/>
            <table:covered-table-cell/>
          </table:table-row>
          <table:table-row>
            <table:covered-table-cell table:style-name="Таблица3.A1"/>
            <table:table-cell table:style-name="Таблица3.B2" office:value-type="string">
              <text:p text:style-name="P34">22К</text:p>
            </table:table-cell>
            <table:table-cell table:style-name="Таблица3.B2" office:value-type="string">
              <text:p text:style-name="P34">12МХ</text:p>
            </table:table-cell>
            <table:table-cell table:style-name="Таблица3.B2" office:value-type="string">
              <text:p text:style-name="P34">15МХ</text:p>
            </table:table-cell>
            <table:table-cell table:style-name="Таблица3.B2" office:value-type="string">
              <text:p text:style-name="P34">12Х1МФ</text:p>
            </table:table-cell>
            <table:table-cell table:style-name="Таблица3.B2" office:value-type="string">
              <text:p text:style-name="P34">10ГН2МФА</text:p>
            </table:table-cell>
            <table:table-cell table:style-name="Таблица3.G2" office:value-type="string">
              <text:p text:style-name="P34">08Х18Н10Т</text:p>
            </table:table-cell>
          </table:table-row>
        </table:table-header-rows>
        <table:table-row>
          <table:table-cell table:style-name="Таблица3.B2" office:value-type="string">
            <text:p text:style-name="P32">100</text:p>
          </table:table-cell>
          <table:table-cell table:style-name="Таблица3.B2" office:value-type="string">
            <text:p text:style-name="P34">49,5</text:p>
          </table:table-cell>
          <table:table-cell table:style-name="Таблица3.B2" office:value-type="string">
            <text:p text:style-name="P34">50,2</text:p>
          </table:table-cell>
          <table:table-cell table:style-name="Таблица3.B2" office:value-type="string">
            <text:p text:style-name="P34">44,5</text:p>
          </table:table-cell>
          <table:table-cell table:style-name="Таблица3.B2" office:value-type="string">
            <text:p text:style-name="P34">41,3</text:p>
          </table:table-cell>
          <table:table-cell table:style-name="Таблица3.B2" office:value-type="string">
            <text:p text:style-name="P34">36</text:p>
          </table:table-cell>
          <table:table-cell table:style-name="Таблица3.G2" office:value-type="string">
            <text:p text:style-name="P34">16,3</text:p>
          </table:table-cell>
        </table:table-row>
        <table:table-row>
          <table:table-cell table:style-name="Таблица3.B2" office:value-type="string">
            <text:p text:style-name="P32">200</text:p>
          </table:table-cell>
          <table:table-cell table:style-name="Таблица3.B2" office:value-type="string">
            <text:p text:style-name="P34">47,7</text:p>
          </table:table-cell>
          <table:table-cell table:style-name="Таблица3.B2" office:value-type="string">
            <text:p text:style-name="P34">50,2</text:p>
          </table:table-cell>
          <table:table-cell table:style-name="Таблица3.B2" office:value-type="string">
            <text:p text:style-name="P34">41,3</text:p>
          </table:table-cell>
          <table:table-cell table:style-name="Таблица3.B2" office:value-type="string">
            <text:p text:style-name="P34">40,8</text:p>
          </table:table-cell>
          <table:table-cell table:style-name="Таблица3.B2" office:value-type="string">
            <text:p text:style-name="P34">40</text:p>
          </table:table-cell>
          <table:table-cell table:style-name="Таблица3.G2" office:value-type="string">
            <text:p text:style-name="P34">17,5</text:p>
          </table:table-cell>
        </table:table-row>
        <table:table-row>
          <table:table-cell table:style-name="Таблица3.B2" office:value-type="string">
            <text:p text:style-name="P32">300</text:p>
          </table:table-cell>
          <table:table-cell table:style-name="Таблица3.B2" office:value-type="string">
            <text:p text:style-name="P34">45,5</text:p>
          </table:table-cell>
          <table:table-cell table:style-name="Таблица3.B2" office:value-type="string">
            <text:p text:style-name="P34">50,2</text:p>
          </table:table-cell>
          <table:table-cell table:style-name="Таблица3.B2" office:value-type="string">
            <text:p text:style-name="P34">40,8</text:p>
          </table:table-cell>
          <table:table-cell table:style-name="Таблица3.B2" office:value-type="string">
            <text:p text:style-name="P34">40,3</text:p>
          </table:table-cell>
          <table:table-cell table:style-name="Таблица3.B2" office:value-type="string">
            <text:p text:style-name="P34">43</text:p>
          </table:table-cell>
          <table:table-cell table:style-name="Таблица3.G2" office:value-type="string">
            <text:p text:style-name="P34">18,8</text:p>
          </table:table-cell>
        </table:table-row>
        <table:table-row table:style-name="Таблица3.6">
          <table:table-cell table:style-name="Таблица3.B2" office:value-type="string">
            <text:p text:style-name="P32">400</text:p>
          </table:table-cell>
          <table:table-cell table:style-name="Таблица3.B2" office:value-type="string">
            <text:p text:style-name="P34">43,5</text:p>
          </table:table-cell>
          <table:table-cell table:style-name="Таблица3.B2" office:value-type="string">
            <text:p text:style-name="P34">48,6</text:p>
          </table:table-cell>
          <table:table-cell table:style-name="Таблица3.B2" office:value-type="string">
            <text:p text:style-name="P34">39</text:p>
          </table:table-cell>
          <table:table-cell table:style-name="Таблица3.B2" office:value-type="string">
            <text:p text:style-name="P34">39,7</text:p>
          </table:table-cell>
          <table:table-cell table:style-name="Таблица3.B2" office:value-type="string">
            <text:p text:style-name="P34">44</text:p>
          </table:table-cell>
          <table:table-cell table:style-name="Таблица3.G2" office:value-type="string">
            <text:p text:style-name="P34">21,4</text:p>
          </table:table-cell>
        </table:table-row>
        <table:table-row table:style-name="Таблица3.6">
          <table:table-cell table:style-name="Таблица3.B2" office:value-type="string">
            <text:p text:style-name="P32">500</text:p>
          </table:table-cell>
          <table:table-cell table:style-name="Таблица3.B2" office:value-type="string">
            <text:p text:style-name="P34">39,3</text:p>
          </table:table-cell>
          <table:table-cell table:style-name="Таблица3.B2" office:value-type="string">
            <text:p text:style-name="P34">47</text:p>
          </table:table-cell>
          <table:table-cell table:style-name="Таблица3.B2" office:value-type="string">
            <text:p text:style-name="P34">36,1</text:p>
          </table:table-cell>
          <table:table-cell table:style-name="Таблица3.B2" office:value-type="string">
            <text:p text:style-name="P34">39</text:p>
          </table:table-cell>
          <table:table-cell table:style-name="Таблица3.B2" office:value-type="string">
            <text:p text:style-name="P35">-</text:p>
          </table:table-cell>
          <table:table-cell table:style-name="Таблица3.G2" office:value-type="string">
            <text:p text:style-name="P34">23</text:p>
          </table:table-cell>
        </table:table-row>
      </table:table>
      <text:p text:style-name="Standard"><text:soft-page-break/>В качестве материала трубок поверхности теплообмена ПГ АЭС с ВВЭР рекомендуется применять стали аустенитного класса 08Х18Н10Т (или аналоги).</text:p>
      <text:p text:style-name="P36">Термическое сопротивление стенки трубки определяется по формуле, <draw:frame draw:style-name="fr3" draw:name="Объект65" text:anchor-type="as-char" svg:y="-0.439cm" svg:width="2.671cm" svg:height="0.563cm" draw:z-index="61"><draw:object xlink:href="./Object 65" xlink:type="simple" xlink:show="embed" xlink:actuate="onLoad"/><draw:image xlink:href="./ObjectReplacements/Object 65" xlink:type="simple" xlink:show="embed" xlink:actuate="onLoad"/></draw:frame>:</text:p>
      <text:p text:style-name="P37"><draw:frame draw:style-name="fr3" draw:name="Объект66" text:anchor-type="as-char" svg:y="-0.744cm" svg:width="6.733cm" svg:height="1.191cm" draw:z-index="58"><draw:object xlink:href="./Object 66" xlink:type="simple" xlink:show="embed" xlink:actuate="onLoad"/><draw:image xlink:href="./ObjectReplacements/Object 66" xlink:type="simple" xlink:show="embed" xlink:actuate="onLoad"/></draw:frame><draw:frame draw:style-name="fr3" draw:name="Объект67" text:anchor-type="as-char" svg:y="-0.379cm" svg:width="0.111cm" svg:height="0.471cm" draw:z-index="59"><draw:object xlink:href="./Object 67" xlink:type="simple" xlink:show="embed" xlink:actuate="onLoad"/><draw:image xlink:href="./ObjectReplacements/Object 67" xlink:type="simple" xlink:show="embed" xlink:actuate="onLoad"/></draw:frame></text:p>
      <text:p text:style-name="Standard">Здесь: <draw:frame draw:style-name="fr3" draw:name="Объект68" text:anchor-type="as-char" svg:y="-0.379cm" svg:width="0.545cm" svg:height="0.534cm" draw:z-index="62"><draw:object xlink:href="./Object 68" xlink:type="simple" xlink:show="embed" xlink:actuate="onLoad"/><draw:image xlink:href="./ObjectReplacements/Object 68" xlink:type="simple" xlink:show="embed" xlink:actuate="onLoad"/></draw:frame> – толщина стенки трубки в мм; <draw:frame draw:style-name="fr3" draw:name="Объект69" text:anchor-type="as-char" svg:y="-0.379cm" svg:width="0.538cm" svg:height="0.534cm" draw:z-index="63"><draw:object xlink:href="./Object 69" xlink:type="simple" xlink:show="embed" xlink:actuate="onLoad"/><draw:image xlink:href="./ObjectReplacements/Object 69" xlink:type="simple" xlink:show="embed" xlink:actuate="onLoad"/></draw:frame> – теплопроводность материала стенки трубки (Вт/(м·град)).</text:p>
      <text:p text:style-name="Standard">Критерий Рейнольдса для теплоносителя:</text:p>
      <text:p text:style-name="Формула"><draw:frame draw:style-name="fr3" draw:name="Объект70" text:anchor-type="as-char" svg:y="-0.744cm" svg:width="8.53cm" svg:height="1.191cm" draw:z-index="64"><draw:object xlink:href="./Object 70" xlink:type="simple" xlink:show="embed" xlink:actuate="onLoad"/><draw:image xlink:href="./ObjectReplacements/Object 70" xlink:type="simple" xlink:show="embed" xlink:actuate="onLoad"/></draw:frame></text:p>
      <text:p text:style-name="Bibliography_20_1"/>
      <text:p text:style-name="Standard">Здесь: <draw:frame draw:style-name="fr3" draw:name="Объект71" text:anchor-type="as-char" svg:y="-0.379cm" svg:width="0.443cm" svg:height="0.534cm" draw:z-index="65"><draw:object xlink:href="./Object 71" xlink:type="simple" xlink:show="embed" xlink:actuate="onLoad"/><draw:image xlink:href="./ObjectReplacements/Object 71" xlink:type="simple" xlink:show="embed" xlink:actuate="onLoad"/></draw:frame> – скорость теплоносителя в трубках ПТО, м/с; <text:span text:style-name="T13"> начиная с этого пункта и до завершения технико-экономического расчета, все значения определяются для нескольких значений скоростей теплоносителя </text:span><text:span text:style-name="T14">однако пример расчета будет приводиться только для первого значения скорости</text:span><text:span text:style-name="T13">, </text:span><draw:frame draw:style-name="fr3" draw:name="Объект72" text:anchor-type="as-char" svg:y="-0.379cm" svg:width="5.175cm" svg:height="0.534cm" draw:z-index="66"><draw:object xlink:href="./Object 72" xlink:type="simple" xlink:show="embed" xlink:actuate="onLoad"/><draw:image xlink:href="./ObjectReplacements/Object 72" xlink:type="simple" xlink:show="embed" xlink:actuate="onLoad"/></draw:frame><text:span text:style-name="T13"> м/с;</text:span> <draw:frame draw:style-name="fr3" draw:name="Объект73" text:anchor-type="as-char" svg:y="-0.379cm" svg:width="0.355cm" svg:height="0.534cm" draw:z-index="67"><draw:object xlink:href="./Object 73" xlink:type="simple" xlink:show="embed" xlink:actuate="onLoad"/><draw:image xlink:href="./ObjectReplacements/Object 73" xlink:type="simple" xlink:show="embed" xlink:actuate="onLoad"/></draw:frame> – коэффициент кинематической вязкости теплоносителя, м²/с; <draw:frame draw:style-name="fr3" draw:name="Объект74" text:anchor-type="as-char" svg:y="-0.379cm" svg:width="2.424cm" svg:height="0.534cm" draw:z-index="68"><draw:object xlink:href="./Object 74" xlink:type="simple" xlink:show="embed" xlink:actuate="onLoad"/><draw:image xlink:href="./ObjectReplacements/Object 74" xlink:type="simple" xlink:show="embed" xlink:actuate="onLoad"/></draw:frame> – внутренний диаметр теплообменной трубки, мм.</text:p>
      <text:p text:style-name="Standard">Критерий Нуссельта в случае теплообмена при турбулентном течении неметаллических жидкостей и газов в прямых трубах:</text:p>
      <text:p text:style-name="P38" loext:marker-style-name="T15"><draw:frame draw:style-name="fr3" draw:name="Объект75" text:anchor-type="as-char" svg:y="-0.439cm" svg:width="14.178cm" svg:height="0.594cm" draw:z-index="69"><draw:object xlink:href="./Object 75" xlink:type="simple" xlink:show="embed" xlink:actuate="onLoad"/><draw:image xlink:href="./ObjectReplacements/Object 75" xlink:type="simple" xlink:show="embed" xlink:actuate="onLoad"/></draw:frame></text:p>
      <text:p text:style-name="Standard">Здесь: <draw:frame draw:style-name="fr3" draw:name="Объект76" text:anchor-type="as-char" svg:y="-0.379cm" svg:width="0.534cm" svg:height="0.534cm" draw:z-index="70"><draw:object xlink:href="./Object 76" xlink:type="simple" xlink:show="embed" xlink:actuate="onLoad"/><draw:image xlink:href="./ObjectReplacements/Object 76" xlink:type="simple" xlink:show="embed" xlink:actuate="onLoad"/></draw:frame> – число Прандтля для теплоносителя; <draw:frame draw:style-name="fr3" draw:name="Объект77" text:anchor-type="as-char" svg:y="-0.379cm" svg:width="0.402cm" svg:height="0.534cm" draw:z-index="71"><draw:object xlink:href="./Object 77" xlink:type="simple" xlink:show="embed" xlink:actuate="onLoad"/><draw:image xlink:href="./ObjectReplacements/Object 77" xlink:type="simple" xlink:show="embed" xlink:actuate="onLoad"/></draw:frame> – поправочный коэффициент, учитывающий изменение теплофизических свойств среды при изменении её температуры по ходу движения вдоль поверхности теплообмена (для ПГ с водным теплоносителем <draw:frame draw:style-name="fr3" draw:name="Объект78" text:anchor-type="as-char" svg:y="-0.379cm" svg:width="0.942cm" svg:height="0.534cm" draw:z-index="72"><draw:object xlink:href="./Object 78" xlink:type="simple" xlink:show="embed" xlink:actuate="onLoad"/><draw:image xlink:href="./ObjectReplacements/Object 78" xlink:type="simple" xlink:show="embed" xlink:actuate="onLoad"/></draw:frame>); <draw:frame draw:style-name="fr3" draw:name="Объект79" text:anchor-type="as-char" svg:y="-0.379cm" svg:width="0.39cm" svg:height="0.534cm" draw:z-index="73"><draw:object xlink:href="./Object 79" xlink:type="simple" xlink:show="embed" xlink:actuate="onLoad"/><draw:image xlink:href="./ObjectReplacements/Object 79" xlink:type="simple" xlink:show="embed" xlink:actuate="onLoad"/></draw:frame> – поправочный коэффициент, учитывающий соотношение длины и диаметра <draw:frame draw:style-name="fr3" draw:name="Объект80" text:anchor-type="as-char" svg:y="-0.409cm" svg:width="1.266cm" svg:height="0.593cm" draw:z-index="74"><draw:object xlink:href="./Object 80" xlink:type="simple" xlink:show="embed" xlink:actuate="onLoad"/><draw:image xlink:href="./ObjectReplacements/Object 80" xlink:type="simple" xlink:show="embed" xlink:actuate="onLoad"/></draw:frame> теплообменных трубок (для парогенераторов АЭС с ВВЭР можно считать, что <draw:frame draw:style-name="fr3" draw:name="Объект81" text:anchor-type="as-char" svg:y="-0.379cm" svg:width="0.93cm" svg:height="0.534cm" draw:z-index="75"><draw:object xlink:href="./Object 81" xlink:type="simple" xlink:show="embed" xlink:actuate="onLoad"/><draw:image xlink:href="./ObjectReplacements/Object 81" xlink:type="simple" xlink:show="embed" xlink:actuate="onLoad"/></draw:frame>).</text:p>
      <text:p text:style-name="Standard">Коэффициент теплоотдачи от теплоносителя к стенке ПТО, Вт/(м²·град):</text:p>
      <text:p text:style-name="Формула"><draw:frame draw:style-name="fr3" draw:name="Объект82" text:anchor-type="as-char" svg:y="-0.684cm" svg:width="9.576cm" svg:height="1.191cm" draw:z-index="76"><draw:object xlink:href="./Object 82" xlink:type="simple" xlink:show="embed" xlink:actuate="onLoad"/><draw:image xlink:href="./ObjectReplacements/Object 82" xlink:type="simple" xlink:show="embed" xlink:actuate="onLoad"/></draw:frame></text:p>
      <text:p text:style-name="Standard">Здесь: <draw:frame draw:style-name="fr3" draw:name="Объект83" text:anchor-type="as-char" svg:y="-0.379cm" svg:width="0.355cm" svg:height="0.534cm" draw:z-index="77"><draw:object xlink:href="./Object 83" xlink:type="simple" xlink:show="embed" xlink:actuate="onLoad"/><draw:image xlink:href="./ObjectReplacements/Object 83" xlink:type="simple" xlink:show="embed" xlink:actuate="onLoad"/></draw:frame> – средняя теплопроводность теплоносителя, Вт/(м·град); <draw:frame draw:style-name="fr3" draw:name="Объект84" text:anchor-type="as-char" svg:y="-0.379cm" svg:width="0.61cm" svg:height="0.534cm" draw:z-index="78"><draw:object xlink:href="./Object 84" xlink:type="simple" xlink:show="embed" xlink:actuate="onLoad"/><draw:image xlink:href="./ObjectReplacements/Object 84" xlink:type="simple" xlink:show="embed" xlink:actuate="onLoad"/></draw:frame> – внутренний диаметр теплообменной трубки, мм.</text:p>
      <text:p text:style-name="Standard"><text:soft-page-break/>Результаты вариантных расчётов коэффициента теплопередачи от теплоносителя к стенке теплообменной трубки сводятся в таблицу по форме табл. 3. В случае двухпараметрической оптимизации (по скорости и по диаметру) таблица составляется для каждого значения диаметра трубок.</text:p>
      <text:p text:style-name="P14">Таблица <text:sequence text:ref-name="refTable2" text:name="Table" text:formula="ooow:Table+1" style:num-format="1">3</text:sequence><text:s/>– Варианты расчета α1</text:p>
      <table:table table:name="Таблица2" table:style-name="Таблица2">
        <table:table-column table:style-name="Таблица2.A" table:number-columns-repeated="2"/>
        <table:table-column table:style-name="Таблица2.C"/>
        <table:table-column table:style-name="Таблица2.D"/>
        <table:table-row table:style-name="Таблица2.1">
          <table:table-cell table:style-name="Таблица2.A1" office:value-type="string">
            <text:p text:style-name="P39"><draw:frame draw:style-name="fr3" draw:name="Объект86" text:anchor-type="as-char" svg:y="-0.379cm" svg:width="1.422cm" svg:height="0.534cm" draw:z-index="88"><draw:object xlink:href="./Object 86" xlink:type="simple" xlink:show="embed" xlink:actuate="onLoad"/><draw:image xlink:href="./ObjectReplacements/Object 86" xlink:type="simple" xlink:show="embed" xlink:actuate="onLoad"/></draw:frame></text:p>
          </table:table-cell>
          <table:table-cell table:style-name="Таблица2.A1" office:value-type="string">
            <text:p text:style-name="P39"><draw:frame draw:style-name="fr3" draw:name="Объект87" text:anchor-type="as-char" svg:y="-0.379cm" svg:width="0.617cm" svg:height="0.534cm" draw:z-index="89"><draw:object xlink:href="./Object 87" xlink:type="simple" xlink:show="embed" xlink:actuate="onLoad"/><draw:image xlink:href="./ObjectReplacements/Object 87" xlink:type="simple" xlink:show="embed" xlink:actuate="onLoad"/></draw:frame></text:p>
          </table:table-cell>
          <table:table-cell table:style-name="Таблица2.A1" office:value-type="string">
            <text:p text:style-name="P39"><draw:frame draw:style-name="fr3" draw:name="Объект88" text:anchor-type="as-char" svg:y="-0.379cm" svg:width="0.672cm" svg:height="0.534cm" draw:z-index="90"><draw:object xlink:href="./Object 88" xlink:type="simple" xlink:show="embed" xlink:actuate="onLoad"/><draw:image xlink:href="./ObjectReplacements/Object 88" xlink:type="simple" xlink:show="embed" xlink:actuate="onLoad"/></draw:frame></text:p>
          </table:table-cell>
          <table:table-cell table:style-name="Таблица2.A1" office:value-type="string">
            <text:p text:style-name="P39"><draw:frame draw:style-name="fr3" draw:name="Объект89" text:anchor-type="as-char" svg:y="-0.388cm" svg:width="3.309cm" svg:height="0.543cm" draw:z-index="91"><draw:object xlink:href="./Object 89" xlink:type="simple" xlink:show="embed" xlink:actuate="onLoad"/><draw:image xlink:href="./ObjectReplacements/Object 89" xlink:type="simple" xlink:show="embed" xlink:actuate="onLoad"/></draw:frame></text:p>
          </table:table-cell>
        </table:table-row>
        <table:table-row table:style-name="Таблица2.1">
          <table:table-cell table:style-name="Таблица2.A2" office:value-type="float" office:value="2.5">
            <text:p text:style-name="P40">2,5</text:p>
          </table:table-cell>
          <table:table-cell table:style-name="Таблица2.B2" office:value-type="float" office:value="265967.347723686">
            <text:p text:style-name="P40">265967</text:p>
          </table:table-cell>
          <table:table-cell table:style-name="Таблица2.B2" office:value-type="float" office:value="431.597952529605">
            <text:p text:style-name="P40">432</text:p>
          </table:table-cell>
          <table:table-cell table:style-name="Таблица2.B2" office:value-type="float" office:value="18650.9219918068">
            <text:p text:style-name="P40">18651</text:p>
          </table:table-cell>
        </table:table-row>
        <table:table-row table:style-name="Таблица2.1">
          <table:table-cell table:style-name="Таблица2.A2" office:value-type="float" office:value="3">
            <text:p text:style-name="P40">3,0</text:p>
          </table:table-cell>
          <table:table-cell table:style-name="Таблица2.B2" office:value-type="float" office:value="319160.817268424">
            <text:p text:style-name="P40">319161</text:p>
          </table:table-cell>
          <table:table-cell table:style-name="Таблица2.B2" office:value-type="float" office:value="499.372212686312">
            <text:p text:style-name="P40">499</text:p>
          </table:table-cell>
          <table:table-cell table:style-name="Таблица2.B2" office:value-type="float" office:value="21579.6950126854">
            <text:p text:style-name="P40">21580</text:p>
          </table:table-cell>
        </table:table-row>
        <table:table-row table:style-name="Таблица2.1">
          <table:table-cell table:style-name="Таблица2.A2" office:value-type="float" office:value="3.5">
            <text:p text:style-name="P40">3,5</text:p>
          </table:table-cell>
          <table:table-cell table:style-name="Таблица2.B2" office:value-type="float" office:value="372354.286813161">
            <text:p text:style-name="P40">372354</text:p>
          </table:table-cell>
          <table:table-cell table:style-name="Таблица2.B2" office:value-type="float" office:value="564.913306054876">
            <text:p text:style-name="P40">565</text:p>
          </table:table-cell>
          <table:table-cell table:style-name="Таблица2.B2" office:value-type="float" office:value="24411.9647500887">
            <text:p text:style-name="P40">24412</text:p>
          </table:table-cell>
        </table:table-row>
        <table:table-row table:style-name="Таблица2.1">
          <table:table-cell table:style-name="Таблица2.A2" office:value-type="float" office:value="4">
            <text:p text:style-name="P40">4,0</text:p>
          </table:table-cell>
          <table:table-cell table:style-name="Таблица2.B2" office:value-type="float" office:value="425547.756357898">
            <text:p text:style-name="P40">425548</text:p>
          </table:table-cell>
          <table:table-cell table:style-name="Таблица2.B2" office:value-type="float" office:value="628.601425979799">
            <text:p text:style-name="P40">629</text:p>
          </table:table-cell>
          <table:table-cell table:style-name="Таблица2.B2" office:value-type="float" office:value="27164.1607453723">
            <text:p text:style-name="P40">27164</text:p>
          </table:table-cell>
        </table:table-row>
        <table:table-row table:style-name="Таблица2.1">
          <table:table-cell table:style-name="Таблица2.A2" office:value-type="float" office:value="4.5">
            <text:p text:style-name="P40">4,5</text:p>
          </table:table-cell>
          <table:table-cell table:style-name="Таблица2.B2" office:value-type="float" office:value="478741.225902635">
            <text:p text:style-name="P40">478741</text:p>
          </table:table-cell>
          <table:table-cell table:style-name="Таблица2.B2" office:value-type="float" office:value="690.712602138277">
            <text:p text:style-name="P40">691</text:p>
          </table:table-cell>
          <table:table-cell table:style-name="Таблица2.B2" office:value-type="float" office:value="29848.21124784">
            <text:p text:style-name="P40">29848</text:p>
          </table:table-cell>
        </table:table-row>
        <table:table-row table:style-name="Таблица2.7">
          <table:table-cell table:style-name="Таблица2.A2" office:value-type="float" office:value="5">
            <text:p text:style-name="P40">5,0</text:p>
          </table:table-cell>
          <table:table-cell table:style-name="Таблица2.B2" office:value-type="float" office:value="531934.695447373">
            <text:p text:style-name="P40">531935</text:p>
          </table:table-cell>
          <table:table-cell table:style-name="Таблица2.B2" office:value-type="float" office:value="751.455681384203">
            <text:p text:style-name="P40">751</text:p>
          </table:table-cell>
          <table:table-cell table:style-name="Таблица2.B2" office:value-type="float" office:value="32473.141291919">
            <text:p text:style-name="P40">32473</text:p>
          </table:table-cell>
        </table:table-row>
      </table:table>
      <text:p text:style-name="Standard"/>
      <text:p text:style-name="Standard">Вычисляем значение коэффициента <draw:frame draw:style-name="fr3" draw:name="Объект90" text:anchor-type="as-char" svg:y="-0.379cm" svg:width="0.33cm" svg:height="0.471cm" draw:z-index="92"><draw:object xlink:href="./Object 90" xlink:type="simple" xlink:show="embed" xlink:actuate="onLoad"/><draw:image xlink:href="./ObjectReplacements/Object 90" xlink:type="simple" xlink:show="embed" xlink:actuate="onLoad"/></draw:frame>:</text:p>
      <text:p text:style-name="P31"><draw:frame draw:style-name="fr3" draw:name="Объект91" text:anchor-type="as-char" svg:y="-0.621cm" svg:width="10.714cm" svg:height="1.125cm" draw:z-index="93"><draw:object xlink:href="./Object 91" xlink:type="simple" xlink:show="embed" xlink:actuate="onLoad"/><draw:image xlink:href="./ObjectReplacements/Object 91" xlink:type="simple" xlink:show="embed" xlink:actuate="onLoad"/></draw:frame></text:p>
      <text:p text:style-name="Standard">Значение коэффициента <draw:frame draw:style-name="fr3" draw:name="Объект92" text:anchor-type="as-char" svg:y="-0.379cm" svg:width="0.291cm" svg:height="0.471cm" draw:z-index="94"><draw:object xlink:href="./Object 92" xlink:type="simple" xlink:show="embed" xlink:actuate="onLoad"/><draw:image xlink:href="./ObjectReplacements/Object 92" xlink:type="simple" xlink:show="embed" xlink:actuate="onLoad"/></draw:frame>, <draw:frame draw:style-name="fr3" draw:name="Объект93" text:anchor-type="as-char" svg:y="-0.439cm" svg:width="2.671cm" svg:height="0.563cm" draw:z-index="95"><draw:object xlink:href="./Object 93" xlink:type="simple" xlink:show="embed" xlink:actuate="onLoad"/><draw:image xlink:href="./ObjectReplacements/Object 93" xlink:type="simple" xlink:show="embed" xlink:actuate="onLoad"/></draw:frame>, определяется для каждой скорости:</text:p>
      <text:p text:style-name="P31"><draw:frame draw:style-name="fr3" draw:name="Объект94" text:anchor-type="as-char" svg:y="-0.621cm" svg:width="11.546cm" svg:height="1.067cm" draw:z-index="96"><draw:object xlink:href="./Object 94" xlink:type="simple" xlink:show="embed" xlink:actuate="onLoad"/><draw:image xlink:href="./ObjectReplacements/Object 94" xlink:type="simple" xlink:show="embed" xlink:actuate="onLoad"/></draw:frame></text:p>
      <text:p text:style-name="Standard">Температурные напоры на входе и выходе теплоносителя, °С:</text:p>
      <text:p text:style-name="Формула"><draw:frame draw:style-name="fr3" draw:name="Объект95" text:anchor-type="as-char" svg:y="-0.586cm" svg:width="6.392cm" svg:height="1.088cm" draw:z-index="97"><draw:object xlink:href="./Object 95" xlink:type="simple" xlink:show="embed" xlink:actuate="onLoad"/><draw:image xlink:href="./ObjectReplacements/Object 95" xlink:type="simple" xlink:show="embed" xlink:actuate="onLoad"/></draw:frame></text:p>
      <text:p text:style-name="Standard">Среднелогарифмический температурный напор, °С:</text:p>
      <text:p text:style-name="P31"><draw:frame draw:style-name="fr3" draw:name="Объект97" text:anchor-type="as-char" svg:y="-0.684cm" svg:width="10.709cm" svg:height="1.139cm" draw:z-index="98"><draw:object xlink:href="./Object 97" xlink:type="simple" xlink:show="embed" xlink:actuate="onLoad"/><draw:image xlink:href="./ObjectReplacements/Object 97" xlink:type="simple" xlink:show="embed" xlink:actuate="onLoad"/></draw:frame></text:p>
      <text:p text:style-name="Standard">Находим значение плотности теплового потока <draw:frame draw:style-name="fr3" draw:name="Объект98" text:anchor-type="as-char" svg:y="-0.379cm" svg:width="0.503cm" svg:height="0.534cm" draw:z-index="99"><draw:object xlink:href="./Object 98" xlink:type="simple" xlink:show="embed" xlink:actuate="onLoad"/><draw:image xlink:href="./ObjectReplacements/Object 98" xlink:type="simple" xlink:show="embed" xlink:actuate="onLoad"/></draw:frame> из решения уравнений для условий на входе теплоносителя в ПГ:</text:p>
      <text:p text:style-name="P13"><draw:frame draw:style-name="fr6" draw:name="Объект96" text:anchor-type="as-char" svg:y="-1.259cm" svg:width="3.014cm" svg:height="2.436cm" draw:z-index="100"><draw:object xlink:href="./Object 96" xlink:type="simple" xlink:show="embed" xlink:actuate="onLoad"/><draw:image xlink:href="./ObjectReplacements/Object 96" xlink:type="simple" xlink:show="embed" xlink:actuate="onLoad"/></draw:frame></text:p>
      <text:p text:style-name="P2"/>
      <text:p text:style-name="Standard">Расчёт ведётся методом последовательных приближений. В качестве начального значения принимаем <draw:frame draw:style-name="fr3" draw:name="Объект102" text:anchor-type="as-char" svg:y="-0.439cm" svg:width="2.681cm" svg:height="0.531cm" draw:z-index="101"><draw:object xlink:href="./Object 99" xlink:type="simple" xlink:show="embed" xlink:actuate="onLoad"/><draw:image xlink:href="./ObjectReplacements/Object 99" xlink:type="simple" xlink:show="embed" xlink:actuate="onLoad"/><svg:desc>формула</svg:desc></draw:frame>, <text:span text:style-name="T16">пороговая погрешность </text:span><text:span text:style-name="T16"><draw:frame draw:style-name="fr3" draw:name="Объект99" text:anchor-type="as-char" svg:y="-0.379cm" svg:width="1.443cm" svg:height="0.534cm" draw:z-index="102"><draw:object xlink:href="./Object 100" xlink:type="simple" xlink:show="embed" xlink:actuate="onLoad"/><draw:image xlink:href="./ObjectReplacements/Object 100" xlink:type="simple" xlink:show="embed" xlink:actuate="onLoad"/><svg:desc>формула</svg:desc></draw:frame></text:span><text:s/>Выполнив <text:span text:style-name="T16">4</text:span> итераци<text:span text:style-name="T17">и</text:span>, получаем окончательные значения:</text:p>
      <text:p text:style-name="P31"><text:soft-page-break/><draw:frame draw:style-name="fr3" draw:name="Объект105" text:anchor-type="as-char" svg:y="-0.621cm" svg:width="11.751cm" svg:height="1.064cm" draw:z-index="104"><draw:object xlink:href="./Object 105" xlink:type="simple" xlink:show="embed" xlink:actuate="onLoad"/><draw:image xlink:href="./ObjectReplacements/Object 105" xlink:type="simple" xlink:show="embed" xlink:actuate="onLoad"/></draw:frame></text:p>
      <text:p text:style-name="Standard"><text:span text:style-name="T17">Аналогично н</text:span>аходи<text:span text:style-name="T16">тся</text:span> значение плотности теплового потока <draw:frame draw:style-name="fr3" draw:name="Объект114" text:anchor-type="as-char" svg:y="-0.379cm" svg:width="0.672cm" svg:height="0.534cm" draw:z-index="105"><draw:object xlink:href="./Object 114" xlink:type="simple" xlink:show="embed" xlink:actuate="onLoad"/><draw:image xlink:href="./ObjectReplacements/Object 114" xlink:type="simple" xlink:show="embed" xlink:actuate="onLoad"/></draw:frame> из решения уравнений для условий на выходе теплоносителя из ПГ:</text:p>
      <text:p text:style-name="P31"><draw:frame draw:style-name="fr3" draw:name="Объект115" text:anchor-type="as-char" svg:y="-1.259cm" svg:width="3.27cm" svg:height="2.436cm" draw:z-index="106"><draw:object xlink:href="./Object 115" xlink:type="simple" xlink:show="embed" xlink:actuate="onLoad"/><draw:image xlink:href="./ObjectReplacements/Object 115" xlink:type="simple" xlink:show="embed" xlink:actuate="onLoad"/></draw:frame></text:p>
      <text:list text:style-name="WWNum30">
        <text:list-header>
          <text:p text:style-name="P41">После 5 итераций:</text:p>
          <text:p text:style-name="P42"><draw:frame draw:style-name="fr6" draw:name="Объект100" text:anchor-type="as-char" svg:y="-0.621cm" svg:width="11.506cm" svg:height="1.064cm" draw:z-index="107"><draw:object xlink:href="./Object 101" xlink:type="simple" xlink:show="embed" xlink:actuate="onLoad"/><draw:image xlink:href="./ObjectReplacements/Object 101" xlink:type="simple" xlink:show="embed" xlink:actuate="onLoad"/></draw:frame></text:p>
        </text:list-header>
      </text:list>
      <text:p text:style-name="P2"/>
      <text:p text:style-name="Standard">Расчеты выполняются для каждого значения скорости теплоносителя. Результаты расчетов сводятся в табл. 4.</text:p>
      <text:p text:style-name="P14">Таблица <text:sequence text:ref-name="refTable3" text:name="Table" text:formula="ooow:Table+1" style:num-format="1">4</text:sequence><text:s/>– Результаты расчетов коэффициентов теплопередачи</text:p>
      <table:table table:name="Таблица4" table:style-name="Таблица4">
        <table:table-column table:style-name="Таблица4.A" table:number-columns-repeated="3"/>
        <table:table-row>
          <table:table-cell table:style-name="Таблица4.A1" office:value-type="string">
            <text:p text:style-name="P43">w<text:span text:style-name="T18">1</text:span><text:span text:style-name="T19">, м/с</text:span></text:p>
          </table:table-cell>
          <table:table-cell table:style-name="Таблица4.A1" office:value-type="string">
            <text:p text:style-name="P44"><text:span text:style-name="T20">k</text:span><text:span text:style-name="T21">ВХ</text:span><text:span text:style-name="T20">, Вт/(м</text:span><text:span text:style-name="T22">2</text:span><text:span text:style-name="T20">·°С)</text:span></text:p>
          </table:table-cell>
          <table:table-cell table:style-name="Таблица4.C1" office:value-type="string">
            <text:p text:style-name="P44"><text:span text:style-name="T20">k</text:span><text:span text:style-name="T21">ВЫХ</text:span><text:span text:style-name="T20">, Вт/(м</text:span><text:span text:style-name="T22">2</text:span><text:span text:style-name="T20">·°С)</text:span></text:p>
          </table:table-cell>
        </table:table-row>
        <table:table-row>
          <table:table-cell table:style-name="Таблица4.A2" office:value-type="float" office:value="2.5">
            <text:p text:style-name="P45">2,5</text:p>
          </table:table-cell>
          <table:table-cell table:style-name="Таблица4.B2" office:value-type="float" office:value="5293.89412391504">
            <text:p text:style-name="P45">5294</text:p>
          </table:table-cell>
          <table:table-cell table:style-name="Таблица4.C2" office:value-type="float" office:value="4187.88100254452">
            <text:p text:style-name="P45">4188</text:p>
          </table:table-cell>
        </table:table-row>
        <table:table-row>
          <table:table-cell table:style-name="Таблица4.A2" office:value-type="float" office:value="3">
            <text:p text:style-name="P45">3</text:p>
          </table:table-cell>
          <table:table-cell table:style-name="Таблица4.B2" office:value-type="float" office:value="5528.70322455593">
            <text:p text:style-name="P45">5529</text:p>
          </table:table-cell>
          <table:table-cell table:style-name="Таблица4.C2" office:value-type="float" office:value="4359">
            <text:p text:style-name="P45">4359</text:p>
          </table:table-cell>
        </table:table-row>
        <table:table-row>
          <table:table-cell table:style-name="Таблица4.A2" office:value-type="float" office:value="3.5">
            <text:p text:style-name="P45">3,5</text:p>
          </table:table-cell>
          <table:table-cell table:style-name="Таблица4.B2" office:value-type="float" office:value="5716.2434788271">
            <text:p text:style-name="P45">5716</text:p>
          </table:table-cell>
          <table:table-cell table:style-name="Таблица4.C2" office:value-type="float" office:value="4494.37365832598">
            <text:p text:style-name="P45">4494</text:p>
          </table:table-cell>
        </table:table-row>
        <table:table-row>
          <table:table-cell table:style-name="Таблица4.A2" office:value-type="float" office:value="4">
            <text:p text:style-name="P45">4</text:p>
          </table:table-cell>
          <table:table-cell table:style-name="Таблица4.B2" office:value-type="float" office:value="5870.09510294093">
            <text:p text:style-name="P45">5870</text:p>
          </table:table-cell>
          <table:table-cell table:style-name="Таблица4.C2" office:value-type="float" office:value="4605.37829852602">
            <text:p text:style-name="P45">4605</text:p>
          </table:table-cell>
        </table:table-row>
        <table:table-row>
          <table:table-cell table:style-name="Таблица4.A2" office:value-type="float" office:value="4.5">
            <text:p text:style-name="P45">4,5</text:p>
          </table:table-cell>
          <table:table-cell table:style-name="Таблица4.B2" office:value-type="float" office:value="5998.97411189778">
            <text:p text:style-name="P45">5999</text:p>
          </table:table-cell>
          <table:table-cell table:style-name="Таблица4.C2" office:value-type="float" office:value="4698.10834127662">
            <text:p text:style-name="P45">4698</text:p>
          </table:table-cell>
        </table:table-row>
        <table:table-row>
          <table:table-cell table:style-name="Таблица4.A2" office:value-type="float" office:value="5">
            <text:p text:style-name="P45">5</text:p>
          </table:table-cell>
          <table:table-cell table:style-name="Таблица4.B2" office:value-type="float" office:value="6108.7617401779">
            <text:p text:style-name="P45">6109</text:p>
          </table:table-cell>
          <table:table-cell table:style-name="Таблица4.C2" office:value-type="float" office:value="4776.92014897467">
            <text:p text:style-name="P46">4777</text:p>
          </table:table-cell>
        </table:table-row>
      </table:table>
      <text:p text:style-name="Standard"/>
      <text:p text:style-name="Standard">Определяем среднеарифметический коэффициент теплопередачи, Вт/(м²·град):</text:p>
      <text:p text:style-name="P2"><draw:frame draw:style-name="fr3" draw:name="Объект130" text:anchor-type="as-char" svg:y="-0.684cm" svg:width="7.969cm" svg:height="1.127cm" draw:z-index="103"><draw:object xlink:href="./Object 130" xlink:type="simple" xlink:show="embed" xlink:actuate="onLoad"/><draw:image xlink:href="./ObjectReplacements/Object 130" xlink:type="simple" xlink:show="embed" xlink:actuate="onLoad"/></draw:frame>.</text:p>
      <text:list text:continue-list="list235508330324937" text:style-name="Numbering_20_123">
        <text:list-item>
          <text:list>
            <text:list-item>
              <text:list>
                <text:list-item>
                  <text:h text:style-name="Heading_20_3" text:outline-level="3"><text:bookmark-start text:name="__RefHeading___Toc2909_953335161"/>Расчет площади поверхности теплообмена<text:bookmark-end text:name="__RefHeading___Toc2909_953335161"/></text:h>
                </text:list-item>
              </text:list>
            </text:list-item>
          </text:list>
        </text:list-item>
      </text:list>
      <text:p text:style-name="Standard">Средняя по всей поверхности плотность теплового потока:</text:p>
      <text:p text:style-name="P13"><draw:frame draw:style-name="fr6" draw:name="Объект101" text:anchor-type="as-char" svg:y="-0.621cm" svg:width="6.26cm" svg:height="1.064cm" draw:z-index="108"><draw:object xlink:href="./Object 102" xlink:type="simple" xlink:show="embed" xlink:actuate="onLoad"/><draw:image xlink:href="./ObjectReplacements/Object 102" xlink:type="simple" xlink:show="embed" xlink:actuate="onLoad"/></draw:frame>.</text:p>
      <text:p text:style-name="Standard">Коэффициент теплоотдачи от стенки к рабочему телу:</text:p>
      <text:p text:style-name="P13"><draw:frame draw:style-name="fr6" draw:name="Объект103" text:anchor-type="as-char" svg:y="-0.621cm" svg:width="7.71cm" svg:height="1.064cm" draw:z-index="109"><draw:object xlink:href="./Object 103" xlink:type="simple" xlink:show="embed" xlink:actuate="onLoad"/><draw:image xlink:href="./ObjectReplacements/Object 103" xlink:type="simple" xlink:show="embed" xlink:actuate="onLoad"/></draw:frame></text:p>
      <text:p text:style-name="Standard">Расчётная площадь поверхности теплообмена:</text:p>
      <text:p text:style-name="P13"><draw:frame draw:style-name="fr6" draw:name="Объект104" text:anchor-type="as-char" svg:y="-0.684cm" svg:width="5.664cm" svg:height="1.067cm" draw:z-index="110"><draw:object xlink:href="./Object 104" xlink:type="simple" xlink:show="embed" xlink:actuate="onLoad"/><draw:image xlink:href="./ObjectReplacements/Object 104" xlink:type="simple" xlink:show="embed" xlink:actuate="onLoad"/></draw:frame></text:p>
      <text:p text:style-name="P47"><text:soft-page-break/>С учётом запаса на загрязнения и повреждения (<text:span text:style-name="T23">K</text:span><text:span text:style-name="T24">ЗАП</text:span><text:span text:style-name="T25"> = 1,07</text:span>):</text:p>
      <text:p text:style-name="P13"><draw:frame draw:style-name="fr6" draw:name="Объект106" text:anchor-type="as-char" svg:y="-0.439cm" svg:width="6.639cm" svg:height="0.594cm" draw:z-index="111"><draw:object xlink:href="./Object 106" xlink:type="simple" xlink:show="embed" xlink:actuate="onLoad"/><draw:image xlink:href="./ObjectReplacements/Object 106" xlink:type="simple" xlink:show="embed" xlink:actuate="onLoad"/></draw:frame></text:p>
      <text:p text:style-name="Standard">Итоговые результаты теплового расчёта для всех скоростей теплоносителя представлены в табл. 5.</text:p>
      <text:p text:style-name="P14">Таблица <text:sequence text:ref-name="refTable4" text:name="Table" text:formula="ooow:Table+1" style:num-format="1">5</text:sequence><text:s/>– Результаты теплового расчета ПГ</text:p>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C"/>
        <table:table-column table:style-name="Таблица5.D"/>
        <table:table-column table:style-name="Таблица5.H"/>
        <table:table-row>
          <table:table-cell table:style-name="Таблица5.A1" office:value-type="string">
            <text:p text:style-name="P48">w<text:span text:style-name="T26">1</text:span><text:span text:style-name="T27">, м/с</text:span></text:p>
          </table:table-cell>
          <table:table-cell table:style-name="Таблица5.A1" office:value-type="string">
            <text:p text:style-name="P48">Nu<text:span text:style-name="T26">1</text:span></text:p>
          </table:table-cell>
          <table:table-cell table:style-name="Таблица5.A1" office:value-type="string">
            <text:p text:style-name="P48">Re<text:span text:style-name="T26">1</text:span></text:p>
          </table:table-cell>
          <table:table-cell table:style-name="Таблица5.A1" office:value-type="string">
            <text:p text:style-name="P48"><draw:frame draw:style-name="fr6" draw:name="Объект107" text:anchor-type="as-char" svg:y="-0.621cm" svg:width="1.693cm" svg:height="1.064cm" draw:z-index="112"><draw:object xlink:href="./Object 107" xlink:type="simple" xlink:show="embed" xlink:actuate="onLoad"/><draw:image xlink:href="./ObjectReplacements/Object 107" xlink:type="simple" xlink:show="embed" xlink:actuate="onLoad"/></draw:frame></text:p>
          </table:table-cell>
          <table:table-cell table:style-name="Таблица5.A1" office:value-type="string">
            <text:p text:style-name="P48">q, <draw:frame draw:style-name="fr6" draw:name="Объект108" text:anchor-type="as-char" svg:y="-0.621cm" svg:width="0.677cm" svg:height="1.064cm" draw:z-index="113"><draw:object xlink:href="./Object 108" xlink:type="simple" xlink:show="embed" xlink:actuate="onLoad"/><draw:image xlink:href="./ObjectReplacements/Object 108" xlink:type="simple" xlink:show="embed" xlink:actuate="onLoad"/></draw:frame></text:p>
          </table:table-cell>
          <table:table-cell table:style-name="Таблица5.A1" office:value-type="string">
            <text:p text:style-name="P49">α<text:span text:style-name="T28">1</text:span><text:span text:style-name="T29">, </text:span><text:span text:style-name="T29"><draw:frame draw:style-name="fr6" draw:name="Объект109" text:anchor-type="as-char" svg:y="-0.621cm" svg:width="1.263cm" svg:height="1.064cm" draw:z-index="114"><draw:object xlink:href="./Object 109" xlink:type="simple" xlink:show="embed" xlink:actuate="onLoad"/><draw:image xlink:href="./ObjectReplacements/Object 109" xlink:type="simple" xlink:show="embed" xlink:actuate="onLoad"/></draw:frame></text:span></text:p>
          </table:table-cell>
          <table:table-cell table:style-name="Таблица5.A1" office:value-type="string">
            <text:p text:style-name="P49">α<text:span text:style-name="T28">2</text:span><text:span text:style-name="T29">, </text:span><text:span text:style-name="T29"><draw:frame draw:style-name="fr6" draw:name="Объект110" text:anchor-type="as-char" svg:y="-0.621cm" svg:width="1.263cm" svg:height="1.064cm" draw:z-index="115"><draw:object xlink:href="./Object 110" xlink:type="simple" xlink:show="embed" xlink:actuate="onLoad"/><draw:image xlink:href="./ObjectReplacements/Object 110" xlink:type="simple" xlink:show="embed" xlink:actuate="onLoad"/></draw:frame></text:span></text:p>
          </table:table-cell>
          <table:table-cell table:style-name="Таблица5.H1" office:value-type="string">
            <text:p text:style-name="P48">F<text:span text:style-name="T30">Φ</text:span><text:span text:style-name="T31">, </text:span><text:span text:style-name="T32">м</text:span><text:span text:style-name="T33">2</text:span></text:p>
          </table:table-cell>
        </table:table-row>
        <table:table-row>
          <table:table-cell table:style-name="Таблица5.A2" office:value-type="float" office:value="2.5">
            <text:p text:style-name="P50">2,5</text:p>
          </table:table-cell>
          <table:table-cell table:style-name="Таблица5.B2" office:value-type="float" office:value="431.597952529605">
            <text:p text:style-name="P50">432</text:p>
          </table:table-cell>
          <table:table-cell table:style-name="Таблица5.B2" office:value-type="float" office:value="265967.347723686">
            <text:p text:style-name="P50">265967</text:p>
          </table:table-cell>
          <table:table-cell table:style-name="Таблица5.B2" office:value-type="float" office:value="4740.88756322978">
            <text:p text:style-name="P50">4741</text:p>
          </table:table-cell>
          <table:table-cell table:style-name="Таблица5.B2" office:value-type="float" office:value="99434.2664424614">
            <text:p text:style-name="P50">99434</text:p>
          </table:table-cell>
          <table:table-cell table:style-name="Таблица5.B2" office:value-type="float" office:value="18650.9219918068">
            <text:p text:style-name="P50">18651</text:p>
          </table:table-cell>
          <table:table-cell table:style-name="Таблица5.B2" office:value-type="float" office:value="24266.3111108309">
            <text:p text:style-name="P50">24266</text:p>
          </table:table-cell>
          <table:table-cell table:style-name="Таблица5.H2" office:value-type="float" office:value="6358.32257263562">
            <text:p text:style-name="P50">6358,3</text:p>
          </table:table-cell>
        </table:table-row>
        <table:table-row>
          <table:table-cell table:style-name="Таблица5.A2" office:value-type="float" office:value="3">
            <text:p text:style-name="P50">3</text:p>
          </table:table-cell>
          <table:table-cell table:style-name="Таблица5.B2" office:value-type="float" office:value="499.372212686312">
            <text:p text:style-name="P50">499</text:p>
          </table:table-cell>
          <table:table-cell table:style-name="Таблица5.B2" office:value-type="float" office:value="319160.817268424">
            <text:p text:style-name="P50">319161</text:p>
          </table:table-cell>
          <table:table-cell table:style-name="Таблица5.B2" office:value-type="float" office:value="4943.65292015123">
            <text:p text:style-name="P50">4944</text:p>
          </table:table-cell>
          <table:table-cell table:style-name="Таблица5.B2" office:value-type="float" office:value="103687.019593961">
            <text:p text:style-name="P50">103687</text:p>
          </table:table-cell>
          <table:table-cell table:style-name="Таблица5.B2" office:value-type="float" office:value="21579.6950126854">
            <text:p text:style-name="P50">21580</text:p>
          </table:table-cell>
          <table:table-cell table:style-name="Таблица5.B2" office:value-type="float" office:value="24988.2350913568">
            <text:p text:style-name="P50">24988</text:p>
          </table:table-cell>
          <table:table-cell table:style-name="Таблица5.H2" office:value-type="float" office:value="6097.53413002328">
            <text:p text:style-name="P50">6097,5</text:p>
          </table:table-cell>
        </table:table-row>
        <table:table-row>
          <table:table-cell table:style-name="Таблица5.A2" office:value-type="float" office:value="3.5">
            <text:p text:style-name="P50">3,5</text:p>
          </table:table-cell>
          <table:table-cell table:style-name="Таблица5.B2" office:value-type="float" office:value="564.913306054876">
            <text:p text:style-name="P50">565</text:p>
          </table:table-cell>
          <table:table-cell table:style-name="Таблица5.B2" office:value-type="float" office:value="372354.286813161">
            <text:p text:style-name="P50">372354</text:p>
          </table:table-cell>
          <table:table-cell table:style-name="Таблица5.B2" office:value-type="float" office:value="5105.30856857654">
            <text:p text:style-name="P50">5105</text:p>
          </table:table-cell>
          <table:table-cell table:style-name="Таблица5.B2" office:value-type="float" office:value="107077.547338622">
            <text:p text:style-name="P50">107078</text:p>
          </table:table-cell>
          <table:table-cell table:style-name="Таблица5.B2" office:value-type="float" office:value="24411.9647500887">
            <text:p text:style-name="P50">24412</text:p>
          </table:table-cell>
          <table:table-cell table:style-name="Таблица5.B2" office:value-type="float" office:value="25557.4429355345">
            <text:p text:style-name="P50">25557</text:p>
          </table:table-cell>
          <table:table-cell table:style-name="Таблица5.H2" office:value-type="float" office:value="5904.46042637852">
            <text:p text:style-name="P50">5904,5</text:p>
          </table:table-cell>
        </table:table-row>
        <table:table-row>
          <table:table-cell table:style-name="Таблица5.A2" office:value-type="float" office:value="4">
            <text:p text:style-name="P50">4</text:p>
          </table:table-cell>
          <table:table-cell table:style-name="Таблица5.B2" office:value-type="float" office:value="628.601425979799">
            <text:p text:style-name="P50">629</text:p>
          </table:table-cell>
          <table:table-cell table:style-name="Таблица5.B2" office:value-type="float" office:value="425547.756357898">
            <text:p text:style-name="P50">425548</text:p>
          </table:table-cell>
          <table:table-cell table:style-name="Таблица5.B2" office:value-type="float" office:value="5237.73670073348">
            <text:p text:style-name="P50">5238</text:p>
          </table:table-cell>
          <table:table-cell table:style-name="Таблица5.B2" office:value-type="float" office:value="109855.063995946">
            <text:p text:style-name="P50">109855</text:p>
          </table:table-cell>
          <table:table-cell table:style-name="Таблица5.B2" office:value-type="float" office:value="27164.1607453723">
            <text:p text:style-name="P50">27164</text:p>
          </table:table-cell>
          <table:table-cell table:style-name="Таблица5.B2" office:value-type="float" office:value="26019.7168579541">
            <text:p text:style-name="P50">26020</text:p>
          </table:table-cell>
          <table:table-cell table:style-name="Таблица5.H2" office:value-type="float" office:value="5755.17520828989">
            <text:p text:style-name="P50">5755,2</text:p>
          </table:table-cell>
        </table:table-row>
        <table:table-row>
          <table:table-cell table:style-name="Таблица5.A2" office:value-type="float" office:value="4.5">
            <text:p text:style-name="P50">4,5</text:p>
          </table:table-cell>
          <table:table-cell table:style-name="Таблица5.B2" office:value-type="float" office:value="690.712602138277">
            <text:p text:style-name="P50">691</text:p>
          </table:table-cell>
          <table:table-cell table:style-name="Таблица5.B2" office:value-type="float" office:value="478741.225902635">
            <text:p text:style-name="P50">478741</text:p>
          </table:table-cell>
          <table:table-cell table:style-name="Таблица5.B2" office:value-type="float" office:value="5348.5412265872">
            <text:p text:style-name="P50">5349</text:p>
          </table:table-cell>
          <table:table-cell table:style-name="Таблица5.B2" office:value-type="float" office:value="112179.052194321">
            <text:p text:style-name="P50">112179</text:p>
          </table:table-cell>
          <table:table-cell table:style-name="Таблица5.B2" office:value-type="float" office:value="29848.21124784">
            <text:p text:style-name="P50">29848</text:p>
          </table:table-cell>
          <table:table-cell table:style-name="Таблица5.B2" office:value-type="float" office:value="26403.8189265055">
            <text:p text:style-name="P50">26404</text:p>
          </table:table-cell>
          <table:table-cell table:style-name="Таблица5.H2" office:value-type="float" office:value="5635.94653767785">
            <text:p text:style-name="P50">5635,9</text:p>
          </table:table-cell>
        </table:table-row>
        <table:table-row>
          <table:table-cell table:style-name="Таблица5.A2" office:value-type="float" office:value="5">
            <text:p text:style-name="P50">5</text:p>
          </table:table-cell>
          <table:table-cell table:style-name="Таблица5.B2" office:value-type="float" office:value="751.455681384203">
            <text:p text:style-name="P50">751</text:p>
          </table:table-cell>
          <table:table-cell table:style-name="Таблица5.B2" office:value-type="float" office:value="531934.695447373">
            <text:p text:style-name="P50">531935</text:p>
          </table:table-cell>
          <table:table-cell table:style-name="Таблица5.B2" office:value-type="float" office:value="5442.84094457629">
            <text:p text:style-name="P50">5443</text:p>
          </table:table-cell>
          <table:table-cell table:style-name="Таблица5.B2" office:value-type="float" office:value="114156.872414463">
            <text:p text:style-name="P50">114157</text:p>
          </table:table-cell>
          <table:table-cell table:style-name="Таблица5.B2" office:value-type="float" office:value="32473.141291919">
            <text:p text:style-name="P50">32473</text:p>
          </table:table-cell>
          <table:table-cell table:style-name="Таблица5.B2" office:value-type="float" office:value="26728.8302324428">
            <text:p text:style-name="P50">26729</text:p>
          </table:table-cell>
          <table:table-cell table:style-name="Таблица5.H2" office:value-type="float" office:value="5538.30117664003">
            <text:p text:style-name="P35">5538,3</text:p>
          </table:table-cell>
        </table:table-row>
      </table:table>
      <text:p text:style-name="Standard"/>
      <text:p text:style-name="P51"><draw:frame draw:style-name="fr7" draw:name="Врезка4" text:anchor-type="as-char" svg:width="16.499cm" draw:z-index="160"><draw:text-box fo:min-height="11.43cm"><text:p text:style-name="Drawing"><draw:frame draw:style-name="fr8" draw:name="Изображение7" text:anchor-type="paragraph" svg:width="16.499cm" style:rel-width="100%" svg:height="11.43cm" style:rel-height="scale" draw:z-index="161"><draw:image xlink:href="Pictures/2000004C00003370000023AF93148AA0.svm" xlink:type="simple" xlink:show="embed" xlink:actuate="onLoad" draw:mime-type="image/x-svm"/><draw:image xlink:href="Pictures/10000000000001F30000015AA6B41371.png" xlink:type="simple" xlink:show="embed" xlink:actuate="onLoad" draw:mime-type="image/png"/></draw:frame>Рисунок <text:sequence text:ref-name="refDrawing3" text:name="Drawing" text:formula="ooow:Drawing+1" style:num-format="1">3</text:sequence><text:s/>– Число Рейнолдса</text:p></draw:text-box></draw:frame></text:p>
      <text:p text:style-name="P51"><text:soft-page-break/><draw:frame draw:style-name="fr7" draw:name="Врезка5" text:anchor-type="as-char" svg:width="16.499cm" draw:z-index="166"><draw:text-box fo:min-height="11.49cm"><text:p text:style-name="Drawing"><draw:frame draw:style-name="fr8" draw:name="Изображение8" text:anchor-type="paragraph" svg:width="16.499cm" style:rel-width="100%" svg:height="11.49cm" style:rel-height="scale" draw:z-index="167"><draw:image xlink:href="Pictures/2000005C0000333A000023AF6BB58A45.svm" xlink:type="simple" xlink:show="embed" xlink:actuate="onLoad" draw:mime-type="image/x-svm"/><draw:image xlink:href="Pictures/10000000000001F10000015ADDB8410E.png" xlink:type="simple" xlink:show="embed" xlink:actuate="onLoad" draw:mime-type="image/png"/></draw:frame>Рисунок <text:sequence text:ref-name="refDrawing4" text:name="Drawing" text:formula="ooow:Drawing+1" style:num-format="1">4</text:sequence><text:s/>– Коэффициенты теплообмена</text:p></draw:text-box></draw:frame></text:p>
      <text:p text:style-name="P51"/>
      <text:p text:style-name="P51"><draw:frame draw:style-name="fr7" draw:name="Врезка6" text:anchor-type="as-char" svg:width="16.499cm" draw:z-index="162"><draw:text-box fo:min-height="11.231cm"><text:p text:style-name="Drawing"><draw:frame draw:style-name="fr8" draw:name="Изображение9" text:anchor-type="paragraph" svg:width="16.499cm" style:rel-width="100%" svg:height="11.231cm" style:rel-height="scale" draw:z-index="163"><draw:image xlink:href="Pictures/2000005200003462000023AF43BF50A9.svm" xlink:type="simple" xlink:show="embed" xlink:actuate="onLoad" draw:mime-type="image/x-svm"/><draw:image xlink:href="Pictures/10000000000001FC0000015A6060830A.png" xlink:type="simple" xlink:show="embed" xlink:actuate="onLoad" draw:mime-type="image/png"/></draw:frame>Рисунок <text:sequence text:ref-name="refDrawing5" text:name="Drawing" text:formula="ooow:Drawing+1" style:num-format="1">5</text:sequence><text:s/>– Коэффициент теплопередачи</text:p></draw:text-box></draw:frame></text:p>
      <text:p text:style-name="P51"><text:soft-page-break/><draw:frame draw:style-name="fr7" draw:name="Врезка7" text:anchor-type="as-char" svg:width="16.499cm" draw:z-index="168"><draw:text-box fo:min-height="11.381cm"><text:p text:style-name="Drawing"><draw:frame draw:style-name="fr8" draw:name="Изображение10" text:anchor-type="paragraph" svg:width="16.499cm" style:rel-width="100%" svg:height="11.381cm" style:rel-height="scale" draw:z-index="169"><draw:image xlink:href="Pictures/20000055000033A6000023AF4EDD557A.svm" xlink:type="simple" xlink:show="embed" xlink:actuate="onLoad" draw:mime-type="image/x-svm"/><draw:image xlink:href="Pictures/10000000000001F50000015A3961138D.png" xlink:type="simple" xlink:show="embed" xlink:actuate="onLoad" draw:mime-type="image/png"/></draw:frame>Рисунок <text:sequence text:ref-name="refDrawing6" text:name="Drawing" text:formula="ooow:Drawing+1" style:num-format="1">6</text:sequence><text:s/>– Тепловой поток</text:p></draw:text-box></draw:frame></text:p>
      <text:p text:style-name="P51"/>
      <text:p text:style-name="P51"><draw:frame draw:style-name="fr7" draw:name="Врезка8" text:anchor-type="as-char" svg:width="16.499cm" draw:z-index="164"><draw:text-box fo:min-height="11.19cm"><text:p text:style-name="Drawing"><draw:frame draw:style-name="fr8" draw:name="Изображение11" text:anchor-type="paragraph" svg:width="16.499cm" style:rel-width="100%" svg:height="11.19cm" style:rel-height="scale" draw:z-index="165"><draw:image xlink:href="Pictures/2000005900003498000023AF870F2DED.svm" xlink:type="simple" xlink:show="embed" xlink:actuate="onLoad" draw:mime-type="image/x-svm"/><draw:image xlink:href="Pictures/10000000000001FE0000015A26F8F678.png" xlink:type="simple" xlink:show="embed" xlink:actuate="onLoad" draw:mime-type="image/png"/></draw:frame>Рисунок <text:sequence text:ref-name="refDrawing7" text:name="Drawing" text:formula="ooow:Drawing+1" style:num-format="1">7</text:sequence><text:s/>– Площадь поверхности теплообмена</text:p></draw:text-box></draw:frame></text:p>
      <text:list xml:id="list235509126384344" text:continue-numbering="true" text:style-name="Numbering_20_123">
        <text:list-item>
          <text:p text:style-name="P52"><text:bookmark-start text:name="__RefHeading___Toc3294_953335161"/>Конструкционный расчет парогенератора<text:bookmark-end text:name="__RefHeading___Toc3294_953335161"/></text:p>
        </text:list-item>
      </text:list>
      <text:p text:style-name="P53"><text:span text:style-name="T34">Цель расчета:</text:span><text:span text:style-name="T3"> </text:span></text:p>
      <text:list text:style-name="L1">
        <text:list-item>
          <text:p text:style-name="P54">определение габаритных размеров корпуса,</text:p>
        </text:list-item>
        <text:list-item>
          <text:p text:style-name="P54">разбивка трубного пучка,</text:p>
        </text:list-item>
        <text:list-item>
          <text:p text:style-name="P54">размещение поверхности теплообмена в корпусе,</text:p>
        </text:list-item>
        <text:list-item>
          <text:p text:style-name="P54">уточнение размеров коллекторов.</text:p>
        </text:list-item>
      </text:list>
      <text:list xml:id="list235508693221449" text:continue-list="list235509126384344" text:style-name="Numbering_20_123">
        <text:list-item>
          <text:list>
            <text:list-item>
              <text:h text:style-name="Heading_20_2" text:outline-level="2"><text:bookmark-start text:name="__RefHeading___Toc2911_953335161"/>Алгоритм конструкционного расчета<text:bookmark-end text:name="__RefHeading___Toc2911_953335161"/></text:h>
              <text:list>
                <text:list-item>
                  <text:h text:style-name="Heading_20_3" text:outline-level="3"><text:bookmark-start text:name="__RefHeading___Toc2913_953335161"/>Определение количества трубок и их рядов<text:bookmark-end text:name="__RefHeading___Toc2913_953335161"/></text:h>
                </text:list-item>
              </text:list>
            </text:list-item>
          </text:list>
        </text:list-item>
      </text:list>
      <text:p text:style-name="Standard">Из уравнения неразрывности необходимая площадь проходного сечения всех трубок поверхности теплообмена, м²:</text:p>
      <text:p text:style-name="P55"><draw:frame draw:style-name="fr6" draw:name="Объект111" text:anchor-type="as-char" svg:y="-0.684cm" svg:width="5.858cm" svg:height="1.131cm" draw:z-index="116"><draw:object xlink:href="./Object 111" xlink:type="simple" xlink:show="embed" xlink:actuate="onLoad"/><draw:image xlink:href="./ObjectReplacements/Object 111" xlink:type="simple" xlink:show="embed" xlink:actuate="onLoad"/></draw:frame>.</text:p>
      <text:p text:style-name="Standard">Площадь проходного сечения одной трубки, м²:</text:p>
      <text:p text:style-name="P56"><draw:frame draw:style-name="fr6" draw:name="Объект113" text:anchor-type="as-char" svg:y="-0.744cm" svg:width="11.437cm" svg:height="1.127cm" draw:z-index="117"><draw:object xlink:href="./Object 113" xlink:type="simple" xlink:show="embed" xlink:actuate="onLoad"/><draw:image xlink:href="./ObjectReplacements/Object 113" xlink:type="simple" xlink:show="embed" xlink:actuate="onLoad"/></draw:frame>.</text:p>
      <text:p text:style-name="P57"><text:span text:style-name="T35">Необходимо задаться следующими параметрами трубного пучка:</text:span></text:p>
      <text:list text:style-name="L2">
        <text:list-item>
          <text:p text:style-name="P58">горизонтальный шаг по поверхности коллекторов <text:span text:style-name="T36">S</text:span><text:span text:style-name="T37">1min</text:span><text:span text:style-name="T38"> = 21,6 </text:span><text:span text:style-name="T39">мм</text:span></text:p>
        </text:list-item>
        <text:list-item>
          <text:p text:style-name="P59">горизонтальный шаг <text:span text:style-name="T13">S</text:span><text:span text:style-name="T40">1</text:span><text:span text:style-name="T13"> </text:span><text:span text:style-name="T41">= </text:span>24,0 мм; </text:p>
        </text:list-item>
        <text:list-item>
          <text:p text:style-name="P60">вертикальный шаг <text:span text:style-name="T13">S</text:span><text:span text:style-name="T42">2</text:span>=21,6 мм.</text:p>
        </text:list-item>
      </text:list>
      <text:p text:style-name="P61"><draw:frame draw:style-name="fr9" draw:name="Врезка1" text:anchor-type="char" svg:x="0cm" svg:y="0.153cm" svg:width="16.18cm" draw:z-index="146"><draw:text-box fo:min-height="9.871cm"><text:p text:style-name="Drawing"><draw:frame draw:style-name="fr10" draw:name="Изображение1" text:anchor-type="paragraph" svg:width="12.136cm" style:rel-width="75%" svg:height="8.849cm" style:rel-height="scale" draw:z-index="147"><draw:image xlink:href="Pictures/10000000000002BA00000204DE5E6809.png" xlink:type="simple" xlink:show="embed" xlink:actuate="onLoad" draw:mime-type="image/png"/></draw:frame>Рисунок <text:sequence text:ref-name="refDrawing0" text:name="Drawing" text:formula="ooow:Drawing+1" style:num-format="1">8</text:sequence><text:s/>– Компоновка трубного пучка на коллекторах теплоносителя.</text:p></draw:text-box></draw:frame></text:p>
      <text:p text:style-name="P62"/>
      <text:p text:style-name="P62"><text:soft-page-break/>Число трубок поверхности теплообмена:</text:p>
      <text:p text:style-name="P56"><draw:frame draw:style-name="fr6" draw:name="Объект117" text:anchor-type="as-char" svg:y="-0.684cm" svg:width="5.879cm" svg:height="1.131cm" draw:z-index="118"><draw:object xlink:href="./Object 117" xlink:type="simple" xlink:show="embed" xlink:actuate="onLoad"/><draw:image xlink:href="./ObjectReplacements/Object 117" xlink:type="simple" xlink:show="embed" xlink:actuate="onLoad"/></draw:frame></text:p>
      <text:p text:style-name="Standard">Число трубок в горизонтальной плоскости (по внутренней окружности коллектора):</text:p>
      <text:p text:style-name="P56"><draw:frame draw:style-name="fr6" draw:name="Объект118" text:anchor-type="as-char" svg:y="-0.744cm" svg:width="4.706cm" svg:height="1.191cm" draw:z-index="119"><draw:object xlink:href="./Object 118" xlink:type="simple" xlink:show="embed" xlink:actuate="onLoad"/><draw:image xlink:href="./ObjectReplacements/Object 118" xlink:type="simple" xlink:show="embed" xlink:actuate="onLoad"/></draw:frame>.</text:p>
      <text:p text:style-name="P51" loext:marker-style-name="T43"><text:span text:style-name="T43"><draw:frame draw:style-name="fr11" draw:name="Объект145" text:anchor-type="as-char" svg:y="-0.379cm" svg:width="0.353cm" svg:height="0.534cm" draw:z-index="143"><draw:object xlink:href="./Object 145" xlink:type="simple" xlink:show="embed" xlink:actuate="onLoad"/><draw:image xlink:href="./ObjectReplacements/Object 145" xlink:type="simple" xlink:show="embed" xlink:actuate="onLoad"/></draw:frame></text:span><text:s/><text:span text:style-name="T35">необходимо округлить </text:span>до ближайшего чётного: <text:span text:style-name="T43"><draw:frame draw:style-name="fr11" draw:name="Объект144" text:anchor-type="as-char" svg:y="-0.379cm" svg:width="0.353cm" svg:height="0.534cm" draw:z-index="142"><draw:object xlink:href="./Object 144" xlink:type="simple" xlink:show="embed" xlink:actuate="onLoad"/><draw:image xlink:href="./ObjectReplacements/Object 144" xlink:type="simple" xlink:show="embed" xlink:actuate="onLoad"/></draw:frame></text:span>=120 шт.</text:p>
      <text:p text:style-name="Standard">Число горизонтальных рядов (число труб в одном вертикальном ряду):</text:p>
      <text:p text:style-name="P56"><draw:frame draw:style-name="fr6" draw:name="Объект119" text:anchor-type="as-char" svg:y="-0.621cm" svg:width="4.189cm" svg:height="1.067cm" draw:z-index="120"><draw:object xlink:href="./Object 119" xlink:type="simple" xlink:show="embed" xlink:actuate="onLoad"/><draw:image xlink:href="./ObjectReplacements/Object 119" xlink:type="simple" xlink:show="embed" xlink:actuate="onLoad"/></draw:frame></text:p>
      <text:p text:style-name="P63" loext:marker-style-name="T43"><text:span text:style-name="T43"><draw:frame draw:style-name="fr11" draw:name="Объект112" text:anchor-type="as-char" svg:y="-0.379cm" svg:width="0.356cm" svg:height="0.534cm" draw:z-index="144"><draw:object xlink:href="./Object 112" xlink:type="simple" xlink:show="embed" xlink:actuate="onLoad"/><draw:image xlink:href="./ObjectReplacements/Object 112" xlink:type="simple" xlink:show="embed" xlink:actuate="onLoad"/><svg:desc>формула</svg:desc></draw:frame></text:span><text:s/><text:span text:style-name="T35">необходимо округлить </text:span>до ближайшего чётного: <text:span text:style-name="T43"><draw:frame draw:style-name="fr11" draw:name="Объект116" text:anchor-type="as-char" svg:y="-0.379cm" svg:width="0.356cm" svg:height="0.534cm" draw:z-index="145"><draw:object xlink:href="./Object 116" xlink:type="simple" xlink:show="embed" xlink:actuate="onLoad"/><draw:image xlink:href="./ObjectReplacements/Object 116" xlink:type="simple" xlink:show="embed" xlink:actuate="onLoad"/><svg:desc>формула</svg:desc></draw:frame></text:span>=1<text:span text:style-name="T35">33</text:span> шт.</text:p>
      <text:p text:style-name="Standard">Уточняем общее число трубок:</text:p>
      <text:p text:style-name="P56"><draw:frame draw:style-name="fr6" draw:name="Объект120" text:anchor-type="as-char" svg:y="-0.379cm" svg:width="5.466cm" svg:height="0.534cm" draw:z-index="121"><draw:object xlink:href="./Object 120" xlink:type="simple" xlink:show="embed" xlink:actuate="onLoad"/><draw:image xlink:href="./ObjectReplacements/Object 120" xlink:type="simple" xlink:show="embed" xlink:actuate="onLoad"/></draw:frame></text:p>
      <text:p text:style-name="P64"/>
      <text:list xml:id="list235508949226770" text:continue-list="list235508693221449" text:style-name="Numbering_20_123">
        <text:list-item>
          <text:list>
            <text:list-item>
              <text:list>
                <text:list-item>
                  <text:h text:style-name="Heading_20_3" text:outline-level="3"><text:bookmark-start text:name="__RefHeading___Toc2915_953335161"/>Определение внутреннего диаметра корпуса ПГ<text:bookmark-end text:name="__RefHeading___Toc2915_953335161"/></text:h>
                </text:list-item>
              </text:list>
            </text:list-item>
          </text:list>
        </text:list-item>
      </text:list>
      <text:p text:style-name="Standard">Высота трубного пучка:</text:p>
      <text:p text:style-name="P56" loext:marker-style-name="T15"><text:span text:style-name="T15"><draw:frame draw:style-name="fr6" draw:name="Объект121" text:anchor-type="as-char" svg:y="-0.388cm" svg:width="13.335cm" svg:height="0.543cm" draw:z-index="122"><draw:object xlink:href="./Object 121" xlink:type="simple" xlink:show="embed" xlink:actuate="onLoad"/><draw:image xlink:href="./ObjectReplacements/Object 121" xlink:type="simple" xlink:show="embed" xlink:actuate="onLoad"/></draw:frame></text:span></text:p>
      <text:p text:style-name="P65">Принимаем остальные высоты:</text:p>
      <text:p text:style-name="P66"><text:span text:style-name="T13">h</text:span>1<text:span text:style-name="T44">​</text:span>=450 мм – от нижней образующей корпуса до нижнего ряда труб; <text:span text:style-name="T13">h</text:span>3<text:span text:style-name="T44">​</text:span>=200 мм – от верхнего ряда труб до зеркала испарения; <text:span text:style-name="T13">h</text:span>4<text:span text:style-name="T44">​</text:span>=600 мм – высота парового пространства; <text:span text:style-name="T13">h</text:span>5<text:span text:style-name="T44">​</text:span>=400 мм – от низа сепарационных устройств до верхней образующей.</text:p>
      <text:p text:style-name="P67"><text:span text:style-name="T45">Также н</text:span><text:span text:style-name="T35">еобходимо задаться следующими параметрами:</text:span></text:p>
      <text:list text:style-name="L3">
        <text:list-item>
          <text:p text:style-name="P68">Z<text:span text:style-name="T21">кор</text:span><text:span text:style-name="T46"> = 3 </text:span><text:span text:style-name="T47">– количество вертикальных межпакетных коридоров трубного пучка</text:span><text:span text:style-name="T46">;</text:span><text:span text:style-name="T48">­</text:span></text:p>
        </text:list-item>
        <text:list-item>
          <text:p text:style-name="P69"><text:span text:style-name="T15">b</text:span><text:span text:style-name="T21">св1</text:span><text:span text:style-name="T46"> = </text:span><text:span text:style-name="T48">130 мм </text:span><text:span text:style-name="T49">– </text:span><text:span text:style-name="T50">ш</text:span><text:span text:style-name="T49">ирина вертикальных коридоров между пакетами труб</text:span></text:p>
        </text:list-item>
        <text:list-item>
          <text:p text:style-name="P70"><text:span text:style-name="T51">b</text:span><text:span text:style-name="T52">св2</text:span><text:span text:style-name="T53"> = </text:span><text:span text:style-name="T48">230 мм –</text:span><text:span text:style-name="T54"> ширина свободного пространства между крайними пакетами труб и обечайкой корпуса ПГ</text:span></text:p>
        </text:list-item>
      </text:list>
      <text:p text:style-name="Standard">Внутренний диаметр корпуса по высоте:</text:p>
      <text:p text:style-name="P56" loext:marker-style-name="T15"><draw:frame draw:style-name="fr6" draw:name="Объект122" text:anchor-type="as-char" svg:y="-0.379cm" svg:width="10.679cm" svg:height="0.534cm" draw:z-index="123"><draw:object xlink:href="./Object 122" xlink:type="simple" xlink:show="embed" xlink:actuate="onLoad"/><draw:image xlink:href="./ObjectReplacements/Object 122" xlink:type="simple" xlink:show="embed" xlink:actuate="onLoad"/></draw:frame></text:p>
      <text:p text:style-name="Standard">Суммарное свободное пространство в диаметральной плоскости (коридоры):</text:p>
      <text:p text:style-name="P56"><draw:frame draw:style-name="fr6" draw:name="Объект123" text:anchor-type="as-char" svg:y="-0.379cm" svg:width="9.809cm" svg:height="0.534cm" draw:z-index="124"><draw:object xlink:href="./Object 123" xlink:type="simple" xlink:show="embed" xlink:actuate="onLoad"/><draw:image xlink:href="./ObjectReplacements/Object 123" xlink:type="simple" xlink:show="embed" xlink:actuate="onLoad"/></draw:frame></text:p>
      <text:p text:style-name="Standard">Диаметр корпуса по ширине:</text:p>
      <text:p text:style-name="P56"><draw:frame draw:style-name="fr6" draw:name="Объект124" text:anchor-type="as-char" svg:y="-0.388cm" svg:width="13.301cm" svg:height="0.543cm" draw:z-index="125"><draw:object xlink:href="./Object 124" xlink:type="simple" xlink:show="embed" xlink:actuate="onLoad"/><draw:image xlink:href="./ObjectReplacements/Object 124" xlink:type="simple" xlink:show="embed" xlink:actuate="onLoad"/></draw:frame></text:p>
      <text:p text:style-name="Standard">В качестве внутреннего диаметра принимается наибольшее:</text:p>
      <text:p text:style-name="P56" loext:marker-style-name="T15"><text:soft-page-break/><draw:frame draw:style-name="fr6" draw:name="Объект125" text:anchor-type="as-char" svg:y="-0.388cm" svg:width="4.8cm" svg:height="0.543cm" draw:z-index="126"><draw:object xlink:href="./Object 125" xlink:type="simple" xlink:show="embed" xlink:actuate="onLoad"/><draw:image xlink:href="./ObjectReplacements/Object 125" xlink:type="simple" xlink:show="embed" xlink:actuate="onLoad"/></draw:frame></text:p>
      <text:p text:style-name="Standard">Невязка между <text:span text:style-name="T13">D</text:span>1<text:span text:style-name="T44">​</text:span> и <text:span text:style-name="T13">D</text:span>2<text:span text:style-name="T44">​</text:span> составляет:</text:p>
      <text:p text:style-name="P56"><draw:frame draw:style-name="fr6" draw:name="Объект126" text:anchor-type="as-char" svg:y="-0.693cm" svg:width="13.06cm" svg:height="1.076cm" draw:z-index="127"><draw:object xlink:href="./Object 126" xlink:type="simple" xlink:show="embed" xlink:actuate="onLoad"/><draw:image xlink:href="./ObjectReplacements/Object 126" xlink:type="simple" xlink:show="embed" xlink:actuate="onLoad"/></draw:frame></text:p>
      <text:p text:style-name="P64"/>
      <text:list xml:id="list235508105276167" text:continue-list="list235508949226770" text:style-name="Numbering_20_123">
        <text:list-item>
          <text:list>
            <text:list-item>
              <text:list>
                <text:list-item>
                  <text:h text:style-name="Heading_20_3" text:outline-level="3"><text:bookmark-start text:name="__RefHeading___Toc2917_953335161"/>Определение длины трубок ПТО<text:bookmark-end text:name="__RefHeading___Toc2917_953335161"/></text:h>
                </text:list-item>
              </text:list>
            </text:list-item>
          </text:list>
        </text:list-item>
      </text:list>
      <text:p text:style-name="Standard">Среднюю (расчетную) длину трубок определяем из фактической площади поверхности теплообмена:</text:p>
      <text:p text:style-name="P56"><draw:frame draw:style-name="fr6" draw:name="Объект127" text:anchor-type="as-char" svg:y="-0.684cm" svg:width="8.343cm" svg:height="1.191cm" draw:z-index="128"><draw:object xlink:href="./Object 127" xlink:type="simple" xlink:show="embed" xlink:actuate="onLoad"/><draw:image xlink:href="./ObjectReplacements/Object 127" xlink:type="simple" xlink:show="embed" xlink:actuate="onLoad"/></draw:frame></text:p>
      <text:p text:style-name="Standard">Радиусы гиба:</text:p>
      <text:list text:style-name="L4">
        <text:list-item>
          <text:p text:style-name="P71">минимальный <draw:frame draw:style-name="fr11" draw:name="Объект128" text:anchor-type="as-char" svg:y="-0.684cm" svg:width="4.376cm" svg:height="1.067cm" draw:z-index="148"><draw:object xlink:href="./Object 128" xlink:type="simple" xlink:show="embed" xlink:actuate="onLoad"/><draw:image xlink:href="./ObjectReplacements/Object 128" xlink:type="simple" xlink:show="embed" xlink:actuate="onLoad"/></draw:frame></text:p>
        </text:list-item>
        <text:list-item>
          <text:p text:style-name="P71">максимальный <draw:frame draw:style-name="fr11" draw:name="Объект146" text:anchor-type="as-char" svg:y="-0.684cm" svg:width="7.726cm" svg:height="1.067cm" draw:z-index="149"><draw:object xlink:href="./Object 146" xlink:type="simple" xlink:show="embed" xlink:actuate="onLoad"/><draw:image xlink:href="./ObjectReplacements/Object 146" xlink:type="simple" xlink:show="embed" xlink:actuate="onLoad"/></draw:frame></text:p>
        </text:list-item>
        <text:list-item>
          <text:p text:style-name="P71">средний <draw:frame draw:style-name="fr11" draw:name="Объект147" text:anchor-type="as-char" svg:y="-0.684cm" svg:width="9.373cm" svg:height="1.067cm" draw:z-index="150"><draw:object xlink:href="./Object 147" xlink:type="simple" xlink:show="embed" xlink:actuate="onLoad"/><draw:image xlink:href="./ObjectReplacements/Object 147" xlink:type="simple" xlink:show="embed" xlink:actuate="onLoad"/></draw:frame>.</text:p>
        </text:list-item>
      </text:list>
      <text:p text:style-name="Standard">Длина прямого участка:</text:p>
      <text:p text:style-name="P56"><draw:frame draw:style-name="fr6" draw:name="Объект129" text:anchor-type="as-char" svg:y="-0.684cm" svg:width="8.25cm" svg:height="1.067cm" draw:z-index="129"><draw:object xlink:href="./Object 129" xlink:type="simple" xlink:show="embed" xlink:actuate="onLoad"/><draw:image xlink:href="./ObjectReplacements/Object 129" xlink:type="simple" xlink:show="embed" xlink:actuate="onLoad"/></draw:frame></text:p>
      <text:p text:style-name="Standard">Длина самой длинной трубки</text:p>
      <text:p text:style-name="P56"><draw:frame draw:style-name="fr11" draw:name="Объект148" text:anchor-type="as-char" svg:y="-0.379cm" svg:width="12.836cm" svg:height="0.534cm" draw:z-index="155"><draw:object xlink:href="./Object 148" xlink:type="simple" xlink:show="embed" xlink:actuate="onLoad"/><draw:image xlink:href="./ObjectReplacements/Object 148" xlink:type="simple" xlink:show="embed" xlink:actuate="onLoad"/></draw:frame></text:p>
      <text:p text:style-name="P56"><draw:frame draw:style-name="fr6" draw:name="Объект131" text:anchor-type="as-char" svg:y="-0.379cm" svg:width="11.753cm" svg:height="0.534cm" draw:z-index="130"><draw:object xlink:href="./Object 131" xlink:type="simple" xlink:show="embed" xlink:actuate="onLoad"/><draw:image xlink:href="./ObjectReplacements/Object 131" xlink:type="simple" xlink:show="embed" xlink:actuate="onLoad"/></draw:frame></text:p>
      <text:p text:style-name="Standard">Длина самой короткой трубки:</text:p>
      <text:p text:style-name="P56"><draw:frame draw:style-name="fr6" draw:name="Объект132" text:anchor-type="as-char" svg:y="-0.379cm" svg:width="10.313cm" svg:height="0.534cm" draw:z-index="131"><draw:object xlink:href="./Object 132" xlink:type="simple" xlink:show="embed" xlink:actuate="onLoad"/><draw:image xlink:href="./ObjectReplacements/Object 132" xlink:type="simple" xlink:show="embed" xlink:actuate="onLoad"/></draw:frame></text:p>
      <text:p text:style-name="P64"/>
      <text:list text:continue-list="list235508105276167" text:style-name="Numbering_20_123">
        <text:list-item>
          <text:list>
            <text:list-item>
              <text:list>
                <text:list-item>
                  <text:h text:style-name="Heading_20_3" text:outline-level="3"><text:bookmark-start text:name="__RefHeading___Toc2919_953335161"/>Определение длины корпуса ПГ<text:bookmark-end text:name="__RefHeading___Toc2919_953335161"/></text:h>
                </text:list-item>
              </text:list>
            </text:list-item>
          </text:list>
        </text:list-item>
      </text:list>
      <text:p text:style-name="Standard">Длина цилиндрической обечайки:</text:p>
      <text:p text:style-name="P56"><draw:frame draw:style-name="fr6" draw:name="Объект133" text:anchor-type="as-char" svg:y="-0.439cm" svg:width="10.469cm" svg:height="0.594cm" draw:z-index="132"><draw:object xlink:href="./Object 133" xlink:type="simple" xlink:show="embed" xlink:actuate="onLoad"/><draw:image xlink:href="./ObjectReplacements/Object 133" xlink:type="simple" xlink:show="embed" xlink:actuate="onLoad"/></draw:frame></text:p>
      <text:p text:style-name="Standard">Глубина эллиптического днища:</text:p>
      <text:p text:style-name="P56"><draw:frame draw:style-name="fr6" draw:name="Объект134" text:anchor-type="as-char" svg:y="-0.379cm" svg:width="7.294cm" svg:height="0.534cm" draw:z-index="133"><draw:object xlink:href="./Object 134" xlink:type="simple" xlink:show="embed" xlink:actuate="onLoad"/><draw:image xlink:href="./ObjectReplacements/Object 134" xlink:type="simple" xlink:show="embed" xlink:actuate="onLoad"/></draw:frame></text:p>
      <text:p text:style-name="Standard">Длина корпуса без учёта толщины стенок:</text:p>
      <text:p text:style-name="P56"><draw:frame draw:style-name="fr6" draw:name="Объект135" text:anchor-type="as-char" svg:y="-0.379cm" svg:width="6.782cm" svg:height="0.534cm" draw:z-index="134"><draw:object xlink:href="./Object 135" xlink:type="simple" xlink:show="embed" xlink:actuate="onLoad"/><draw:image xlink:href="./ObjectReplacements/Object 135" xlink:type="simple" xlink:show="embed" xlink:actuate="onLoad"/></draw:frame></text:p>
      <text:p text:style-name="Standard">Продольный шаг коллекторов:</text:p>
      <text:p text:style-name="P56"><draw:frame draw:style-name="fr6" draw:name="Объект136" text:anchor-type="as-char" svg:y="-0.439cm" svg:width="5.655cm" svg:height="0.594cm" draw:z-index="135"><draw:object xlink:href="./Object 136" xlink:type="simple" xlink:show="embed" xlink:actuate="onLoad"/><draw:image xlink:href="./ObjectReplacements/Object 136" xlink:type="simple" xlink:show="embed" xlink:actuate="onLoad"/></draw:frame></text:p>
      <text:p text:style-name="Standard">Поперечный шаг:</text:p>
      <text:p text:style-name="P56"><draw:frame draw:style-name="fr6" draw:name="Объект137" text:anchor-type="as-char" svg:y="-0.684cm" svg:width="8.338cm" svg:height="1.067cm" draw:z-index="136"><draw:object xlink:href="./Object 137" xlink:type="simple" xlink:show="embed" xlink:actuate="onLoad"/><draw:image xlink:href="./ObjectReplacements/Object 137" xlink:type="simple" xlink:show="embed" xlink:actuate="onLoad"/></draw:frame></text:p>
      <text:p text:style-name="Standard"><text:soft-page-break/>Длина центральной обечайки (с учётом минимально допустимого расстояния):</text:p>
      <text:p text:style-name="P56"><draw:frame draw:style-name="fr6" draw:name="Объект138" text:anchor-type="as-char" svg:y="-0.439cm" svg:width="9.16cm" svg:height="0.594cm" draw:z-index="137"><draw:object xlink:href="./Object 138" xlink:type="simple" xlink:show="embed" xlink:actuate="onLoad"/><draw:image xlink:href="./ObjectReplacements/Object 138" xlink:type="simple" xlink:show="embed" xlink:actuate="onLoad"/></draw:frame></text:p>
      <text:p text:style-name="Standard">Длина крайних обечаек:</text:p>
      <text:p text:style-name="P56"><draw:frame draw:style-name="fr6" draw:name="Объект139" text:anchor-type="as-char" svg:y="-0.684cm" svg:width="7.417cm" svg:height="1.067cm" draw:z-index="138"><draw:object xlink:href="./Object 139" xlink:type="simple" xlink:show="embed" xlink:actuate="onLoad"/><draw:image xlink:href="./ObjectReplacements/Object 139" xlink:type="simple" xlink:show="embed" xlink:actuate="onLoad"/></draw:frame></text:p>
      <text:p text:style-name="P72" loext:marker-style-name="T3"/>
      <text:list text:continue-numbering="true" text:style-name="Numbering_20_123">
        <text:list-item>
          <text:list>
            <text:list-item>
              <text:list>
                <text:list-item>
                  <text:h text:style-name="Heading_20_3" text:outline-level="3"><text:bookmark-start text:name="__RefHeading___Toc2921_953335161"/>Определение размеров патрубков на корпусе ПГ<text:bookmark-end text:name="__RefHeading___Toc2921_953335161"/></text:h>
                </text:list-item>
              </text:list>
            </text:list-item>
          </text:list>
        </text:list-item>
      </text:list>
      <text:p text:style-name="Standard">Внутренний диаметр патрубка подвода питательной воды:</text:p>
      <text:p text:style-name="P56"><draw:frame draw:style-name="fr6" draw:name="Объект140" text:anchor-type="as-char" svg:y="-0.781cm" svg:width="8.985cm" svg:height="1.228cm" draw:z-index="139"><draw:object xlink:href="./Object 140" xlink:type="simple" xlink:show="embed" xlink:actuate="onLoad"/><draw:image xlink:href="./ObjectReplacements/Object 140" xlink:type="simple" xlink:show="embed" xlink:actuate="onLoad"/></draw:frame>,</text:p>
      <text:p text:style-name="P64"><text:span text:style-name="T55">где </text:span><text:span text:style-name="T13">w</text:span><text:span text:style-name="T42">ПВ</text:span> =5 м/с – скорость питательной воды в трубопроводе.</text:p>
      <text:p text:style-name="Standard">Внутренний диаметр патрубка отвода пара</text:p>
      <text:p text:style-name="P56"><draw:frame draw:style-name="fr6" draw:name="Объект142" text:anchor-type="as-char" svg:y="-0.781cm" svg:width="10.356cm" svg:height="1.228cm" draw:z-index="140"><draw:object xlink:href="./Object 142" xlink:type="simple" xlink:show="embed" xlink:actuate="onLoad"/><draw:image xlink:href="./ObjectReplacements/Object 142" xlink:type="simple" xlink:show="embed" xlink:actuate="onLoad"/></draw:frame>,</text:p>
      <text:p text:style-name="P73"><text:span text:style-name="T55">где </text:span><text:span text:style-name="T13">w</text:span><text:span text:style-name="T42">П</text:span> = <text:span text:style-name="T55">1</text:span>5 м/с – скорость питательной воды в трубопроводе; <text:span text:style-name="T56">n</text:span><text:span text:style-name="T42">П</text:span> = <text:span text:style-name="T57">10</text:span> – количество патрубков отвода пара.</text:p>
      <text:p text:style-name="Standard">Внутренний диаметр патрубков коллекторов теплоносителя: text</text:p>
      <text:p text:style-name="P56"><draw:frame draw:style-name="fr6" draw:name="Объект143" text:anchor-type="as-char" svg:y="-0.439cm" svg:width="5.84cm" svg:height="0.594cm" draw:z-index="141"><draw:object xlink:href="./Object 143" xlink:type="simple" xlink:show="embed" xlink:actuate="onLoad"/><draw:image xlink:href="./ObjectReplacements/Object 143" xlink:type="simple" xlink:show="embed" xlink:actuate="onLoad"/></draw:frame></text:p>
      <text:p text:style-name="P64">Результаты конструкционного расчёта для всех скоростей сведены в таблицу 6.</text:p>
      <text:p text:style-name="P14">Таблица <text:sequence text:ref-name="refTable5" text:name="Table" text:formula="ooow:Table+1" style:num-format="1">6</text:sequence><text:s/>– Результаты конструкционного расчета ПГ</text:p>
      <table:table table:name="Таблица6" table:style-name="Таблица6">
        <table:table-column table:style-name="Таблица6.A"/>
        <table:table-column table:style-name="Таблица6.B"/>
        <table:table-column table:style-name="Таблица6.C"/>
        <table:table-column table:style-name="Таблица6.D" table:number-columns-repeated="2"/>
        <table:table-column table:style-name="Таблица6.F"/>
        <table:table-column table:style-name="Таблица6.D"/>
        <table:table-column table:style-name="Таблица6.F"/>
        <table:table-header-rows>
          <table:table-row table:style-name="Таблица6.1">
            <table:table-cell table:style-name="Таблица6.A1" table:number-rows-spanned="2" office:value-type="string">
              <text:p text:style-name="P74"/>
              <text:p text:style-name="P74">Величина</text:p>
            </table:table-cell>
            <table:table-cell table:style-name="Таблица6.A1" table:number-rows-spanned="2" office:value-type="string">
              <text:p text:style-name="P74"/>
              <text:p text:style-name="P74">Единица измерения</text:p>
            </table:table-cell>
            <table:table-cell table:style-name="Таблица6.C1" table:number-columns-spanned="6" office:value-type="string">
              <text:p text:style-name="P74">Скорость теплоносителя, м/с</text:p>
            </table:table-cell>
            <table:covered-table-cell/>
            <table:covered-table-cell/>
            <table:covered-table-cell/>
            <table:covered-table-cell/>
            <table:covered-table-cell/>
          </table:table-row>
          <table:table-row table:style-name="Таблица6.1">
            <table:covered-table-cell table:style-name="Таблица6.A2"/>
            <table:covered-table-cell table:style-name="Таблица6.A2"/>
            <table:table-cell table:style-name="Таблица6.C2" office:value-type="float" office:value="2.5">
              <text:p text:style-name="P74">2,5</text:p>
            </table:table-cell>
            <table:table-cell table:style-name="Таблица6.C2" office:value-type="float" office:value="3">
              <text:p text:style-name="P74">3</text:p>
            </table:table-cell>
            <table:table-cell table:style-name="Таблица6.C2" office:value-type="float" office:value="3.5">
              <text:p text:style-name="P74">3,5</text:p>
            </table:table-cell>
            <table:table-cell table:style-name="Таблица6.C2" office:value-type="float" office:value="4">
              <text:p text:style-name="P74">4</text:p>
            </table:table-cell>
            <table:table-cell table:style-name="Таблица6.C2" office:value-type="float" office:value="4.5">
              <text:p text:style-name="P74">4,5</text:p>
            </table:table-cell>
            <table:table-cell table:style-name="Таблица6.H2" office:value-type="float" office:value="5">
              <text:p text:style-name="P74">5</text:p>
            </table:table-cell>
          </table:table-row>
        </table:table-header-rows>
        <table:table-row>
          <table:table-cell table:style-name="Таблица6.A2" office:value-type="string">
            <text:p text:style-name="P35">S1min</text:p>
          </table:table-cell>
          <table:table-cell table:style-name="Таблица6.A2" office:value-type="string">
            <text:p text:style-name="P35">мм</text:p>
          </table:table-cell>
          <table:table-cell table:style-name="Таблица6.C2" office:value-type="float" office:value="21.6">
            <text:p text:style-name="P35">21,6</text:p>
          </table:table-cell>
          <table:table-cell table:style-name="Таблица6.C2" office:value-type="float" office:value="21.6">
            <text:p text:style-name="P35">21,6</text:p>
          </table:table-cell>
          <table:table-cell table:style-name="Таблица6.C2" office:value-type="float" office:value="21.6">
            <text:p text:style-name="P35">21,6</text:p>
          </table:table-cell>
          <table:table-cell table:style-name="Таблица6.C2" office:value-type="float" office:value="21.6">
            <text:p text:style-name="P35">21,6</text:p>
          </table:table-cell>
          <table:table-cell table:style-name="Таблица6.C2" office:value-type="float" office:value="21.6">
            <text:p text:style-name="P35">21,6</text:p>
          </table:table-cell>
          <table:table-cell table:style-name="Таблица6.H2" office:value-type="float" office:value="21.6">
            <text:p text:style-name="P35">21,6</text:p>
          </table:table-cell>
        </table:table-row>
        <table:table-row>
          <table:table-cell table:style-name="Таблица6.A2" office:value-type="string">
            <text:p text:style-name="P35">S1</text:p>
          </table:table-cell>
          <table:table-cell table:style-name="Таблица6.A2" office:value-type="string">
            <text:p text:style-name="P35">мм</text:p>
          </table:table-cell>
          <table:table-cell table:style-name="Таблица6.C2" office:value-type="float" office:value="24">
            <text:p text:style-name="P35">24</text:p>
          </table:table-cell>
          <table:table-cell table:style-name="Таблица6.C2" office:value-type="float" office:value="24">
            <text:p text:style-name="P35">24</text:p>
          </table:table-cell>
          <table:table-cell table:style-name="Таблица6.C2" office:value-type="float" office:value="24">
            <text:p text:style-name="P35">24</text:p>
          </table:table-cell>
          <table:table-cell table:style-name="Таблица6.C2" office:value-type="float" office:value="24">
            <text:p text:style-name="P35">24</text:p>
          </table:table-cell>
          <table:table-cell table:style-name="Таблица6.C2" office:value-type="float" office:value="24">
            <text:p text:style-name="P35">24</text:p>
          </table:table-cell>
          <table:table-cell table:style-name="Таблица6.H2" office:value-type="float" office:value="24">
            <text:p text:style-name="P35">24</text:p>
          </table:table-cell>
        </table:table-row>
        <table:table-row>
          <table:table-cell table:style-name="Таблица6.A2" office:value-type="string">
            <text:p text:style-name="P35">S2</text:p>
          </table:table-cell>
          <table:table-cell table:style-name="Таблица6.A2" office:value-type="string">
            <text:p text:style-name="P35">мм</text:p>
          </table:table-cell>
          <table:table-cell table:style-name="Таблица6.C2" office:value-type="float" office:value="21.6">
            <text:p text:style-name="P35">21,6</text:p>
          </table:table-cell>
          <table:table-cell table:style-name="Таблица6.C2" office:value-type="float" office:value="21.6">
            <text:p text:style-name="P35">21,6</text:p>
          </table:table-cell>
          <table:table-cell table:style-name="Таблица6.C2" office:value-type="float" office:value="21.6">
            <text:p text:style-name="P35">21,6</text:p>
          </table:table-cell>
          <table:table-cell table:style-name="Таблица6.C2" office:value-type="float" office:value="21.6">
            <text:p text:style-name="P35">21,6</text:p>
          </table:table-cell>
          <table:table-cell table:style-name="Таблица6.C2" office:value-type="float" office:value="21.6">
            <text:p text:style-name="P35">21,6</text:p>
          </table:table-cell>
          <table:table-cell table:style-name="Таблица6.H2" office:value-type="float" office:value="21.6">
            <text:p text:style-name="P35">21,6</text:p>
          </table:table-cell>
        </table:table-row>
        <table:table-row>
          <table:table-cell table:style-name="Таблица6.A2" office:value-type="string">
            <text:p text:style-name="P35">n</text:p>
          </table:table-cell>
          <table:table-cell table:style-name="Таблица6.A2" office:value-type="string">
            <text:p text:style-name="P35">шт.</text:p>
          </table:table-cell>
          <table:table-cell table:style-name="Таблица6.C2" office:value-type="float" office:value="15960">
            <text:p text:style-name="P35">15960</text:p>
          </table:table-cell>
          <table:table-cell table:style-name="Таблица6.C2" office:value-type="float" office:value="13320">
            <text:p text:style-name="P35">13320</text:p>
          </table:table-cell>
          <table:table-cell table:style-name="Таблица6.C2" office:value-type="float" office:value="11400">
            <text:p text:style-name="P35">11400</text:p>
          </table:table-cell>
          <table:table-cell table:style-name="Таблица6.C2" office:value-type="float" office:value="9960">
            <text:p text:style-name="P35">9960</text:p>
          </table:table-cell>
          <table:table-cell table:style-name="Таблица6.C2" office:value-type="float" office:value="8880">
            <text:p text:style-name="P35">8880</text:p>
          </table:table-cell>
          <table:table-cell table:style-name="Таблица6.H2" office:value-type="float" office:value="8040">
            <text:p text:style-name="P35">8040</text:p>
          </table:table-cell>
        </table:table-row>
        <table:table-row>
          <table:table-cell table:style-name="Таблица6.A2" office:value-type="string">
            <text:p text:style-name="P35">n1</text:p>
          </table:table-cell>
          <table:table-cell table:style-name="Таблица6.A2" office:value-type="string">
            <text:p text:style-name="P35">шт.</text:p>
          </table:table-cell>
          <table:table-cell table:style-name="Таблица6.C2" office:value-type="float" office:value="120">
            <text:p text:style-name="P35">120</text:p>
          </table:table-cell>
          <table:table-cell table:style-name="Таблица6.C2" office:value-type="float" office:value="120">
            <text:p text:style-name="P35">120</text:p>
          </table:table-cell>
          <table:table-cell table:style-name="Таблица6.C2" office:value-type="float" office:value="120">
            <text:p text:style-name="P35">120</text:p>
          </table:table-cell>
          <table:table-cell table:style-name="Таблица6.C2" office:value-type="float" office:value="120">
            <text:p text:style-name="P35">120</text:p>
          </table:table-cell>
          <table:table-cell table:style-name="Таблица6.C2" office:value-type="float" office:value="120">
            <text:p text:style-name="P35">120</text:p>
          </table:table-cell>
          <table:table-cell table:style-name="Таблица6.H2" office:value-type="float" office:value="120">
            <text:p text:style-name="P35">120</text:p>
          </table:table-cell>
        </table:table-row>
        <table:table-row>
          <table:table-cell table:style-name="Таблица6.A2" office:value-type="string">
            <text:p text:style-name="P35">n2</text:p>
          </table:table-cell>
          <table:table-cell table:style-name="Таблица6.A2" office:value-type="string">
            <text:p text:style-name="P35">шт.</text:p>
          </table:table-cell>
          <table:table-cell table:style-name="Таблица6.C2" office:value-type="float" office:value="133">
            <text:p text:style-name="P35">133</text:p>
          </table:table-cell>
          <table:table-cell table:style-name="Таблица6.C2" office:value-type="float" office:value="111">
            <text:p text:style-name="P35">111</text:p>
          </table:table-cell>
          <table:table-cell table:style-name="Таблица6.C2" office:value-type="float" office:value="95">
            <text:p text:style-name="P35">95</text:p>
          </table:table-cell>
          <table:table-cell table:style-name="Таблица6.C2" office:value-type="float" office:value="83">
            <text:p text:style-name="P35">83</text:p>
          </table:table-cell>
          <table:table-cell table:style-name="Таблица6.C2" office:value-type="float" office:value="74">
            <text:p text:style-name="P35">74</text:p>
          </table:table-cell>
          <table:table-cell table:style-name="Таблица6.H2" office:value-type="float" office:value="67">
            <text:p text:style-name="P35">67</text:p>
          </table:table-cell>
        </table:table-row>
        <table:table-row>
          <table:table-cell table:style-name="Таблица6.A2" office:value-type="string">
            <text:p text:style-name="P35">Lср</text:p>
          </table:table-cell>
          <table:table-cell table:style-name="Таблица6.A2" office:value-type="string">
            <text:p text:style-name="P35">м</text:p>
          </table:table-cell>
          <table:table-cell table:style-name="Таблица6.C9" office:value-type="float" office:value="7.92573987474731">
            <text:p text:style-name="P35">7,93</text:p>
          </table:table-cell>
          <table:table-cell table:style-name="Таблица6.C9" office:value-type="float" office:value="9.10710113987185">
            <text:p text:style-name="P35">9,11</text:p>
          </table:table-cell>
          <table:table-cell table:style-name="Таблица6.C9" office:value-type="float" office:value="10.3039919204893">
            <text:p text:style-name="P35">10,30</text:p>
          </table:table-cell>
          <table:table-cell table:style-name="Таблица6.C9" office:value-type="float" office:value="11.4955394422598">
            <text:p text:style-name="P35">11,50</text:p>
          </table:table-cell>
          <table:table-cell table:style-name="Таблица6.C9" office:value-type="float" office:value="12.6265308343621">
            <text:p text:style-name="P35">12,63</text:p>
          </table:table-cell>
          <table:table-cell table:style-name="Таблица6.H9" office:value-type="float" office:value="13.7041046112239">
            <text:p text:style-name="P35">13,70</text:p>
          </table:table-cell>
        </table:table-row>
        <table:table-row>
          <table:table-cell table:style-name="Таблица6.A2" office:value-type="string">
            <text:p text:style-name="P35">Lмакс</text:p>
          </table:table-cell>
          <table:table-cell table:style-name="Таблица6.A2" office:value-type="string">
            <text:p text:style-name="P35">м</text:p>
          </table:table-cell>
          <table:table-cell table:style-name="Таблица6.C9" office:value-type="float" office:value="12.8084984624091">
            <text:p text:style-name="P35">12,81</text:p>
          </table:table-cell>
          <table:table-cell table:style-name="Таблица6.C9" office:value-type="float" office:value="13.3792955999198">
            <text:p text:style-name="P35">13,38</text:p>
          </table:table-cell>
          <table:table-cell table:style-name="Таблица6.C9" office:value-type="float" office:value="14.1442925976357">
            <text:p text:style-name="P35">14,14</text:p>
          </table:table-cell>
          <table:table-cell table:style-name="Таблица6.C9" office:value-type="float" office:value="15.3358401194063">
            <text:p text:style-name="P35">15,34</text:p>
          </table:table-cell>
          <table:table-cell table:style-name="Таблица6.G10" office:value-type="float" office:value="16.4668315115085">
            <text:p text:style-name="P75">16,47</text:p>
          </table:table-cell>
          <table:table-cell table:style-name="Таблица6.H10" office:value-type="float" office:value="17.5444052883703">
            <text:p text:style-name="P75">17,54</text:p>
          </table:table-cell>
        </table:table-row>
        <table:table-row>
          <table:table-cell table:style-name="Таблица6.A2" office:value-type="string">
            <text:p text:style-name="P35">Lмин</text:p>
          </table:table-cell>
          <table:table-cell table:style-name="Таблица6.A2" office:value-type="string">
            <text:p text:style-name="P35">м</text:p>
          </table:table-cell>
          <table:table-cell table:style-name="Таблица6.C9" office:value-type="float" office:value="6.63998128708553">
            <text:p text:style-name="P35">6,64</text:p>
          </table:table-cell>
          <table:table-cell table:style-name="Таблица6.C9" office:value-type="float" office:value="7.95690667982386">
            <text:p text:style-name="P35">7,96</text:p>
          </table:table-cell>
          <table:table-cell table:style-name="Таблица6.C9" office:value-type="float" office:value="9.24969124334283">
            <text:p text:style-name="P35">9,25</text:p>
          </table:table-cell>
          <table:table-cell table:style-name="Таблица6.C9" office:value-type="float" office:value="10.4412387651134">
            <text:p text:style-name="P35">10,44</text:p>
          </table:table-cell>
          <table:table-cell table:style-name="Таблица6.C9" office:value-type="float" office:value="11.5722301572156">
            <text:p text:style-name="P35">11,57</text:p>
          </table:table-cell>
          <table:table-cell table:style-name="Таблица6.H9" office:value-type="float" office:value="12.6498039340774">
            <text:p text:style-name="P35">12,65</text:p>
          </table:table-cell>
        </table:table-row>
        <table:table-row>
          <table:table-cell table:style-name="Таблица6.A2" office:value-type="string">
            <text:p text:style-name="P35">Lкорп</text:p>
          </table:table-cell>
          <table:table-cell table:style-name="Таблица6.A2" office:value-type="string">
            <text:p text:style-name="P35">мм</text:p>
          </table:table-cell>
          <table:table-cell table:style-name="Таблица6.C2" office:value-type="float" office:value="11600">
            <text:p text:style-name="P35">11600</text:p>
          </table:table-cell>
          <table:table-cell table:style-name="Таблица6.C2" office:value-type="float" office:value="12490">
            <text:p text:style-name="P35">12490</text:p>
          </table:table-cell>
          <table:table-cell table:style-name="Таблица6.C2" office:value-type="float" office:value="13480">
            <text:p text:style-name="P35">13480</text:p>
          </table:table-cell>
          <table:table-cell table:style-name="Таблица6.C2" office:value-type="float" office:value="14672">
            <text:p text:style-name="P35">14672</text:p>
          </table:table-cell>
          <table:table-cell table:style-name="Таблица6.C2" office:value-type="float" office:value="15803">
            <text:p text:style-name="P35">15803</text:p>
          </table:table-cell>
          <table:table-cell table:style-name="Таблица6.H2" office:value-type="float" office:value="16881">
            <text:p text:style-name="P35">16881</text:p>
          </table:table-cell>
        </table:table-row>
        <text:soft-page-break/>
        <table:table-row>
          <table:table-cell table:style-name="Таблица6.A2" office:value-type="string">
            <text:p text:style-name="P35">h1</text:p>
          </table:table-cell>
          <table:table-cell table:style-name="Таблица6.A2" office:value-type="string">
            <text:p text:style-name="P35">мм</text:p>
          </table:table-cell>
          <table:table-cell table:style-name="Таблица6.C2" office:value-type="float" office:value="450">
            <text:p text:style-name="P35">450</text:p>
          </table:table-cell>
          <table:table-cell table:style-name="Таблица6.C2" office:value-type="float" office:value="450">
            <text:p text:style-name="P35">450</text:p>
          </table:table-cell>
          <table:table-cell table:style-name="Таблица6.C2" office:value-type="float" office:value="450">
            <text:p text:style-name="P35">450</text:p>
          </table:table-cell>
          <table:table-cell table:style-name="Таблица6.C2" office:value-type="float" office:value="450">
            <text:p text:style-name="P35">450</text:p>
          </table:table-cell>
          <table:table-cell table:style-name="Таблица6.C2" office:value-type="float" office:value="450">
            <text:p text:style-name="P35">450</text:p>
          </table:table-cell>
          <table:table-cell table:style-name="Таблица6.H2" office:value-type="float" office:value="450">
            <text:p text:style-name="P35">450</text:p>
          </table:table-cell>
        </table:table-row>
        <table:table-row>
          <table:table-cell table:style-name="Таблица6.A2" office:value-type="string">
            <text:p text:style-name="P35">h1*</text:p>
          </table:table-cell>
          <table:table-cell table:style-name="Таблица6.A2" office:value-type="string">
            <text:p text:style-name="P35">мм</text:p>
          </table:table-cell>
          <table:table-cell table:style-name="Таблица6.C2" office:value-type="float" office:value="450">
            <text:p text:style-name="P35">450</text:p>
          </table:table-cell>
          <table:table-cell table:style-name="Таблица6.C2" office:value-type="float" office:value="450">
            <text:p text:style-name="P35">450</text:p>
          </table:table-cell>
          <table:table-cell table:style-name="Таблица6.C2" office:value-type="float" office:value="450">
            <text:p text:style-name="P35">450</text:p>
          </table:table-cell>
          <table:table-cell table:style-name="Таблица6.C2" office:value-type="float" office:value="450">
            <text:p text:style-name="P35">450</text:p>
          </table:table-cell>
          <table:table-cell table:style-name="Таблица6.C2" office:value-type="float" office:value="450">
            <text:p text:style-name="P35">450</text:p>
          </table:table-cell>
          <table:table-cell table:style-name="Таблица6.H2" office:value-type="float" office:value="450">
            <text:p text:style-name="P35">450</text:p>
          </table:table-cell>
        </table:table-row>
        <table:table-row>
          <table:table-cell table:style-name="Таблица6.A2" office:value-type="string">
            <text:p text:style-name="P35">h2</text:p>
          </table:table-cell>
          <table:table-cell table:style-name="Таблица6.A2" office:value-type="string">
            <text:p text:style-name="P35">мм</text:p>
          </table:table-cell>
          <table:table-cell table:style-name="Таблица6.C2" office:value-type="float" office:value="2867">
            <text:p text:style-name="P35">2867</text:p>
          </table:table-cell>
          <table:table-cell table:style-name="Таблица6.C2" office:value-type="float" office:value="2392">
            <text:p text:style-name="P35">2392</text:p>
          </table:table-cell>
          <table:table-cell table:style-name="Таблица6.C2" office:value-type="float" office:value="2046">
            <text:p text:style-name="P35">2046</text:p>
          </table:table-cell>
          <table:table-cell table:style-name="Таблица6.C2" office:value-type="float" office:value="1787">
            <text:p text:style-name="P35">1787</text:p>
          </table:table-cell>
          <table:table-cell table:style-name="Таблица6.C2" office:value-type="float" office:value="1593">
            <text:p text:style-name="P35">1593</text:p>
          </table:table-cell>
          <table:table-cell table:style-name="Таблица6.H2" office:value-type="float" office:value="1442">
            <text:p text:style-name="P35">1442</text:p>
          </table:table-cell>
        </table:table-row>
        <table:table-row>
          <table:table-cell table:style-name="Таблица6.A2" office:value-type="string">
            <text:p text:style-name="P35">h3</text:p>
          </table:table-cell>
          <table:table-cell table:style-name="Таблица6.A2" office:value-type="string">
            <text:p text:style-name="P35">мм</text:p>
          </table:table-cell>
          <table:table-cell table:style-name="Таблица6.C2" office:value-type="float" office:value="200">
            <text:p text:style-name="P35">200</text:p>
          </table:table-cell>
          <table:table-cell table:style-name="Таблица6.C2" office:value-type="float" office:value="200">
            <text:p text:style-name="P35">200</text:p>
          </table:table-cell>
          <table:table-cell table:style-name="Таблица6.C2" office:value-type="float" office:value="200">
            <text:p text:style-name="P35">200</text:p>
          </table:table-cell>
          <table:table-cell table:style-name="Таблица6.C2" office:value-type="float" office:value="200">
            <text:p text:style-name="P35">200</text:p>
          </table:table-cell>
          <table:table-cell table:style-name="Таблица6.C2" office:value-type="float" office:value="200">
            <text:p text:style-name="P35">200</text:p>
          </table:table-cell>
          <table:table-cell table:style-name="Таблица6.H2" office:value-type="float" office:value="200">
            <text:p text:style-name="P35">200</text:p>
          </table:table-cell>
        </table:table-row>
        <table:table-row>
          <table:table-cell table:style-name="Таблица6.A2" office:value-type="string">
            <text:p text:style-name="P35">h4</text:p>
          </table:table-cell>
          <table:table-cell table:style-name="Таблица6.A2" office:value-type="string">
            <text:p text:style-name="P35">мм</text:p>
          </table:table-cell>
          <table:table-cell table:style-name="Таблица6.C2" office:value-type="float" office:value="600">
            <text:p text:style-name="P35">600</text:p>
          </table:table-cell>
          <table:table-cell table:style-name="Таблица6.C2" office:value-type="float" office:value="600">
            <text:p text:style-name="P35">600</text:p>
          </table:table-cell>
          <table:table-cell table:style-name="Таблица6.C2" office:value-type="float" office:value="600">
            <text:p text:style-name="P35">600</text:p>
          </table:table-cell>
          <table:table-cell table:style-name="Таблица6.C2" office:value-type="float" office:value="600">
            <text:p text:style-name="P35">600</text:p>
          </table:table-cell>
          <table:table-cell table:style-name="Таблица6.C2" office:value-type="float" office:value="600">
            <text:p text:style-name="P35">600</text:p>
          </table:table-cell>
          <table:table-cell table:style-name="Таблица6.H2" office:value-type="float" office:value="600">
            <text:p text:style-name="P35">600</text:p>
          </table:table-cell>
        </table:table-row>
        <table:table-row>
          <table:table-cell table:style-name="Таблица6.A2" office:value-type="string">
            <text:p text:style-name="P35">h5</text:p>
          </table:table-cell>
          <table:table-cell table:style-name="Таблица6.A2" office:value-type="string">
            <text:p text:style-name="P35">мм</text:p>
          </table:table-cell>
          <table:table-cell table:style-name="Таблица6.C2" office:value-type="float" office:value="400">
            <text:p text:style-name="P35">400</text:p>
          </table:table-cell>
          <table:table-cell table:style-name="Таблица6.C2" office:value-type="float" office:value="400">
            <text:p text:style-name="P35">400</text:p>
          </table:table-cell>
          <table:table-cell table:style-name="Таблица6.C2" office:value-type="float" office:value="400">
            <text:p text:style-name="P35">400</text:p>
          </table:table-cell>
          <table:table-cell table:style-name="Таблица6.C2" office:value-type="float" office:value="400">
            <text:p text:style-name="P35">400</text:p>
          </table:table-cell>
          <table:table-cell table:style-name="Таблица6.C2" office:value-type="float" office:value="400">
            <text:p text:style-name="P35">400</text:p>
          </table:table-cell>
          <table:table-cell table:style-name="Таблица6.H2" office:value-type="float" office:value="400">
            <text:p text:style-name="P35">400</text:p>
          </table:table-cell>
        </table:table-row>
        <table:table-row>
          <table:table-cell table:style-name="Таблица6.A2" office:value-type="string">
            <text:p text:style-name="P35">D1</text:p>
          </table:table-cell>
          <table:table-cell table:style-name="Таблица6.A2" office:value-type="string">
            <text:p text:style-name="P35">мм</text:p>
          </table:table-cell>
          <table:table-cell table:style-name="Таблица6.C2" office:value-type="float" office:value="3706">
            <text:p text:style-name="P35">3706</text:p>
          </table:table-cell>
          <table:table-cell table:style-name="Таблица6.C2" office:value-type="float" office:value="3706">
            <text:p text:style-name="P35">3706</text:p>
          </table:table-cell>
          <table:table-cell table:style-name="Таблица6.C2" office:value-type="float" office:value="3706">
            <text:p text:style-name="P35">3706</text:p>
          </table:table-cell>
          <table:table-cell table:style-name="Таблица6.C2" office:value-type="float" office:value="3706">
            <text:p text:style-name="P35">3706</text:p>
          </table:table-cell>
          <table:table-cell table:style-name="Таблица6.C2" office:value-type="float" office:value="3706">
            <text:p text:style-name="P35">3706</text:p>
          </table:table-cell>
          <table:table-cell table:style-name="Таблица6.H2" office:value-type="float" office:value="3706">
            <text:p text:style-name="P35">3706</text:p>
          </table:table-cell>
        </table:table-row>
        <table:table-row>
          <table:table-cell table:style-name="Таблица6.A2" office:value-type="string">
            <text:p text:style-name="P35">D2</text:p>
          </table:table-cell>
          <table:table-cell table:style-name="Таблица6.A2" office:value-type="string">
            <text:p text:style-name="P35">мм</text:p>
          </table:table-cell>
          <table:table-cell table:style-name="Таблица6.C2" office:value-type="float" office:value="4517">
            <text:p text:style-name="P35">4517</text:p>
          </table:table-cell>
          <table:table-cell table:style-name="Таблица6.C2" office:value-type="float" office:value="4042">
            <text:p text:style-name="P35">4042</text:p>
          </table:table-cell>
          <table:table-cell table:style-name="Таблица6.C2" office:value-type="float" office:value="3696">
            <text:p text:style-name="P35">3696</text:p>
          </table:table-cell>
          <table:table-cell table:style-name="Таблица6.C2" office:value-type="float" office:value="3437">
            <text:p text:style-name="P35">3437</text:p>
          </table:table-cell>
          <table:table-cell table:style-name="Таблица6.C2" office:value-type="float" office:value="3243">
            <text:p text:style-name="P35">3243</text:p>
          </table:table-cell>
          <table:table-cell table:style-name="Таблица6.H2" office:value-type="float" office:value="3092">
            <text:p text:style-name="P35">3092</text:p>
          </table:table-cell>
        </table:table-row>
        <table:table-row>
          <table:table-cell table:style-name="Таблица6.A2" office:value-type="string">
            <text:p text:style-name="P35">Dкорп</text:p>
          </table:table-cell>
          <table:table-cell table:style-name="Таблица6.A2" office:value-type="string">
            <text:p text:style-name="P35">мм</text:p>
          </table:table-cell>
          <table:table-cell table:style-name="Таблица6.C21" office:value-type="float" office:value="4517">
            <text:p text:style-name="P75">4517</text:p>
          </table:table-cell>
          <table:table-cell table:style-name="Таблица6.C2" office:value-type="float" office:value="4042">
            <text:p text:style-name="P35">4042</text:p>
          </table:table-cell>
          <table:table-cell table:style-name="Таблица6.C2" office:value-type="float" office:value="3706">
            <text:p text:style-name="P35">3706</text:p>
          </table:table-cell>
          <table:table-cell table:style-name="Таблица6.C2" office:value-type="float" office:value="3706">
            <text:p text:style-name="P35">3706</text:p>
          </table:table-cell>
          <table:table-cell table:style-name="Таблица6.C2" office:value-type="float" office:value="3706">
            <text:p text:style-name="P35">3706</text:p>
          </table:table-cell>
          <table:table-cell table:style-name="Таблица6.H2" office:value-type="float" office:value="3706">
            <text:p text:style-name="P35">3706</text:p>
          </table:table-cell>
        </table:table-row>
        <table:table-row>
          <table:table-cell table:style-name="Таблица6.A2" office:value-type="string">
            <text:p text:style-name="P35">ΔD</text:p>
          </table:table-cell>
          <table:table-cell table:style-name="Таблица6.A2" office:value-type="string">
            <text:p text:style-name="P35">%</text:p>
          </table:table-cell>
          <table:table-cell table:style-name="Таблица6.G10" office:value-type="float" office:value="17.9543945096303">
            <text:p text:style-name="P75">17,95</text:p>
          </table:table-cell>
          <table:table-cell table:style-name="Таблица6.C9" office:value-type="float" office:value="7.43856541952624">
            <text:p text:style-name="P35">7,44</text:p>
          </table:table-cell>
          <table:table-cell table:style-name="Таблица6.C9" office:value-type="float" office:value="0.221385875581138">
            <text:p text:style-name="P35">0,22</text:p>
          </table:table-cell>
          <table:table-cell table:style-name="Таблица6.C9" office:value-type="float" office:value="5.95528005313261">
            <text:p text:style-name="P35">5,96</text:p>
          </table:table-cell>
          <table:table-cell table:style-name="Таблица6.C9" office:value-type="float" office:value="10.2501660394067">
            <text:p text:style-name="P35">10,25</text:p>
          </table:table-cell>
          <table:table-cell table:style-name="Таблица6.H10" office:value-type="float" office:value="13.59">
            <text:p text:style-name="P75">13,59</text:p>
          </table:table-cell>
        </table:table-row>
        <table:table-row>
          <table:table-cell table:style-name="Таблица6.A2" office:value-type="string">
            <text:p text:style-name="P35">Zкор</text:p>
          </table:table-cell>
          <table:table-cell table:style-name="Таблица6.A2" office:value-type="string">
            <text:p text:style-name="P35">шт.</text:p>
          </table:table-cell>
          <table:table-cell table:style-name="Таблица6.C2" office:value-type="float" office:value="3">
            <text:p text:style-name="P35">3</text:p>
          </table:table-cell>
          <table:table-cell table:style-name="Таблица6.C2" office:value-type="float" office:value="3">
            <text:p text:style-name="P35">3</text:p>
          </table:table-cell>
          <table:table-cell table:style-name="Таблица6.C2" office:value-type="float" office:value="3">
            <text:p text:style-name="P35">3</text:p>
          </table:table-cell>
          <table:table-cell table:style-name="Таблица6.C2" office:value-type="float" office:value="3">
            <text:p text:style-name="P35">3</text:p>
          </table:table-cell>
          <table:table-cell table:style-name="Таблица6.C2" office:value-type="float" office:value="3">
            <text:p text:style-name="P35">3</text:p>
          </table:table-cell>
          <table:table-cell table:style-name="Таблица6.H2" office:value-type="float" office:value="3">
            <text:p text:style-name="P35">3</text:p>
          </table:table-cell>
        </table:table-row>
        <table:table-row>
          <table:table-cell table:style-name="Таблица6.A2" office:value-type="string">
            <text:p text:style-name="P35">bсв1</text:p>
          </table:table-cell>
          <table:table-cell table:style-name="Таблица6.A2" office:value-type="string">
            <text:p text:style-name="P35">мм</text:p>
          </table:table-cell>
          <table:table-cell table:style-name="Таблица6.C2" office:value-type="float" office:value="130">
            <text:p text:style-name="P35">130</text:p>
          </table:table-cell>
          <table:table-cell table:style-name="Таблица6.C2" office:value-type="float" office:value="130">
            <text:p text:style-name="P35">130</text:p>
          </table:table-cell>
          <table:table-cell table:style-name="Таблица6.C2" office:value-type="float" office:value="130">
            <text:p text:style-name="P35">130</text:p>
          </table:table-cell>
          <table:table-cell table:style-name="Таблица6.C2" office:value-type="float" office:value="130">
            <text:p text:style-name="P35">130</text:p>
          </table:table-cell>
          <table:table-cell table:style-name="Таблица6.C2" office:value-type="float" office:value="130">
            <text:p text:style-name="P35">130</text:p>
          </table:table-cell>
          <table:table-cell table:style-name="Таблица6.H2" office:value-type="float" office:value="130">
            <text:p text:style-name="P35">130</text:p>
          </table:table-cell>
        </table:table-row>
        <table:table-row>
          <table:table-cell table:style-name="Таблица6.A2" office:value-type="string">
            <text:p text:style-name="P35">bсв2</text:p>
          </table:table-cell>
          <table:table-cell table:style-name="Таблица6.A2" office:value-type="string">
            <text:p text:style-name="P35">мм</text:p>
          </table:table-cell>
          <table:table-cell table:style-name="Таблица6.C2" office:value-type="float" office:value="230">
            <text:p text:style-name="P35">230</text:p>
          </table:table-cell>
          <table:table-cell table:style-name="Таблица6.C2" office:value-type="float" office:value="230">
            <text:p text:style-name="P35">230</text:p>
          </table:table-cell>
          <table:table-cell table:style-name="Таблица6.C2" office:value-type="float" office:value="230">
            <text:p text:style-name="P35">230</text:p>
          </table:table-cell>
          <table:table-cell table:style-name="Таблица6.C2" office:value-type="float" office:value="230">
            <text:p text:style-name="P35">230</text:p>
          </table:table-cell>
          <table:table-cell table:style-name="Таблица6.C2" office:value-type="float" office:value="230">
            <text:p text:style-name="P35">230</text:p>
          </table:table-cell>
          <table:table-cell table:style-name="Таблица6.H2" office:value-type="float" office:value="230">
            <text:p text:style-name="P35">230</text:p>
          </table:table-cell>
        </table:table-row>
        <table:table-row>
          <table:table-cell table:style-name="Таблица6.A2" office:value-type="string">
            <text:p text:style-name="P35">bдн</text:p>
          </table:table-cell>
          <table:table-cell table:style-name="Таблица6.A2" office:value-type="string">
            <text:p text:style-name="P35">мм</text:p>
          </table:table-cell>
          <table:table-cell table:style-name="Таблица6.C2" office:value-type="float" office:value="903">
            <text:p text:style-name="P35">903</text:p>
          </table:table-cell>
          <table:table-cell table:style-name="Таблица6.C2" office:value-type="float" office:value="808">
            <text:p text:style-name="P35">808</text:p>
          </table:table-cell>
          <table:table-cell table:style-name="Таблица6.C2" office:value-type="float" office:value="741">
            <text:p text:style-name="P35">741</text:p>
          </table:table-cell>
          <table:table-cell table:style-name="Таблица6.C2" office:value-type="float" office:value="741">
            <text:p text:style-name="P35">741</text:p>
          </table:table-cell>
          <table:table-cell table:style-name="Таблица6.C2" office:value-type="float" office:value="741">
            <text:p text:style-name="P35">741</text:p>
          </table:table-cell>
          <table:table-cell table:style-name="Таблица6.H2" office:value-type="float" office:value="741">
            <text:p text:style-name="P35">741</text:p>
          </table:table-cell>
        </table:table-row>
        <table:table-row>
          <table:table-cell table:style-name="Таблица6.A2" office:value-type="string">
            <text:p text:style-name="P35">S1k</text:p>
          </table:table-cell>
          <table:table-cell table:style-name="Таблица6.A2" office:value-type="string">
            <text:p text:style-name="P35">мм</text:p>
          </table:table-cell>
          <table:table-cell table:style-name="Таблица6.C2" office:value-type="float" office:value="1650">
            <text:p text:style-name="P35">1650</text:p>
          </table:table-cell>
          <table:table-cell table:style-name="Таблица6.C2" office:value-type="float" office:value="1650">
            <text:p text:style-name="P35">1650</text:p>
          </table:table-cell>
          <table:table-cell table:style-name="Таблица6.C2" office:value-type="float" office:value="1650">
            <text:p text:style-name="P35">1650</text:p>
          </table:table-cell>
          <table:table-cell table:style-name="Таблица6.C2" office:value-type="float" office:value="1650">
            <text:p text:style-name="P35">1650</text:p>
          </table:table-cell>
          <table:table-cell table:style-name="Таблица6.C2" office:value-type="float" office:value="1650">
            <text:p text:style-name="P35">1650</text:p>
          </table:table-cell>
          <table:table-cell table:style-name="Таблица6.H2" office:value-type="float" office:value="1650">
            <text:p text:style-name="P35">1650</text:p>
          </table:table-cell>
        </table:table-row>
        <table:table-row>
          <table:table-cell table:style-name="Таблица6.A2" office:value-type="string">
            <text:p text:style-name="P35">S2k</text:p>
          </table:table-cell>
          <table:table-cell table:style-name="Таблица6.A2" office:value-type="string">
            <text:p text:style-name="P35">мм</text:p>
          </table:table-cell>
          <table:table-cell table:style-name="Таблица6.C2" office:value-type="float" office:value="2094">
            <text:p text:style-name="P35">2094</text:p>
          </table:table-cell>
          <table:table-cell table:style-name="Таблица6.C2" office:value-type="float" office:value="1856">
            <text:p text:style-name="P35">1856</text:p>
          </table:table-cell>
          <table:table-cell table:style-name="Таблица6.C2" office:value-type="float" office:value="1688">
            <text:p text:style-name="P35">1688</text:p>
          </table:table-cell>
          <table:table-cell table:style-name="Таблица6.C2" office:value-type="float" office:value="1688">
            <text:p text:style-name="P35">1688</text:p>
          </table:table-cell>
          <table:table-cell table:style-name="Таблица6.C2" office:value-type="float" office:value="1688">
            <text:p text:style-name="P35">1688</text:p>
          </table:table-cell>
          <table:table-cell table:style-name="Таблица6.H2" office:value-type="float" office:value="1688">
            <text:p text:style-name="P35">1688</text:p>
          </table:table-cell>
        </table:table-row>
        <table:table-row>
          <table:table-cell table:style-name="Таблица6.A2" office:value-type="string">
            <text:p text:style-name="P35">Lц.об</text:p>
          </table:table-cell>
          <table:table-cell table:style-name="Таблица6.A2" office:value-type="string">
            <text:p text:style-name="P35">мм</text:p>
          </table:table-cell>
          <table:table-cell table:style-name="Таблица6.C2" office:value-type="float" office:value="3630">
            <text:p text:style-name="P35">3630</text:p>
          </table:table-cell>
          <table:table-cell table:style-name="Таблица6.C2" office:value-type="float" office:value="3630">
            <text:p text:style-name="P35">3630</text:p>
          </table:table-cell>
          <table:table-cell table:style-name="Таблица6.C2" office:value-type="float" office:value="3999">
            <text:p text:style-name="P35">3999</text:p>
          </table:table-cell>
          <table:table-cell table:style-name="Таблица6.C2" office:value-type="float" office:value="4397">
            <text:p text:style-name="P35">4397</text:p>
          </table:table-cell>
          <table:table-cell table:style-name="Таблица6.C2" office:value-type="float" office:value="4774">
            <text:p text:style-name="P35">4774</text:p>
          </table:table-cell>
          <table:table-cell table:style-name="Таблица6.H2" office:value-type="float" office:value="5133">
            <text:p text:style-name="P35">5133</text:p>
          </table:table-cell>
        </table:table-row>
        <table:table-row>
          <table:table-cell table:style-name="Таблица6.A2" office:value-type="string">
            <text:p text:style-name="P35">Lкр.об</text:p>
          </table:table-cell>
          <table:table-cell table:style-name="Таблица6.A2" office:value-type="string">
            <text:p text:style-name="P35">мм</text:p>
          </table:table-cell>
          <table:table-cell table:style-name="Таблица6.C2" office:value-type="float" office:value="3082">
            <text:p text:style-name="P35">3082</text:p>
          </table:table-cell>
          <table:table-cell table:style-name="Таблица6.C2" office:value-type="float" office:value="3622">
            <text:p text:style-name="P35">3622</text:p>
          </table:table-cell>
          <table:table-cell table:style-name="Таблица6.C2" office:value-type="float" office:value="3999.5">
            <text:p text:style-name="P35">3999,5</text:p>
          </table:table-cell>
          <table:table-cell table:style-name="Таблица6.C2" office:value-type="float" office:value="4396.5">
            <text:p text:style-name="P35">4396,5</text:p>
          </table:table-cell>
          <table:table-cell table:style-name="Таблица6.C2" office:value-type="float" office:value="4773.5">
            <text:p text:style-name="P35">4773,5</text:p>
          </table:table-cell>
          <table:table-cell table:style-name="Таблица6.H2" office:value-type="float" office:value="5133">
            <text:p text:style-name="P35">5133</text:p>
          </table:table-cell>
        </table:table-row>
      </table:table>
      <text:p text:style-name="P64"/>
      <text:p text:style-name="P76"><text:soft-page-break/><draw:frame draw:style-name="fr12" draw:name="Врезка9" text:anchor-type="as-char" svg:y="-8.689cm" svg:width="16.499cm" draw:z-index="151"><draw:text-box fo:min-height="11.34cm"><text:p text:style-name="Drawing"><draw:frame draw:style-name="fr8" draw:name="Изображение3" text:anchor-type="paragraph" svg:width="16.499cm" style:rel-width="100%" svg:height="11.34cm" style:rel-height="scale" draw:z-index="152"><draw:image xlink:href="Pictures/20000054000033E4000023AF3017DA4B.svm" xlink:type="simple" xlink:show="embed" xlink:actuate="onLoad" draw:mime-type="image/x-svm"/><draw:image xlink:href="Pictures/10000000000001F70000015AFE3E8355.png" xlink:type="simple" xlink:show="embed" xlink:actuate="onLoad" draw:mime-type="image/png"/></draw:frame>Рисунок <text:sequence text:ref-name="refDrawing8" text:name="Drawing" text:formula="ooow:Drawing+1" style:num-format="1">9</text:sequence><text:s/>– Диаметр корпуса</text:p></draw:text-box></draw:frame></text:p>
      <text:p text:style-name="P76"/>
      <text:p text:style-name="P76"><draw:frame draw:style-name="fr7" draw:name="Врезка10" text:anchor-type="as-char" svg:width="16.499cm" draw:z-index="156"><draw:text-box fo:min-height="11.58cm"><text:p text:style-name="Drawing"><draw:frame draw:style-name="fr8" draw:name="Изображение4" text:anchor-type="paragraph" svg:width="16.499cm" style:rel-width="100%" svg:height="11.58cm" style:rel-height="scale" draw:z-index="157"><draw:image xlink:href="Pictures/2000004B000032BC000023AFE8E8B04B.svm" xlink:type="simple" xlink:show="embed" xlink:actuate="onLoad" draw:mime-type="image/x-svm"/><draw:image xlink:href="Pictures/10000000000001EC0000015A3E236C44.png" xlink:type="simple" xlink:show="embed" xlink:actuate="onLoad" draw:mime-type="image/png"/></draw:frame>Рисунок <text:sequence text:ref-name="refDrawing9" text:name="Drawing" text:formula="ooow:Drawing+1" style:num-format="1">10</text:sequence><text:s/>– Длина корпуса</text:p></draw:text-box></draw:frame></text:p>
      <text:p text:style-name="P76"><text:soft-page-break/><draw:frame draw:style-name="fr7" draw:name="Врезка11" text:anchor-type="as-char" svg:width="16.499cm" draw:z-index="153"><draw:text-box fo:min-height="11.52cm"><text:p text:style-name="Drawing"><draw:frame draw:style-name="fr8" draw:name="Изображение5" text:anchor-type="paragraph" svg:width="16.499cm" style:rel-width="100%" svg:height="11.52cm" style:rel-height="scale" draw:z-index="154"><draw:image xlink:href="Pictures/2000005000003304000023AFC1DE98B1.svm" xlink:type="simple" xlink:show="embed" xlink:actuate="onLoad" draw:mime-type="image/x-svm"/><draw:image xlink:href="Pictures/10000000000001EF0000015A537A2DA1.png" xlink:type="simple" xlink:show="embed" xlink:actuate="onLoad" draw:mime-type="image/png"/></draw:frame>Рисунок <text:sequence text:ref-name="refDrawing10" text:name="Drawing" text:formula="ooow:Drawing+1" style:num-format="1">11</text:sequence><text:s/>– Средняя длина трубок</text:p></draw:text-box></draw:frame></text:p>
      <text:p text:style-name="P76"/>
      <text:p text:style-name="P76"><draw:frame draw:style-name="fr7" draw:name="Врезка12" text:anchor-type="as-char" svg:width="16.499cm" draw:z-index="158"><draw:text-box fo:min-height="11.65cm"><text:p text:style-name="Drawing"><draw:frame draw:style-name="fr8" draw:name="Изображение6" text:anchor-type="paragraph" svg:width="16.499cm" style:rel-width="100%" svg:height="11.65cm" style:rel-height="scale" draw:z-index="159"><draw:image xlink:href="Pictures/200000530000326B000023AF06C78669.svm" xlink:type="simple" xlink:show="embed" xlink:actuate="onLoad" draw:mime-type="image/x-svm"/><draw:image xlink:href="Pictures/10000000000001E90000015A9D6470C3.png" xlink:type="simple" xlink:show="embed" xlink:actuate="onLoad" draw:mime-type="image/png"/></draw:frame>Рисунок <text:sequence text:ref-name="refDrawing11" text:name="Drawing" text:formula="ooow:Drawing+1" style:num-format="1">12</text:sequence><text:s/>– Количество трубок ПТО</text:p></draw:text-box></draw:frame></text:p>
      <text:list text:continue-numbering="true" text:style-name="Numbering_20_123">
        <text:list-item>
          <text:p text:style-name="P52"><text:bookmark-start text:name="__RefHeading___Toc10974_953335161"/>Гидравлический расчет ПГ<text:bookmark-end text:name="__RefHeading___Toc10974_953335161"/></text:p>
        </text:list-item>
      </text:list>
      <text:p text:style-name="Standard">Цель расчета: определение потерь давления теплоносителя, обусловленных суммарным гидравлическим сопротивлением элементов ПГ – коллекторов и трубок поверхности теплообмена.</text:p>
      <text:list text:continue-numbering="true" text:style-name="Numbering_20_123">
        <text:list-item>
          <text:list>
            <text:list-item>
              <text:h text:style-name="Heading_20_2" text:outline-level="2"><text:bookmark-start text:name="__RefHeading___Toc10972_953335161"/>Расчет гидравлических потерь по тракту теплоносителя<text:bookmark-end text:name="__RefHeading___Toc10972_953335161"/></text:h>
            </text:list-item>
          </text:list>
        </text:list-item>
      </text:list>
      <text:p text:style-name="P77">Площадь проходного сечения коллектора теплоносителя:</text:p>
      <text:p text:style-name="P78"><draw:frame draw:style-name="fr11" draw:name="Объект85" text:anchor-type="as-char" svg:y="-0.744cm" svg:width="6.394cm" svg:height="1.127cm" draw:z-index="181"><draw:object xlink:href="./Object 85" xlink:type="simple" xlink:show="embed" xlink:actuate="onLoad"/><draw:image xlink:href="./ObjectReplacements/Object 85" xlink:type="simple" xlink:show="embed" xlink:actuate="onLoad"/></draw:frame></text:p>
      <text:p text:style-name="P79">Горячий коллектор.</text:p>
      <text:p text:style-name="Standard">Скорость теплоносителя в горячем коллекторе:</text:p>
      <text:p text:style-name="P80"><draw:frame draw:style-name="fr11" draw:name="Объект141" text:anchor-type="as-char" svg:y="-0.684cm" svg:width="6.846cm" svg:height="1.191cm" draw:z-index="170"><draw:object xlink:href="./Object 141" xlink:type="simple" xlink:show="embed" xlink:actuate="onLoad"/><draw:image xlink:href="./ObjectReplacements/Object 141" xlink:type="simple" xlink:show="embed" xlink:actuate="onLoad"/></draw:frame>,</text:p>
      <text:p text:style-name="P81"><text:span text:style-name="T58">где </text:span><draw:frame draw:style-name="fr11" draw:name="Объект149" text:anchor-type="as-char" svg:y="-0.439cm" svg:width="2.461cm" svg:height="0.594cm" draw:z-index="171"><draw:object xlink:href="./Object 149" xlink:type="simple" xlink:show="embed" xlink:actuate="onLoad"/><draw:image xlink:href="./ObjectReplacements/Object 149" xlink:type="simple" xlink:show="embed" xlink:actuate="onLoad"/><svg:desc>формула</svg:desc></draw:frame><text:s/>определяется по температуре на входе в ПГ.</text:p>
      <text:p text:style-name="P77">Коэффициент, учитывающий потери в горячем коллекторе при торцевом подводе:</text:p>
      <text:p text:style-name="P78"><draw:frame draw:style-name="fr11" draw:name="Объект150" text:anchor-type="as-char" svg:y="-0.621cm" svg:width="9.065cm" svg:height="1.004cm" draw:z-index="180"><draw:object xlink:href="./Object 150" xlink:type="simple" xlink:show="embed" xlink:actuate="onLoad"/><draw:image xlink:href="./ObjectReplacements/Object 150" xlink:type="simple" xlink:show="embed" xlink:actuate="onLoad"/></draw:frame></text:p>
      <text:p text:style-name="Standard">Изменение напора при движении теплоносителя вдоль горячего коллектора:</text:p>
      <text:p text:style-name="P80"><draw:frame draw:style-name="fr11" draw:name="Объект151" text:anchor-type="as-char" svg:y="-0.744cm" svg:width="11.643cm" svg:height="1.127cm" draw:z-index="172"><draw:object xlink:href="./Object 151" xlink:type="simple" xlink:show="embed" xlink:actuate="onLoad"/><draw:image xlink:href="./ObjectReplacements/Object 151" xlink:type="simple" xlink:show="embed" xlink:actuate="onLoad"/></draw:frame></text:p>
      <text:p text:style-name="P82"><text:span text:style-name="T59">Холодный</text:span> коллектор.</text:p>
      <text:p text:style-name="P77">Скорость теплоносителя в <text:span text:style-name="T59">холодном</text:span> коллекторе:</text:p>
      <text:p text:style-name="P78"><draw:frame draw:style-name="fr11" draw:name="Объект153" text:anchor-type="as-char" svg:y="-0.684cm" svg:width="6.678cm" svg:height="1.191cm" draw:z-index="174"><draw:object xlink:href="./Object 153" xlink:type="simple" xlink:show="embed" xlink:actuate="onLoad"/><draw:image xlink:href="./ObjectReplacements/Object 153" xlink:type="simple" xlink:show="embed" xlink:actuate="onLoad"/><svg:desc>формула</svg:desc></draw:frame>,</text:p>
      <text:p text:style-name="P83"><text:span text:style-name="T58">где </text:span><draw:frame draw:style-name="fr11" draw:name="Объект154" text:anchor-type="as-char" svg:y="-0.439cm" svg:width="2.637cm" svg:height="0.594cm" draw:z-index="175"><draw:object xlink:href="./Object 154" xlink:type="simple" xlink:show="embed" xlink:actuate="onLoad"/><draw:image xlink:href="./ObjectReplacements/Object 154" xlink:type="simple" xlink:show="embed" xlink:actuate="onLoad"/><svg:desc>формула</svg:desc></draw:frame><text:s/>определяется по температуре на в<text:span text:style-name="T59">ы</text:span>ходе <text:span text:style-name="T59">из</text:span> ПГ.</text:p>
      <text:p text:style-name="Standard">Коэффициент, учитывающий потери в горячем коллекторе при торцевом подводе:</text:p>
      <text:p text:style-name="P78"><draw:frame draw:style-name="fr11" draw:name="Объект155" text:anchor-type="as-char" svg:y="-0.684cm" svg:width="8.345cm" svg:height="1.191cm" draw:z-index="176"><draw:object xlink:href="./Object 155" xlink:type="simple" xlink:show="embed" xlink:actuate="onLoad"/><draw:image xlink:href="./ObjectReplacements/Object 155" xlink:type="simple" xlink:show="embed" xlink:actuate="onLoad"/><svg:desc>формула</svg:desc></draw:frame></text:p>
      <text:p text:style-name="Standard"><text:soft-page-break/>Изменение напора при движении теплоносителя вдоль горячего коллектора:</text:p>
      <text:p text:style-name="P78"><draw:frame draw:style-name="fr11" draw:name="Объект152" text:anchor-type="as-char" svg:y="-0.744cm" svg:width="11.721cm" svg:height="1.127cm" draw:z-index="173"><draw:object xlink:href="./Object 152" xlink:type="simple" xlink:show="embed" xlink:actuate="onLoad"/><draw:image xlink:href="./ObjectReplacements/Object 152" xlink:type="simple" xlink:show="embed" xlink:actuate="onLoad"/><svg:desc>формула</svg:desc></draw:frame></text:p>
      <text:p text:style-name="P84">Суммарная потеря статического давления в коллекторах для трубы со средним расходом:</text:p>
      <text:p text:style-name="P80"><draw:frame draw:style-name="fr11" draw:name="Объект156" text:anchor-type="as-char" svg:y="-0.621cm" svg:width="9.218cm" svg:height="1.004cm" draw:z-index="177"><draw:object xlink:href="./Object 156" xlink:type="simple" xlink:show="embed" xlink:actuate="onLoad"/><draw:image xlink:href="./ObjectReplacements/Object 156" xlink:type="simple" xlink:show="embed" xlink:actuate="onLoad"/></draw:frame></text:p>
      <text:p text:style-name="P85"><text:span text:style-name="T60">Вход/выход из т</text:span>рубн<text:span text:style-name="T60">ого</text:span> пуч<text:span text:style-name="T60">ка</text:span> ПТО</text:p>
      <text:p text:style-name="P86">Площадь проходного сечения трубного пучка:</text:p>
      <text:p text:style-name="P80"><draw:frame draw:style-name="fr11" draw:name="Объект157" text:anchor-type="as-char" svg:y="-0.744cm" svg:width="8.278cm" svg:height="1.127cm" draw:z-index="178"><draw:object xlink:href="./Object 157" xlink:type="simple" xlink:show="embed" xlink:actuate="onLoad"/><draw:image xlink:href="./ObjectReplacements/Object 157" xlink:type="simple" xlink:show="embed" xlink:actuate="onLoad"/></draw:frame></text:p>
      <text:p text:style-name="P86">Скорость теплоносителя на входе в трубный пучок:</text:p>
      <text:p text:style-name="P80"><draw:frame draw:style-name="fr11" draw:name="Объект158" text:anchor-type="as-char" svg:y="-0.684cm" svg:width="6.858cm" svg:height="1.191cm" draw:z-index="179"><draw:object xlink:href="./Object 158" xlink:type="simple" xlink:show="embed" xlink:actuate="onLoad"/><draw:image xlink:href="./ObjectReplacements/Object 158" xlink:type="simple" xlink:show="embed" xlink:actuate="onLoad"/></draw:frame></text:p>
      <text:p text:style-name="Standard">Скорость теплоносителя на выходе из трубного пучка:</text:p>
      <text:p text:style-name="P80"><draw:frame draw:style-name="fr11" draw:name="Объект159" text:anchor-type="as-char" svg:y="-0.684cm" svg:width="7.036cm" svg:height="1.191cm" draw:z-index="182"><draw:object xlink:href="./Object 159" xlink:type="simple" xlink:show="embed" xlink:actuate="onLoad"/><draw:image xlink:href="./ObjectReplacements/Object 159" xlink:type="simple" xlink:show="embed" xlink:actuate="onLoad"/></draw:frame></text:p>
      <text:p text:style-name="P87">Местная потеря при входе в трубки ПТО ( <text:span text:style-name="T43"><draw:frame draw:style-name="fr11" draw:name="Объект161" text:anchor-type="as-char" svg:y="-0.439cm" svg:width="1.365cm" svg:height="0.594cm" draw:z-index="184"><draw:object xlink:href="./Object 161" xlink:type="simple" xlink:show="embed" xlink:actuate="onLoad"/><draw:image xlink:href="./ObjectReplacements/Object 161" xlink:type="simple" xlink:show="embed" xlink:actuate="onLoad"/></draw:frame></text:span>):</text:p>
      <text:p text:style-name="P80"><draw:frame draw:style-name="fr11" draw:name="Объект160" text:anchor-type="as-char" svg:y="-0.744cm" svg:width="10.592cm" svg:height="1.127cm" draw:z-index="183"><draw:object xlink:href="./Object 160" xlink:type="simple" xlink:show="embed" xlink:actuate="onLoad"/><draw:image xlink:href="./ObjectReplacements/Object 160" xlink:type="simple" xlink:show="embed" xlink:actuate="onLoad"/></draw:frame></text:p>
      <text:p text:style-name="P87">Местная потеря при в<text:span text:style-name="T61">ы</text:span>ходе <text:span text:style-name="T61">из</text:span> труб<text:span text:style-name="T61">ок</text:span> ПТО ( <text:span text:style-name="T43"><draw:frame draw:style-name="fr11" draw:name="Объект163" text:anchor-type="as-char" svg:y="-0.439cm" svg:width="1.512cm" svg:height="0.594cm" draw:z-index="186"><draw:object xlink:href="./Object 163" xlink:type="simple" xlink:show="embed" xlink:actuate="onLoad"/><draw:image xlink:href="./ObjectReplacements/Object 163" xlink:type="simple" xlink:show="embed" xlink:actuate="onLoad"/><svg:desc>формула</svg:desc></draw:frame></text:span>):</text:p>
      <text:p text:style-name="P88"><draw:frame draw:style-name="fr11" draw:name="Объект162" text:anchor-type="as-char" svg:y="-0.744cm" svg:width="11.072cm" svg:height="1.127cm" draw:z-index="185"><draw:object xlink:href="./Object 162" xlink:type="simple" xlink:show="embed" xlink:actuate="onLoad"/><draw:image xlink:href="./ObjectReplacements/Object 162" xlink:type="simple" xlink:show="embed" xlink:actuate="onLoad"/><svg:desc>формула</svg:desc></draw:frame></text:p>
      <text:p text:style-name="P85">Потери на трение в трубках</text:p>
      <text:p text:style-name="Text_20_body">Коэффициент гидравлического трения (формула для турбулентного режима):</text:p>
      <text:p text:style-name="P80"><draw:frame draw:style-name="fr11" draw:name="Объект164" text:anchor-type="as-char" svg:y="-0.621cm" svg:width="12.291cm" svg:height="1.946cm" draw:z-index="187"><draw:object xlink:href="./Object 164" xlink:type="simple" xlink:show="embed" xlink:actuate="onLoad"/><draw:image xlink:href="./ObjectReplacements/Object 164" xlink:type="simple" xlink:show="embed" xlink:actuate="onLoad"/></draw:frame>,</text:p>
      <text:p text:style-name="P89"><text:span text:style-name="T61">где </text:span><text:span text:style-name="T62"><draw:frame draw:style-name="fr11" draw:name="Объект165" text:anchor-type="as-char" svg:y="-0.439cm" svg:width="2.302cm" svg:height="0.594cm" draw:z-index="188"><draw:object xlink:href="./Object 165" xlink:type="simple" xlink:show="embed" xlink:actuate="onLoad"/><draw:image xlink:href="./ObjectReplacements/Object 165" xlink:type="simple" xlink:show="embed" xlink:actuate="onLoad"/></draw:frame></text:span><text:span text:style-name="T61"><text:s/>– абсолютная шероховатость аустенитной стали.</text:span></text:p>
      <text:p text:style-name="P80"><text:soft-page-break/><draw:frame draw:style-name="fr11" draw:name="Объект166" text:anchor-type="as-char" svg:y="-1.281cm" svg:width="12.617cm" svg:height="1.663cm" draw:z-index="189"><draw:object xlink:href="./Object 166" xlink:type="simple" xlink:show="embed" xlink:actuate="onLoad"/><draw:image xlink:href="./ObjectReplacements/Object 166" xlink:type="simple" xlink:show="embed" xlink:actuate="onLoad"/></draw:frame></text:p>
      <text:p text:style-name="P90">Местная потеря в трубках при повороте на 180° ( <text:span text:style-name="T43"><draw:frame draw:style-name="fr11" draw:name="Объект167" text:anchor-type="as-char" svg:y="-0.439cm" svg:width="1.365cm" svg:height="0.594cm" draw:z-index="190"><draw:object xlink:href="./Object 167" xlink:type="simple" xlink:show="embed" xlink:actuate="onLoad"/><draw:image xlink:href="./ObjectReplacements/Object 167" xlink:type="simple" xlink:show="embed" xlink:actuate="onLoad"/><svg:desc>формула</svg:desc></draw:frame></text:span>)<text:span text:style-name="T63">:</text:span></text:p>
      <text:p text:style-name="P80"><draw:frame draw:style-name="fr11" draw:name="Объект168" text:anchor-type="as-char" svg:y="-0.744cm" svg:width="9.86cm" svg:height="1.127cm" draw:z-index="191"><draw:object xlink:href="./Object 168" xlink:type="simple" xlink:show="embed" xlink:actuate="onLoad"/><draw:image xlink:href="./ObjectReplacements/Object 168" xlink:type="simple" xlink:show="embed" xlink:actuate="onLoad"/></draw:frame></text:p>
      <text:p text:style-name="P85">Суммарная потеря давления теплоносителя</text:p>
      <text:p text:style-name="P80"><draw:frame draw:style-name="fr11" draw:name="Объект169" text:anchor-type="as-char" svg:y="-0.439cm" svg:width="15.242cm" svg:height="0.594cm" draw:z-index="192"><draw:object xlink:href="./Object 169" xlink:type="simple" xlink:show="embed" xlink:actuate="onLoad"/><draw:image xlink:href="./ObjectReplacements/Object 169" xlink:type="simple" xlink:show="embed" xlink:actuate="onLoad"/></draw:frame></text:p>
      <text:p text:style-name="P14">Таблица <text:sequence text:ref-name="refTable6" text:name="Table" text:formula="ooow:Table+1" style:num-format="1">7</text:sequence><text:s/>– Результаты гидравлического расчета</text:p>
      <table:table table:name="Таблица7" table:style-name="Таблица7">
        <table:table-column table:style-name="Таблица7.A" table:number-columns-repeated="8"/>
        <table:table-row table:style-name="Таблица7.1">
          <table:table-cell table:style-name="Таблица7.A1" table:number-rows-spanned="2" office:value-type="string">
            <text:p text:style-name="P91"/>
            <text:p text:style-name="P91">Величина</text:p>
          </table:table-cell>
          <table:table-cell table:style-name="Таблица7.A1" table:number-rows-spanned="2" office:value-type="string">
            <text:p text:style-name="P91"/>
            <text:p text:style-name="P91">Единица измерения</text:p>
          </table:table-cell>
          <table:table-cell table:style-name="Таблица7.C1" table:number-columns-spanned="6" office:value-type="string">
            <text:p text:style-name="P91">Скорость теплоносителя, м/с</text:p>
          </table:table-cell>
          <table:covered-table-cell/>
          <table:covered-table-cell/>
          <table:covered-table-cell/>
          <table:covered-table-cell/>
          <table:covered-table-cell/>
        </table:table-row>
        <table:table-row>
          <table:covered-table-cell table:style-name="Таблица7.A1"/>
          <table:covered-table-cell table:style-name="Таблица7.A1"/>
          <table:table-cell table:style-name="Таблица7.C2" office:value-type="float" office:value="2.5">
            <text:p text:style-name="P91">2,5</text:p>
          </table:table-cell>
          <table:table-cell table:style-name="Таблица7.C2" office:value-type="float" office:value="3">
            <text:p text:style-name="P91">3</text:p>
          </table:table-cell>
          <table:table-cell table:style-name="Таблица7.C2" office:value-type="float" office:value="3.5">
            <text:p text:style-name="P91">3,5</text:p>
          </table:table-cell>
          <table:table-cell table:style-name="Таблица7.C2" office:value-type="float" office:value="4">
            <text:p text:style-name="P91">4</text:p>
          </table:table-cell>
          <table:table-cell table:style-name="Таблица7.C2" office:value-type="float" office:value="4.5">
            <text:p text:style-name="P91">4,5</text:p>
          </table:table-cell>
          <table:table-cell table:style-name="Таблица7.H2" office:value-type="float" office:value="5">
            <text:p text:style-name="P91">5</text:p>
          </table:table-cell>
        </table:table-row>
        <table:table-row>
          <table:table-cell table:style-name="Таблица7.A3" office:value-type="string">
            <text:p text:style-name="P91">Δp_гк</text:p>
          </table:table-cell>
          <table:table-cell table:style-name="Таблица7.A3" office:value-type="string">
            <text:p text:style-name="P91">кПа</text:p>
          </table:table-cell>
          <table:table-cell table:style-name="Таблица7.C3" office:value-type="float" office:value="2.89940847754993">
            <text:p text:style-name="P91">2,90</text:p>
          </table:table-cell>
          <table:table-cell table:style-name="Таблица7.C3" office:value-type="float" office:value="2.89940847754993">
            <text:p text:style-name="P91">2,90</text:p>
          </table:table-cell>
          <table:table-cell table:style-name="Таблица7.C3" office:value-type="float" office:value="2.89940847754993">
            <text:p text:style-name="P91">2,90</text:p>
          </table:table-cell>
          <table:table-cell table:style-name="Таблица7.C3" office:value-type="float" office:value="2.89940847754993">
            <text:p text:style-name="P91">2,90</text:p>
          </table:table-cell>
          <table:table-cell table:style-name="Таблица7.C3" office:value-type="float" office:value="2.89940847754993">
            <text:p text:style-name="P91">2,90</text:p>
          </table:table-cell>
          <table:table-cell table:style-name="Таблица7.H3" office:value-type="float" office:value="2.89940847754993">
            <text:p text:style-name="P91">2,90</text:p>
          </table:table-cell>
        </table:table-row>
        <table:table-row>
          <table:table-cell table:style-name="Таблица7.A3" office:value-type="string">
            <text:p text:style-name="P91">Δp_хк</text:p>
          </table:table-cell>
          <table:table-cell table:style-name="Таблица7.A3" office:value-type="string">
            <text:p text:style-name="P91">кПа</text:p>
          </table:table-cell>
          <table:table-cell table:style-name="Таблица7.C3" office:value-type="float" office:value="10.1291701669559">
            <text:p text:style-name="P91">10,13</text:p>
          </table:table-cell>
          <table:table-cell table:style-name="Таблица7.C3" office:value-type="float" office:value="10.1291701669559">
            <text:p text:style-name="P91">10,13</text:p>
          </table:table-cell>
          <table:table-cell table:style-name="Таблица7.C3" office:value-type="float" office:value="10.1291701669559">
            <text:p text:style-name="P91">10,13</text:p>
          </table:table-cell>
          <table:table-cell table:style-name="Таблица7.C3" office:value-type="float" office:value="10.1291701669559">
            <text:p text:style-name="P91">10,13</text:p>
          </table:table-cell>
          <table:table-cell table:style-name="Таблица7.C3" office:value-type="float" office:value="10.1291701669559">
            <text:p text:style-name="P91">10,13</text:p>
          </table:table-cell>
          <table:table-cell table:style-name="Таблица7.H3" office:value-type="float" office:value="10.1291701669559">
            <text:p text:style-name="P91">10,13</text:p>
          </table:table-cell>
        </table:table-row>
        <table:table-row>
          <table:table-cell table:style-name="Таблица7.A3" office:value-type="string">
            <text:p text:style-name="P91">Δp_кол</text:p>
          </table:table-cell>
          <table:table-cell table:style-name="Таблица7.A3" office:value-type="string">
            <text:p text:style-name="P91">кПа</text:p>
          </table:table-cell>
          <table:table-cell table:style-name="Таблица7.C3" office:value-type="float" office:value="4.81984112627065">
            <text:p text:style-name="P91">4,82</text:p>
          </table:table-cell>
          <table:table-cell table:style-name="Таблица7.C3" office:value-type="float" office:value="4.81984112627065">
            <text:p text:style-name="P91">4,82</text:p>
          </table:table-cell>
          <table:table-cell table:style-name="Таблица7.C3" office:value-type="float" office:value="4.81984112627065">
            <text:p text:style-name="P91">4,82</text:p>
          </table:table-cell>
          <table:table-cell table:style-name="Таблица7.C3" office:value-type="float" office:value="4.81984112627065">
            <text:p text:style-name="P91">4,82</text:p>
          </table:table-cell>
          <table:table-cell table:style-name="Таблица7.C3" office:value-type="float" office:value="4.81984112627065">
            <text:p text:style-name="P91">4,82</text:p>
          </table:table-cell>
          <table:table-cell table:style-name="Таблица7.H3" office:value-type="float" office:value="4.81984112627065">
            <text:p text:style-name="P91">4,82</text:p>
          </table:table-cell>
        </table:table-row>
        <table:table-row>
          <table:table-cell table:style-name="Таблица7.A3" office:value-type="string">
            <text:p text:style-name="P91">Δpm_вх</text:p>
          </table:table-cell>
          <table:table-cell table:style-name="Таблица7.A3" office:value-type="string">
            <text:p text:style-name="P91">кПа</text:p>
          </table:table-cell>
          <table:table-cell table:style-name="Таблица7.C3" office:value-type="float" office:value="1.19498269744747">
            <text:p text:style-name="P91">1,19</text:p>
          </table:table-cell>
          <table:table-cell table:style-name="Таблица7.C3" office:value-type="float" office:value="1.71561147107769">
            <text:p text:style-name="P91">1,72</text:p>
          </table:table-cell>
          <table:table-cell table:style-name="Таблица7.C3" office:value-type="float" office:value="2.34216608699704">
            <text:p text:style-name="P91">2,34</text:p>
          </table:table-cell>
          <table:table-cell table:style-name="Таблица7.C3" office:value-type="float" office:value="3.06837696837687">
            <text:p text:style-name="P91">3,07</text:p>
          </table:table-cell>
          <table:table-cell table:style-name="Таблица7.C3" office:value-type="float" office:value="3.86012580992481">
            <text:p text:style-name="P91">3,86</text:p>
          </table:table-cell>
          <table:table-cell table:style-name="Таблица7.H3" office:value-type="float" office:value="4.70885474162359">
            <text:p text:style-name="P91">4,71</text:p>
          </table:table-cell>
        </table:table-row>
        <table:table-row>
          <table:table-cell table:style-name="Таблица7.A3" office:value-type="string">
            <text:p text:style-name="P91">Δpm_вых</text:p>
          </table:table-cell>
          <table:table-cell table:style-name="Таблица7.A3" office:value-type="string">
            <text:p text:style-name="P91">кПа</text:p>
          </table:table-cell>
          <table:table-cell table:style-name="Таблица7.C3" office:value-type="float" office:value="2.42626724130521">
            <text:p text:style-name="P91">2,43</text:p>
          </table:table-cell>
          <table:table-cell table:style-name="Таблица7.C3" office:value-type="float" office:value="3.4833407378823">
            <text:p text:style-name="P91">3,48</text:p>
          </table:table-cell>
          <table:table-cell table:style-name="Таблица7.C3" office:value-type="float" office:value="4.75548379295821">
            <text:p text:style-name="P91">4,76</text:p>
          </table:table-cell>
          <table:table-cell table:style-name="Таблица7.C3" office:value-type="float" office:value="6.22996679219739">
            <text:p text:style-name="P91">6,23</text:p>
          </table:table-cell>
          <table:table-cell table:style-name="Таблица7.C3" office:value-type="float" office:value="7.83751666023518">
            <text:p text:style-name="P91">7,84</text:p>
          </table:table-cell>
          <table:table-cell table:style-name="Таблица7.H3" office:value-type="float" office:value="9.56075768132052">
            <text:p text:style-name="P91">9,56</text:p>
          </table:table-cell>
        </table:table-row>
        <table:table-row>
          <table:table-cell table:style-name="Таблица7.A3" office:value-type="string">
            <text:p text:style-name="P91">Δpтр_L</text:p>
          </table:table-cell>
          <table:table-cell table:style-name="Таблица7.A3" office:value-type="string">
            <text:p text:style-name="P91">кПа</text:p>
          </table:table-cell>
          <table:table-cell table:style-name="Таблица7.C3" office:value-type="float" office:value="18.1086591939875">
            <text:p text:style-name="P91">18,11</text:p>
          </table:table-cell>
          <table:table-cell table:style-name="Таблица7.C3" office:value-type="float" office:value="29.9632648164619">
            <text:p text:style-name="P91">29,96</text:p>
          </table:table-cell>
          <table:table-cell table:style-name="Таблица7.C3" office:value-type="float" office:value="46.1432374402917">
            <text:p text:style-name="P91">46,14</text:p>
          </table:table-cell>
          <table:table-cell table:style-name="Таблица7.C3" office:value-type="float" office:value="67.2381571701479">
            <text:p text:style-name="P91">67,24</text:p>
          </table:table-cell>
          <table:table-cell table:style-name="Таблица7.C3" office:value-type="float" office:value="93.4707085062862">
            <text:p text:style-name="P91">93,47</text:p>
          </table:table-cell>
          <table:table-cell table:style-name="Таблица7.H3" office:value-type="float" office:value="125.244059928887">
            <text:p text:style-name="P91">125,24</text:p>
          </table:table-cell>
        </table:table-row>
        <table:table-row>
          <table:table-cell table:style-name="Таблица7.A3" office:value-type="string">
            <text:p text:style-name="P91">Δpm_φ</text:p>
          </table:table-cell>
          <table:table-cell table:style-name="Таблица7.A3" office:value-type="string">
            <text:p text:style-name="P91">кПа</text:p>
          </table:table-cell>
          <table:table-cell table:style-name="Таблица7.C3" office:value-type="float" office:value="1.14022130375923">
            <text:p text:style-name="P91">1,14</text:p>
          </table:table-cell>
          <table:table-cell table:style-name="Таблица7.C3" office:value-type="float" office:value="1.64191867741329">
            <text:p text:style-name="P91">1,64</text:p>
          </table:table-cell>
          <table:table-cell table:style-name="Таблица7.C3" office:value-type="float" office:value="2.23483375536809">
            <text:p text:style-name="P91">2,23</text:p>
          </table:table-cell>
          <table:table-cell table:style-name="Таблица7.C3" office:value-type="float" office:value="2.91896653762363">
            <text:p text:style-name="P91">2,92</text:p>
          </table:table-cell>
          <table:table-cell table:style-name="Таблица7.C3" office:value-type="float" office:value="3.6943170241799">
            <text:p text:style-name="P91">3,69</text:p>
          </table:table-cell>
          <table:table-cell table:style-name="Таблица7.H3" office:value-type="float" office:value="4.56088521503692">
            <text:p text:style-name="P91">4,56</text:p>
          </table:table-cell>
        </table:table-row>
        <table:table-row>
          <table:table-cell table:style-name="Таблица7.A3" office:value-type="string">
            <text:p text:style-name="P91">Δp_ПГ</text:p>
          </table:table-cell>
          <table:table-cell table:style-name="Таблица7.A3" office:value-type="string">
            <text:p text:style-name="P91">кПа</text:p>
          </table:table-cell>
          <table:table-cell table:style-name="Таблица7.C3" office:value-type="float" office:value="27.6899715627701">
            <text:p text:style-name="P91">27,69</text:p>
          </table:table-cell>
          <table:table-cell table:style-name="Таблица7.C3" office:value-type="float" office:value="41.6239768291058">
            <text:p text:style-name="P91">41,62</text:p>
          </table:table-cell>
          <table:table-cell table:style-name="Таблица7.C3" office:value-type="float" office:value="60.2955622018857">
            <text:p text:style-name="P91">60,30</text:p>
          </table:table-cell>
          <table:table-cell table:style-name="Таблица7.C3" office:value-type="float" office:value="84.2753085946164">
            <text:p text:style-name="P91">84,28</text:p>
          </table:table-cell>
          <table:table-cell table:style-name="Таблица7.C3" office:value-type="float" office:value="113.682509126897">
            <text:p text:style-name="P91">113,68</text:p>
          </table:table-cell>
          <table:table-cell table:style-name="Таблица7.H3" office:value-type="float" office:value="148.894398693139">
            <text:p text:style-name="P91">148,89</text:p>
          </table:table-cell>
        </table:table-row>
      </table:table>
      <text:p text:style-name="P80"><text:soft-page-break/><draw:frame draw:style-name="fr7" draw:name="Врезка13" text:anchor-type="as-char" svg:width="16.499cm" draw:z-index="193"><draw:text-box fo:min-height="11.321cm"><text:p text:style-name="Drawing"><draw:frame draw:style-name="fr8" draw:name="Изображение12" text:anchor-type="paragraph" svg:width="16.499cm" style:rel-width="100%" svg:height="11.321cm" style:rel-height="scale" draw:z-index="194"><draw:image xlink:href="Pictures/20000050000033DB000023AFDE6F381D.svm" xlink:type="simple" xlink:show="embed" xlink:actuate="onLoad" draw:mime-type="image/x-svm"/><draw:image xlink:href="Pictures/10000000000001F70000015AFE3E8355.png" xlink:type="simple" xlink:show="embed" xlink:actuate="onLoad" draw:mime-type="image/png"/></draw:frame>Рисунок <text:sequence text:ref-name="refDrawing12" text:name="Drawing" text:formula="ooow:Drawing+1" style:num-format="1">13</text:sequence><text:s/>– Результаты гидравлического расчета</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ru" fo:country="RU"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Aptos" fo:font-size="12pt" fo:language="ru" fo:country="RU"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style:paragraph-properties fo:margin-left="0cm" fo:margin-right="0cm" fo:margin-top="0cm" fo:margin-bottom="0.282cm" style:contextual-spacing="true" fo:line-height="116%" fo:text-align="justify" style:justify-single-word="false" fo:orphans="2" fo:widows="2" fo:text-indent="1.499cm" style:auto-text-indent="false" fo:background-color="transparent" style:writing-mode="lr-tb" loext:word-spacing-minimum="75%" loext:word-spacing-maximum="133%"/>
      <style:text-properties style:font-name="Times New Roman" fo:font-family="'Times New Roman'" style:font-family-generic="roman" style:font-pitch="variable" fo:font-size="14pt" style:font-size-asian="14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Заголовок_20_1_20_Знак" style:default-outline-level="" style:list-style-name="Numbering_20_123" style:list-level="1" style:class="chapter">
      <style:paragraph-properties fo:margin-top="0.635cm" fo:margin-bottom="0.141cm" style:contextual-spacing="true" fo:text-align="center" style:justify-single-word="false" fo:keep-together="always" fo:keep-with-next="always" loext:word-spacing-minimum="75%" loext:word-spacing-maximum="133%"/>
      <style:text-properties fo:color="#000000" loext:opacity="100%" fo:font-size="16pt" fo:font-weight="bold" style:font-name-asian="Aptos1" style:font-family-asian="Aptos" style:font-family-generic-asian="system" style:font-pitch-asian="variable" style:font-size-asian="18pt" style:font-weight-asian="bold" style:font-name-complex="Tahoma" style:font-family-complex="Tahoma" style:font-family-generic-complex="system" style:font-pitch-complex="variable" style:font-size-complex="20pt">
        <loext:char-complex-color loext:theme-type="dark1" loext:color-type="theme"/>
      </style:text-properties>
    </style:style>
    <style:style style:name="Heading_20_2" style:display-name="Heading 2" style:family="paragraph" style:parent-style-name="Standard" style:next-style-name="Standard" loext:linked-style-name="Заголовок_20_2_20_Знак" style:default-outline-level="2" style:list-style-name="Numbering_20_123" style:list-level="2" style:class="chapter">
      <style:paragraph-properties fo:margin-top="0.282cm" fo:margin-bottom="0.141cm" style:contextual-spacing="true" fo:text-align="center" style:justify-single-word="false" fo:keep-together="always" fo:keep-with-next="always" loext:word-spacing-minimum="75%" loext:word-spacing-maximum="133%"/>
      <style:text-properties fo:color="#000000" loext:opacity="100%" fo:font-size="14pt" fo:font-weight="bold" style:font-name-asian="Aptos1" style:font-family-asian="Aptos"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loext:char-complex-color loext:theme-type="dark1" loext:color-type="theme"/>
      </style:text-properties>
    </style:style>
    <style:style style:name="Heading_20_3" style:display-name="Heading 3" style:family="paragraph" style:parent-style-name="Standard" style:next-style-name="Standard" loext:linked-style-name="Заголовок_20_3_20_Знак" style:default-outline-level="3" style:list-style-name="Numbering_20_123" style:list-level="3" style:class="chapter">
      <loext:graphic-properties draw:fill="none" draw:fill-color="#729fcf"/>
      <style:paragraph-properties fo:margin-right="0cm" fo:margin-top="0.282cm" fo:margin-bottom="0.141cm" style:contextual-spacing="true" fo:line-height="150%" fo:text-align="center" style:justify-single-word="false" fo:keep-together="always" fo:orphans="2" fo:widows="2" fo:background-color="transparent" fo:keep-with-next="always" style:writing-mode="lr-tb"/>
      <style:text-properties fo:color="#000000" loext:opacity="100%" fo:font-size="14pt" fo:font-weight="bold" style:font-name-asian="Aptos1" style:font-family-asian="Aptos"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4" style:display-name="Heading 4" style:family="paragraph" style:parent-style-name="Standard" style:next-style-name="Standard" loext:linked-style-name="Заголовок_20_4_20_Знак" style:default-outline-level="4" style:list-style-name="" style:class="chapter">
      <style:paragraph-properties fo:margin-top="0.141cm" fo:margin-bottom="0.071cm" style:contextual-spacing="tru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Заголовок_20_5_20_Знак" style:default-outline-level="5" style:list-style-name="" style:class="chapter">
      <style:paragraph-properties fo:margin-top="0.141cm" fo:margin-bottom="0.071cm" style:contextual-spacing="tru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Заголовок_20_6_20_Знак" style:default-outline-level="6" style:list-style-name="" style:class="chapter">
      <style:paragraph-properties fo:margin-top="0.071cm" fo:margin-bottom="0cm" style:contextual-spacing="tru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Заголовок_20_7_20_Знак" style:default-outline-level="7" style:list-style-name="" style:class="chapter">
      <style:paragraph-properties fo:margin-top="0.071cm" fo:margin-bottom="0cm" style:contextual-spacing="tru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Заголовок_20_8_20_Знак" style:default-outline-level="8" style:list-style-name="" style:class="chapter">
      <style:paragraph-properties fo:margin-top="0cm" fo:margin-bottom="0cm" style:contextual-spacing="tru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Заголовок_20_9_20_Знак" style:default-outline-level="9" style:list-style-name="" style:class="chapter">
      <style:paragraph-properties fo:margin-top="0cm" fo:margin-bottom="0cm" style:contextual-spacing="tru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Заголовок_20_Знак" style:class="chapter">
      <style:paragraph-properties fo:margin-top="0cm" fo:margin-bottom="0.141cm" style:contextual-spacing="true" fo:line-height="100%" fo:text-align="center" style:justify-single-word="false" loext:word-spacing-minimum="75%" loext:word-spacing-maximum="133%"/>
      <style:text-properties fo:font-size="16pt" fo:letter-spacing="-0.018cm" style:letter-kerning="true" style:font-name-asian="Aptos1" style:font-family-asian="Aptos" style:font-family-generic-asian="system" style:font-pitch-asian="variable" style:font-size-asian="16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Подзаголовок_20_Знак" style:class="chapter">
      <style:paragraph-properties fo:text-indent="1.251cm" style:auto-text-indent="false"/>
      <style:text-properties fo:color="#595959" loext:opacity="100%" fo:letter-spacing="0.026cm" style:font-name-asian="Aptos1" style:font-family-asian="Aptos" style:font-family-generic-asian="system" style:font-pitch-asian="variable"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Цитата_20_2_20_Знак">
      <style:paragraph-properties fo:margin-top="0.282cm" fo:margin-bottom="0.282cm" style:contextual-spacing="true" fo:text-align="center" style:justify-single-word="false" loext:word-spacing-minimum="75%" loext:word-spacing-maximum="133%"/>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style:style>
    <style:style style:name="Intense_20_Quote" style:display-name="Intense Quote" style:family="paragraph" style:parent-style-name="Standard" style:next-style-name="Standard" loext:linked-style-name="Выделенная_20_цитата_20_Знак">
      <style:paragraph-properties fo:margin-left="1.524cm" fo:margin-right="1.524cm" fo:margin-top="0.635cm" fo:margin-bottom="0.635cm" style:contextual-spacing="true" fo:text-align="center" style:justify-single-word="false" fo:padding-left="0cm" fo:padding-right="0cm" fo:padding-top="0.353cm" fo:padding-bottom="0.353cm" fo:border-left="none" fo:border-right="none" fo:border-top="0.51pt solid #0f4761" fo:border-bottom="0.51pt solid #0f4761" loext:word-spacing-minimum="75%" loext:word-spacing-maximum="133%"/>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cm" fo:margin-bottom="0cm" style:contextual-spacing="true"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margin-top="0cm" fo:margin-bottom="0cm" style:contextual-spacing="true" fo:line-height="100%">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fo:text-align="left" style:justify-single-word="false" loext:word-spacing-minimum="75%" loext:word-spacing-maximum="133%"/>
      <style:text-properties fo:color="#0f4761" loext:opacity="100%" style:font-name="Aptos Display" fo:font-family="'Aptos Display'" style:font-family-generic="roman" style:font-pitch="variable" fo:font-size="16pt" fo:font-weight="normal" style:letter-kerning="false" style:font-size-asian="16pt" style:language-asian="ru" style:country-asian="RU" style:font-weight-asian="normal"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master-page-name="">
      <style:paragraph-properties fo:margin-top="0cm" fo:margin-bottom="0cm" style:contextual-spacing="false" fo:line-height="150%" fo:text-indent="0cm" style:auto-text-indent="false" style:page-number="auto"/>
    </style:style>
    <style:style style:name="ds-markdown-paragraph" style:family="paragraph" style:parent-style-name="Standard">
      <style:paragraph-properties fo:margin-top="0.494cm" fo:margin-bottom="0.494cm" style:contextual-spacing="false" fo:line-height="100%" fo:text-align="left" style:justify-single-word="false" fo:text-indent="0cm" style:auto-text-indent="false" loext:word-spacing-minimum="75%" loext:word-spacing-maximum="133%"/>
      <style:text-properties fo:font-size="12pt" style:letter-kerning="false"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Формула" style:family="paragraph" style:parent-style-name="Standard" style:next-style-name="Bibliography_20_1" style:master-page-name="">
      <loext:graphic-properties draw:fill="none" draw:fill-color="#729fcf"/>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loext:word-spacing-minimum="75%" loext:word-spacing-maximum="133%"/>
    </style:style>
    <style:style style:name="Bibliography_20_1" style:display-name="Bibliography 1" style:family="paragraph" style:parent-style-name="Index" style:class="index">
      <style:paragraph-properties fo:margin-left="0cm" fo:text-indent="0cm" style:auto-text-indent="false">
        <style:tab-stops>
          <style:tab-stop style:position="16.501cm" style:type="right" style:leader-style="dotted" style:leader-text="."/>
        </style:tab-stops>
      </style:paragraph-properties>
    </style:style>
    <style:style style:name="ф" style:family="paragraph" style:parent-style-name="Standard"/>
    <style:style style:name="Ф" style:family="paragraph" style:parent-style-name="Standard">
      <style:paragraph-properties fo:text-align="center" style:justify-single-word="false" loext:word-spacing-minimum="75%" loext:word-spacing-maximum="133%"/>
    </style:style>
    <style:style style:name="Preformatted_20_Text" style:display-name="Preformatted Text" style:family="paragraph" style:parent-style-name="Standard" style:class="html">
      <style:paragraph-properties fo:margin-top="0cm" fo:margin-bottom="0cm" style: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paragraph-properties fo:margin-top="0cm" fo:margin-bottom="0.21cm" style:contextual-spacing="false" fo:line-height="100%" fo:text-align="center" style:justify-single-word="false" fo:text-indent="0cm" style:auto-text-indent="false" loext:word-spacing-minimum="75%" loext:word-spacing-maximum="133%"/>
      <style:text-properties fo:font-size="14pt" fo:font-style="normal"/>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Contents_20_2" style:display-name="Contents 2" style:family="paragraph" style:parent-style-name="Index" style:class="index">
      <style:paragraph-properties fo:margin-left="0.499cm" fo:margin-top="0cm" fo:margin-bottom="0cm" style:contextual-spacing="true" fo:line-height="150%"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top="0cm" fo:margin-bottom="0cm" style:contextual-spacing="false" fo:line-height="150%" fo:text-indent="0cm" style:auto-text-indent="false">
        <style:tab-stops>
          <style:tab-stop style:position="15.501cm" style:type="right" style:leader-style="dotted" style:leader-text="."/>
        </style:tab-stops>
      </style:paragraph-properties>
    </style:style>
    <style:style style:name="Table" style:family="paragraph" style:parent-style-name="Caption" style:class="extra">
      <style:text-properties fo:font-size="14pt" fo:font-style="normal"/>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color="#000000" loext:opacity="100%" style:font-name="Times New Roman" fo:font-family="'Times New Roman'" style:font-family-generic="roman" style:font-pitch="variable" fo:font-size="18pt" fo:font-weight="bold" style:font-name-asian="Aptos1" style:font-family-asian="Aptos" style:font-family-generic-asian="system" style:font-pitch-asian="variable" style:font-size-asian="18pt" style:font-weight-asian="bold" style:font-name-complex="Tahoma" style:font-family-complex="Tahoma" style:font-family-generic-complex="system" style:font-pitch-complex="variable" style:font-size-complex="20pt">
        <loext:char-complex-color loext:theme-type="dark1" loext:color-type="theme"/>
      </style:text-properties>
    </style:style>
    <style:style style:name="Заголовок_20_2_20_Знак" style:display-name="Заголовок 2 Знак" style:family="text" style:parent-style-name="Default_20_Paragraph_20_Font">
      <style:text-properties fo:color="#000000" loext:opacity="100%" style:font-name="Times New Roman" fo:font-family="'Times New Roman'"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dark1" loext:color-type="theme"/>
      </style:text-properties>
    </style:style>
    <style:style style:name="Заголовок_20_3_20_Знак" style:display-name="Заголовок 3 Знак"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Заголовок_20_4_20_Знак" style:display-name="Заголовок 4 Знак"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Заголовок_20_5_20_Знак" style:display-name="Заголовок 5 Знак" style:family="text" style:parent-style-name="Default_20_Paragraph_20_Font">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Заголовок_20_6_20_Знак" style:display-name="Заголовок 6 Знак"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Заголовок_20_7_20_Знак" style:display-name="Заголовок 7 Знак" style:family="text" style:parent-style-name="Default_20_Paragraph_20_Font">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Заголовок_20_8_20_Знак" style:display-name="Заголовок 8 Знак"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Заголовок_20_9_20_Знак" style:display-name="Заголовок 9 Знак" style:family="text" style:parent-style-name="Default_20_Paragraph_20_Font">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Заголовок_20_Знак" style:display-name="Заголовок Знак" style:family="text" style:parent-style-name="Default_20_Paragraph_20_Font">
      <style:text-properties style:font-name="Times New Roman" fo:font-family="'Times New Roman'" style:font-family-generic="roman" style:font-pitch="variable" fo:font-size="16pt" fo:letter-spacing="-0.018cm" style:letter-kerning="true" style:font-name-asian="Aptos1" style:font-family-asian="Aptos" style:font-family-generic-asian="system" style:font-pitch-asian="variable" style:font-size-asian="16pt" style:font-name-complex="Tahoma" style:font-family-complex="Tahoma" style:font-family-generic-complex="system" style:font-pitch-complex="variable" style:font-size-complex="28pt"/>
    </style:style>
    <style:style style:name="Подзаголовок_20_Знак" style:display-name="Подзаголовок Знак" style:family="text" style:parent-style-name="Default_20_Paragraph_20_Font">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Цитата_20_2_20_Знак" style:display-name="Цитата 2 Знак"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Выделенная_20_цитата_20_Знак" style:display-name="Выделенная цитата Знак"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Placeholder_20_Text" style:display-name="Placeholder Text" style:family="text" style:parent-style-name="Default_20_Paragraph_20_Font">
      <style:text-properties fo:color="#666666" loext:opacity="100%"/>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katex"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text-properties fo:font-size="18pt" fo:font-weight="bold" style:font-size-asian="15.75pt" style:font-weight-asian="bold" style:font-size-complex="18pt" style:font-weight-complex="bold"/>
    </style:style>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ptos" fo:font-family="Aptos"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Aptos" fo:font-family="Aptos" style:font-family-generic="roman" style:font-pitch="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Aptos" fo:font-family="Aptos" style:font-family-generic="roman" style:font-pitch="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Aptos" fo:font-family="Aptos" style:font-family-generic="roman" style:font-pitch="variable"/>
    </style:style>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Aptos" fo:font-family="Aptos" style:font-family-generic="roman" style:font-pitch="variable"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style:font-name="Aptos" fo:font-family="Aptos" style:font-family-generic="roman" style:font-pitch="variable"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2.%1%" style:num-prefix="1.2." style:num-format="1">
        <style:list-level-properties text:list-level-position-and-space-mode="label-alignment" fo:text-align="center">
          <style:list-level-label-alignment text:label-followed-by="space"/>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48"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9"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11"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12"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9"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38"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9"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2.%1%" style:num-prefix="1.2."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2.%1%" style:num-prefix="1.2."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style-name="Обычный"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Обычный"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6.35cm"/>
        </style:list-level-properties>
        <style:text-properties fo:font-family="Symbol" style:font-style-name="Обычный" style:font-family-generic="roman"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Обычный" style:font-family-generic="modern"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Обычный" style:font-family-generic="roman"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Обычный" style:font-family-generic="modern"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9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9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9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2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3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3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4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4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6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6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6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6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family-generic="modern"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4">
      <number:number number:decimal-places="1" number:min-decimal-places="1" number:min-integer-digits="1"/>
    </number:number-style>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loext:word-spacing-minimum="75%" loext:word-spacing-maximum="133%"/>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text:page-number></text:p>
        <text:p text:style-name="Footer"/>
      </style:footer>
      <style:footer-first>
        <text:p text:style-name="Footer"/>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Григорий Мазаев</meta:initial-creator>
    <meta:editing-cycles>28</meta:editing-cycles>
    <meta:creation-date>2026-03-27T20:10:00</meta:creation-date>
    <dc:date>2026-05-05T23:55:06.963023300</dc:date>
    <meta:editing-duration>PT15H24M25S</meta:editing-duration>
    <meta:generator>LibreOffice/26.2.2.2$Windows_X86_64 LibreOffice_project/1f77d10d6938fd34972958f64b2bcfa54f8b1ba5</meta:generator>
    <meta:print-date>2026-05-05T23:54:15.889087600</meta:print-date>
    <meta:printed-by>Файлы PDF</meta:printed-by>
    <meta:document-statistic meta:table-count="7" meta:image-count="13" meta:object-count="169" meta:page-count="27" meta:paragraph-count="838" meta:word-count="3093" meta:character-count="21109" meta:non-whitespace-character-count="18527"/>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sub>
      <mi>G</mi>
      <mn>1</mn>
    </msub>
    <annotation encoding="StarMath 5.0">{G} rsub {1}</annotation>
  </semantics>
</math>
</file>

<file path=Object 10/content.xml><?xml version="1.0" encoding="utf-8"?>
<math xmlns="http://www.w3.org/1998/Math/MathML" display="block">
  <semantics>
    <msub>
      <mi>t</mi>
      <mrow>
        <mn>2</mn>
        <mi>S</mi>
      </mrow>
    </msub>
    <annotation encoding="StarMath 5.0">{t} rsub {2S}</annotation>
  </semantics>
</math>
</file>

<file path=Object 100/content.xml><?xml version="1.0" encoding="utf-8"?>
<math xmlns="http://www.w3.org/1998/Math/MathML" display="block">
  <semantics>
    <mrow>
      <msub>
        <mi>ε</mi>
        <mi>q</mi>
      </msub>
      <mtext>=</mtext>
      <mn>1</mn>
      <mtext>%</mtext>
      <mn>.</mn>
    </mrow>
    <annotation encoding="StarMath 5.0">{ε} rsub {q} "=" 1 "%". </annotation>
  </semantics>
</math>
</file>

<file path=Object 101/content.xml><?xml version="1.0" encoding="utf-8"?>
<math xmlns="http://www.w3.org/1998/Math/MathML" display="block">
  <semantics>
    <mrow>
      <mrow>
        <msub>
          <mi>k</mi>
          <mi mathvariant="italic">вых</mi>
        </msub>
        <mo stretchy="false">=</mo>
        <mn>4187,9</mn>
      </mrow>
      <mfrac>
        <mi mathvariant="italic">Вт</mi>
        <mrow>
          <mrow>
            <msup>
              <mi>м</mi>
              <mn>2</mn>
            </msup>
            <mo stretchy="false">⋅</mo>
            <mi>°</mi>
          </mrow>
          <mi>С</mi>
        </mrow>
      </mfrac>
      <mspace width="0.5em"/>
      <mi>;</mi>
      <mspace width="1.5em"/>
      <mrow>
        <msub>
          <mi>q</mi>
          <mi mathvariant="italic">вых</mi>
        </msub>
        <mo stretchy="false">=</mo>
        <mn>41878,8</mn>
      </mrow>
      <mrow>
        <mfrac>
          <mi mathvariant="italic">Вт</mi>
          <msup>
            <mi>м</mi>
            <mn>2</mn>
          </msup>
        </mfrac>
        <mo stretchy="false">≈</mo>
        <mn>41,9</mn>
      </mrow>
      <mfrac>
        <mi mathvariant="italic">кВт</mi>
        <msup>
          <mi>м</mi>
          <mn>2</mn>
        </msup>
      </mfrac>
      <mi>;</mi>
      <mspace width="1.5em"/>
      <mrow>
        <msub>
          <mi>ε</mi>
          <mi>q</mi>
        </msub>
        <mo stretchy="false">=</mo>
        <mn>0,74</mn>
      </mrow>
      <mtext>%</mtext>
      <mi>.</mi>
    </mrow>
    <annotation encoding="StarMath 5.0">k_{вых} = 4187,9 {{Вт} over {м^2 cdot °С}} `;``` q_{вых} = 41878,8 {{Вт} over {м^2}} approx 41,9 {{кВт} over {м^2}}; ``` ε_q = 0,74%.</annotation>
  </semantics>
</math>
</file>

<file path=Object 102/content.xml><?xml version="1.0" encoding="utf-8"?>
<math xmlns="http://www.w3.org/1998/Math/MathML" display="block">
  <semantics>
    <mrow>
      <mrow>
        <mover accent="true">
          <mi>q</mi>
          <mo>¯</mo>
        </mover>
        <mo stretchy="false">=</mo>
        <mrow>
          <mover accent="true">
            <mi>k</mi>
            <mo>¯</mo>
          </mover>
          <mo stretchy="false">⋅</mo>
          <msub>
            <mi mathvariant="italic">δt</mi>
            <mi>л</mi>
          </msub>
        </mrow>
        <mo stretchy="false">=</mo>
        <mrow>
          <mn>4740,9</mn>
          <mo stretchy="false">⋅</mo>
          <mn>20,97</mn>
        </mrow>
        <mo stretchy="false">=</mo>
        <mn>99430</mn>
      </mrow>
      <mfrac>
        <mi mathvariant="italic">Вт</mi>
        <msup>
          <mi>м</mi>
          <mn>2</mn>
        </msup>
      </mfrac>
    </mrow>
    <annotation encoding="StarMath 5.0">overline{q} = overline{k} cdot δt_л = 4740,9 cdot 20,97 = 99430 {{Вт} over {м^2}}</annotation>
  </semantics>
</math>
</file>

<file path=Object 103/content.xml><?xml version="1.0" encoding="utf-8"?>
<math xmlns="http://www.w3.org/1998/Math/MathML" display="block">
  <semantics>
    <mrow>
      <mrow>
        <msub>
          <mi>α</mi>
          <mn>2</mn>
        </msub>
        <mo stretchy="false">=</mo>
        <mrow>
          <mi>A</mi>
          <mo stretchy="false">⋅</mo>
          <mover accent="true">
            <mi>q</mi>
            <mo>¯</mo>
          </mover>
        </mrow>
      </mrow>
      <mrow>
        <msup>
          <mspace width="0.5em"/>
          <mn>0,7</mn>
        </msup>
        <mo stretchy="false">=</mo>
        <mrow>
          <mn>7,704</mn>
          <mo stretchy="false">⋅</mo>
          <msup>
            <mrow>
              <mo fence="true" form="prefix" stretchy="false">(</mo>
              <mrow>
                <mn>99430</mn>
              </mrow>
              <mo fence="true" form="postfix" stretchy="false">)</mo>
            </mrow>
            <mn>0,7</mn>
          </msup>
        </mrow>
        <mo stretchy="false">=</mo>
        <mn>24270</mn>
      </mrow>
      <mfrac>
        <mi mathvariant="italic">Вт</mi>
        <mrow>
          <mrow>
            <msup>
              <mi>м</mi>
              <mn>2</mn>
            </msup>
            <mo stretchy="false">⋅</mo>
            <mi>°</mi>
          </mrow>
          <mi>С</mi>
        </mrow>
      </mfrac>
    </mrow>
    <annotation encoding="StarMath 5.0">α_2 = A cdot overline{q}` ^ {0,7} = 7,704 cdot (99430)^{0,7} = 24270 {{Вт} over {м^2 cdot °С}}</annotation>
  </semantics>
</math>
</file>

<file path=Object 104/content.xml><?xml version="1.0" encoding="utf-8"?>
<math xmlns="http://www.w3.org/1998/Math/MathML" display="block">
  <semantics>
    <mrow>
      <mrow>
        <mi>F</mi>
        <mo stretchy="false">=</mo>
        <mfrac>
          <msub>
            <mi>Q</mi>
            <mn>1</mn>
          </msub>
          <mover accent="true">
            <mi>q</mi>
            <mo>¯</mo>
          </mover>
        </mfrac>
        <mo stretchy="false">=</mo>
        <mfrac>
          <mrow>
            <mn>590874</mn>
            <mo stretchy="false">⋅</mo>
            <msup>
              <mn>10</mn>
              <mn>3</mn>
            </msup>
          </mrow>
          <mn>99430</mn>
        </mfrac>
        <mo stretchy="false">=</mo>
        <mn>5942,4</mn>
      </mrow>
      <msup>
        <mi>м</mi>
        <mn>2</mn>
      </msup>
    </mrow>
    <annotation encoding="StarMath 5.0">F = {Q_1} over {overline{q}} = {590874 cdot 10^3} over {99430} = 5942,4 м^2</annotation>
  </semantics>
</math>
</file>

<file path=Object 105/content.xml><?xml version="1.0" encoding="utf-8"?>
<math xmlns="http://www.w3.org/1998/Math/MathML" display="block">
  <semantics>
    <mrow>
      <mrow>
        <msub>
          <mi>k</mi>
          <mi mathvariant="italic">вх</mi>
        </msub>
        <mo stretchy="false">=</mo>
        <mn>5293,9</mn>
      </mrow>
      <mfrac>
        <mi mathvariant="italic">Вт</mi>
        <mrow>
          <mrow>
            <msup>
              <mi>м</mi>
              <mn>2</mn>
            </msup>
            <mo stretchy="false">⋅</mo>
            <mi>°</mi>
          </mrow>
          <mi>С</mi>
        </mrow>
      </mfrac>
      <mspace width="0.5em"/>
      <mi>;</mi>
      <mspace width="1.5em"/>
      <mrow>
        <msub>
          <mi>q</mi>
          <mi mathvariant="italic">вх</mi>
        </msub>
        <mo stretchy="false">=</mo>
        <mn>201168</mn>
      </mrow>
      <mrow>
        <mfrac>
          <mi mathvariant="italic">Вт</mi>
          <msup>
            <mi>м</mi>
            <mn>2</mn>
          </msup>
        </mfrac>
        <mo stretchy="false">≈</mo>
        <mn>201,2</mn>
      </mrow>
      <mrow>
        <mi mathvariant="italic">кВт</mi>
        <mo stretchy="false">/</mo>
        <msup>
          <mi>м</mi>
          <mn>2</mn>
        </msup>
      </mrow>
      <mi>;</mi>
      <mspace width="1.5em"/>
      <mrow>
        <msub>
          <mi>ε</mi>
          <mi>q</mi>
        </msub>
        <mo stretchy="false">=</mo>
        <mn>0,26</mn>
      </mrow>
      <mtext>%</mtext>
      <mi>.</mi>
    </mrow>
    <annotation encoding="StarMath 5.0">k_{вх} = 5293,9 {{Вт} over {м^2 cdot °С}} `;``` q_{вх} = 201168 {{Вт} over {м^2}} approx 201,2 {{кВт} / {м^2}}; ``` ε_q = 0,26%.</annotation>
  </semantics>
</math>
</file>

<file path=Object 106/content.xml><?xml version="1.0" encoding="utf-8"?>
<math xmlns="http://www.w3.org/1998/Math/MathML" display="block">
  <semantics>
    <mrow>
      <mrow>
        <msub>
          <mi>F</mi>
          <mi>Ф</mi>
        </msub>
        <mo stretchy="false">=</mo>
        <mrow>
          <mi>F</mi>
          <mo stretchy="false">⋅</mo>
          <msub>
            <mi>K</mi>
            <mi mathvariant="italic">ЗАП</mi>
          </msub>
        </mrow>
        <mo stretchy="false">=</mo>
        <mrow>
          <mn>5942,4</mn>
          <mo stretchy="false">⋅</mo>
          <mn>1,07</mn>
        </mrow>
        <mo stretchy="false">≈</mo>
        <mn>6358,3</mn>
      </mrow>
      <msup>
        <mi>м</mi>
        <mn>2</mn>
      </msup>
    </mrow>
    <annotation encoding="StarMath 5.0">F_{Ф} = F cdot K_{ЗАП} = 5942,4 cdot 1,07 approx 6358,3 м^2</annotation>
  </semantics>
</math>
</file>

<file path=Object 107/content.xml><?xml version="1.0" encoding="utf-8"?>
<math xmlns="http://www.w3.org/1998/Math/MathML" display="block">
  <semantics>
    <mrow>
      <mover accent="true">
        <mi>k</mi>
        <mo>¯</mo>
      </mover>
      <mi>,</mi>
      <mfrac>
        <mi mathvariant="italic">Вт</mi>
        <mrow>
          <msup>
            <mi>м</mi>
            <mn>2</mn>
          </msup>
          <mi>·</mi>
          <mi>°</mi>
          <mi>C</mi>
        </mrow>
      </mfrac>
    </mrow>
    <annotation encoding="StarMath 5.0">overline { k } , Вт over { м^2 ·°C }</annotation>
  </semantics>
</math>
</file>

<file path=Object 108/content.xml><?xml version="1.0" encoding="utf-8"?>
<math xmlns="http://www.w3.org/1998/Math/MathML" display="block">
  <semantics>
    <mfrac>
      <mi mathvariant="italic">Вт</mi>
      <msup>
        <mi>м</mi>
        <mn>2</mn>
      </msup>
    </mfrac>
    <annotation encoding="StarMath 5.0">Вт over { м^2 }</annotation>
  </semantics>
</math>
</file>

<file path=Object 109/content.xml><?xml version="1.0" encoding="utf-8"?>
<math xmlns="http://www.w3.org/1998/Math/MathML" display="block">
  <semantics>
    <mfrac>
      <mi mathvariant="italic">Вт</mi>
      <mrow>
        <msup>
          <mi>м</mi>
          <mn>2</mn>
        </msup>
        <mi>·</mi>
        <mi>°</mi>
        <mi>C</mi>
      </mrow>
    </mfrac>
    <annotation encoding="StarMath 5.0">Вт over { м^2 ·°C }</annotation>
  </semantics>
</math>
</file>

<file path=Object 11/content.xml><?xml version="1.0" encoding="utf-8"?>
<math xmlns="http://www.w3.org/1998/Math/MathML" display="block">
  <semantics>
    <msub>
      <mi>P</mi>
      <mn>2</mn>
    </msub>
    <annotation encoding="StarMath 5.0">{P} rsub {2}</annotation>
  </semantics>
</math>
</file>

<file path=Object 110/content.xml><?xml version="1.0" encoding="utf-8"?>
<math xmlns="http://www.w3.org/1998/Math/MathML" display="block">
  <semantics>
    <mfrac>
      <mi mathvariant="italic">Вт</mi>
      <mrow>
        <msup>
          <mi>м</mi>
          <mn>2</mn>
        </msup>
        <mi>·</mi>
        <mi>°</mi>
        <mi>C</mi>
      </mrow>
    </mfrac>
    <annotation encoding="StarMath 5.0">Вт over { м^2 ·°C }</annotation>
  </semantics>
</math>
</file>

<file path=Object 111/content.xml><?xml version="1.0" encoding="utf-8"?>
<math xmlns="http://www.w3.org/1998/Math/MathML" display="block">
  <semantics>
    <mrow>
      <mrow>
        <msub>
          <mi>F</mi>
          <mi>n</mi>
        </msub>
        <mo stretchy="false">=</mo>
        <mfrac>
          <msub>
            <mi>G</mi>
            <mn>1</mn>
          </msub>
          <mrow>
            <msub>
              <mi>ρ</mi>
              <mn>1</mn>
            </msub>
            <mo stretchy="false">⋅</mo>
            <msub>
              <mi>w</mi>
              <mn>1</mn>
            </msub>
          </mrow>
        </mfrac>
      </mrow>
      <mrow>
        <mfrac>
          <mn>3870,73</mn>
          <mrow>
            <mn>729,74</mn>
            <mo stretchy="false">⋅</mo>
            <mn>2,5</mn>
          </mrow>
        </mfrac>
        <mo stretchy="false">=</mo>
        <mn>2,1217</mn>
      </mrow>
      <msup>
        <mi>м</mi>
        <mn>2</mn>
      </msup>
    </mrow>
    <annotation encoding="StarMath 5.0">F_{n} = {G_{1}} over {ρ_{1} cdot w_{1}}{3870,73} over {729,74 cdot 2,5} =  2,1217 м^2</annotation>
  </semantics>
</math>
</file>

<file path=Object 112/content.xml><?xml version="1.0" encoding="utf-8"?>
<math xmlns="http://www.w3.org/1998/Math/MathML" display="block">
  <semantics>
    <msub>
      <mi>n</mi>
      <mn>2</mn>
    </msub>
    <annotation encoding="StarMath 5.0">n_{2}</annotation>
  </semantics>
</math>
</file>

<file path=Object 113/content.xml><?xml version="1.0" encoding="utf-8"?>
<math xmlns="http://www.w3.org/1998/Math/MathML" display="block">
  <semantics>
    <mrow>
      <mrow>
        <msub>
          <mi>F</mi>
          <mi mathvariant="italic">тр</mi>
        </msub>
        <mo stretchy="false">=</mo>
        <mfrac>
          <mrow>
            <mi>π</mi>
            <mo stretchy="false">⋅</mo>
            <msup>
              <mrow>
                <mo fence="true" form="prefix" stretchy="false">(</mo>
                <mrow>
                  <mrow>
                    <msub>
                      <mi>d</mi>
                      <mi mathvariant="italic">вн</mi>
                    </msub>
                    <mo stretchy="false">⋅</mo>
                    <msup>
                      <mn>10</mn>
                      <mrow>
                        <mo stretchy="false">−</mo>
                        <mn>3</mn>
                      </mrow>
                    </msup>
                  </mrow>
                </mrow>
                <mo fence="true" form="postfix" stretchy="false">)</mo>
              </mrow>
              <mn>2</mn>
            </msup>
          </mrow>
          <mn>4</mn>
        </mfrac>
        <mo stretchy="false">=</mo>
        <mfrac>
          <mrow>
            <mi>π</mi>
            <mo stretchy="false">⋅</mo>
            <msup>
              <mrow>
                <mo fence="true" form="prefix" stretchy="false">(</mo>
                <mrow>
                  <mrow>
                    <mn>13,0</mn>
                    <mo stretchy="false">⋅</mo>
                    <msup>
                      <mn>10</mn>
                      <mrow>
                        <mo stretchy="false">−</mo>
                        <mn>3</mn>
                      </mrow>
                    </msup>
                  </mrow>
                </mrow>
                <mo fence="true" form="postfix" stretchy="false">)</mo>
              </mrow>
              <mn>2</mn>
            </msup>
          </mrow>
          <mn>4</mn>
        </mfrac>
        <mo stretchy="false">=</mo>
        <mfrac>
          <mrow>
            <mi>π</mi>
            <mo stretchy="false">⋅</mo>
            <mn>1,69</mn>
            <mo stretchy="false">⋅</mo>
            <msup>
              <mn>10</mn>
              <mrow>
                <mo stretchy="false">−</mo>
                <mn>4</mn>
              </mrow>
            </msup>
          </mrow>
          <mn>4</mn>
        </mfrac>
        <mo stretchy="false">=</mo>
        <mrow>
          <mn>1,327</mn>
          <mo stretchy="false">⋅</mo>
          <msup>
            <mn>10</mn>
            <mrow>
              <mo stretchy="false">−</mo>
              <mn>4</mn>
            </mrow>
          </msup>
        </mrow>
      </mrow>
      <msup>
        <mi>м</mi>
        <mn>2</mn>
      </msup>
    </mrow>
    <annotation encoding="StarMath 5.0">F_{тр} = {π cdot (d_{вн} cdot 10^{-3})^2} over {4}={π cdot (13,0 cdot 10^{-3})^2} over {4} = {π cdot 1,69 cdot 10^{-4}} over {4} = 1,327 cdot 10^{-4} м^2</annotation>
  </semantics>
</math>
</file>

<file path=Object 114/content.xml><?xml version="1.0" encoding="utf-8"?>
<math xmlns="http://www.w3.org/1998/Math/MathML" display="block">
  <semantics>
    <msub>
      <mi>q</mi>
      <mtext>вых</mtext>
    </msub>
    <annotation encoding="StarMath 5.0">{q} rsub {"вых"}</annotation>
  </semantics>
</math>
</file>

<file path=Object 115/content.xml><?xml version="1.0" encoding="utf-8"?>
<math xmlns="http://www.w3.org/1998/Math/MathML" display="block">
  <semantics>
    <mrow>
      <mo fence="true" form="prefix" stretchy="true">{</mo>
      <mrow>
        <mtable>
          <mtr>
            <mtd>
              <mrow>
                <mrow>
                  <msub>
                    <mi>k</mi>
                    <mi mathvariant="italic">вых</mi>
                  </msub>
                  <mo stretchy="false">=</mo>
                  <mfrac>
                    <mn>1</mn>
                    <mrow>
                      <mi>B</mi>
                      <mo stretchy="false">+</mo>
                      <mfrac>
                        <mn>1</mn>
                        <mrow>
                          <mi>A</mi>
                          <mo stretchy="false">⋅</mo>
                          <msubsup>
                            <mi>q</mi>
                            <mi mathvariant="italic">вых</mi>
                            <mn>0,7</mn>
                          </msubsup>
                        </mrow>
                      </mfrac>
                    </mrow>
                  </mfrac>
                </mrow>
                <mi>;</mi>
              </mrow>
            </mtd>
          </mtr>
          <mtr>
            <mtd>
              <mrow>
                <msub>
                  <mi>q</mi>
                  <mi mathvariant="italic">вых</mi>
                </msub>
                <mo stretchy="false">=</mo>
                <mrow>
                  <msub>
                    <mi>k</mi>
                    <mi mathvariant="italic">вых</mi>
                  </msub>
                  <mo stretchy="false">⋅</mo>
                  <msub>
                    <mi mathvariant="italic">δt</mi>
                    <mrow>
                      <mi>М</mi>
                      <mn>.</mn>
                    </mrow>
                  </msub>
                </mrow>
              </mrow>
            </mtd>
          </mtr>
        </mtable>
      </mrow>
    </mrow>
    <annotation encoding="StarMath 5.0">left lbrace   stack{k_{вых} = {1} over {B + {1} over {A cdot q_{вых}^{0,7}}} ; #  q_{вых} = k_{вых} cdot δt_М.}   right none </annotation>
  </semantics>
</math>
</file>

<file path=Object 116/content.xml><?xml version="1.0" encoding="utf-8"?>
<math xmlns="http://www.w3.org/1998/Math/MathML" display="block">
  <semantics>
    <msub>
      <mi>n</mi>
      <mn>2</mn>
    </msub>
    <annotation encoding="StarMath 5.0">n_{2}</annotation>
  </semantics>
</math>
</file>

<file path=Object 117/content.xml><?xml version="1.0" encoding="utf-8"?>
<math xmlns="http://www.w3.org/1998/Math/MathML" display="block">
  <semantics>
    <mrow>
      <mrow>
        <mi>n</mi>
        <mo stretchy="false">=</mo>
        <mfrac>
          <msub>
            <mi>F</mi>
            <mi>n</mi>
          </msub>
          <msub>
            <mi>F</mi>
            <mi mathvariant="italic">тр</mi>
          </msub>
        </mfrac>
        <mo stretchy="false">=</mo>
        <mfrac>
          <mn>2,1217</mn>
          <mrow>
            <mn>1,327</mn>
            <mo stretchy="false">⋅</mo>
            <msup>
              <mn>10</mn>
              <mrow>
                <mo stretchy="false">−</mo>
                <mn>4</mn>
              </mrow>
            </msup>
          </mrow>
        </mfrac>
        <mo stretchy="false">≈</mo>
        <mn>15985</mn>
      </mrow>
      <mi mathvariant="italic">шт</mi>
      <mi>.</mi>
    </mrow>
    <annotation encoding="StarMath 5.0">n = {F_{n}} over {F_{тр}} = {2,1217} over {1,327 cdot 10^{-4}} approx 15985 шт.</annotation>
  </semantics>
</math>
</file>

<file path=Object 118/content.xml><?xml version="1.0" encoding="utf-8"?>
<math xmlns="http://www.w3.org/1998/Math/MathML" display="block">
  <semantics>
    <mrow>
      <msub>
        <mi>n</mi>
        <mn>1</mn>
      </msub>
      <mo stretchy="false">=</mo>
      <mfrac>
        <mrow>
          <mi>π</mi>
          <mo stretchy="false">⋅</mo>
          <msubsup>
            <mi>d</mi>
            <mi mathvariant="italic">вн</mi>
            <mi>K</mi>
          </msubsup>
        </mrow>
        <msub>
          <mi>S</mi>
          <mrow>
            <mn>1</mn>
            <mi mathvariant="italic">min</mi>
          </mrow>
        </msub>
      </mfrac>
      <mo stretchy="false">=</mo>
      <mfrac>
        <mrow>
          <mi>π</mi>
          <mo stretchy="false">⋅</mo>
          <mn>820</mn>
        </mrow>
        <mn>21,6</mn>
      </mfrac>
      <mo stretchy="false">≈</mo>
      <mn>119,26</mn>
    </mrow>
    <annotation encoding="StarMath 5.0">n_{1} = {π cdot d_{вн}^K} over {S_{1min}} = {π cdot 820} over {21,6} approx 119,26</annotation>
  </semantics>
</math>
</file>

<file path=Object 119/content.xml><?xml version="1.0" encoding="utf-8"?>
<math xmlns="http://www.w3.org/1998/Math/MathML" display="block">
  <semantics>
    <mrow>
      <msub>
        <mi>n</mi>
        <mn>2</mn>
      </msub>
      <mo stretchy="false">=</mo>
      <mfrac>
        <mi>n</mi>
        <msub>
          <mi>n</mi>
          <mn>1</mn>
        </msub>
      </mfrac>
      <mo stretchy="false">=</mo>
      <mfrac>
        <mn>15985</mn>
        <mn>120</mn>
      </mfrac>
      <mo stretchy="false">≈</mo>
      <mn>133,21</mn>
    </mrow>
    <annotation encoding="StarMath 5.0">n_{2} = {n} over {n_1} = {15985} over {120} approx 133,21</annotation>
  </semantics>
</math>
</file>

<file path=Object 12/content.xml><?xml version="1.0" encoding="utf-8"?>
<math xmlns="http://www.w3.org/1998/Math/MathML" display="block">
  <semantics>
    <msub>
      <mi>h</mi>
      <mn>2</mn>
    </msub>
    <annotation encoding="StarMath 5.0">{h} rsub {2}</annotation>
  </semantics>
</math>
</file>

<file path=Object 120/content.xml><?xml version="1.0" encoding="utf-8"?>
<math xmlns="http://www.w3.org/1998/Math/MathML" display="block">
  <semantics>
    <mrow>
      <mrow>
        <mi>n</mi>
        <mo stretchy="false">=</mo>
        <mrow>
          <msub>
            <mi>n</mi>
            <mn>1</mn>
          </msub>
          <mo stretchy="false">⋅</mo>
          <msub>
            <mi>n</mi>
            <mn>2</mn>
          </msub>
        </mrow>
        <mo stretchy="false">=</mo>
        <mrow>
          <mn>120</mn>
          <mo stretchy="false">⋅</mo>
          <mn>133</mn>
        </mrow>
        <mo stretchy="false">=</mo>
        <mn>15960</mn>
      </mrow>
      <mi mathvariant="italic">шт</mi>
      <mi>.</mi>
    </mrow>
    <annotation encoding="StarMath 5.0">n = n_1 cdot n_2 = 120 cdot 133 = 15960 шт.</annotation>
  </semantics>
</math>
</file>

<file path=Object 121/content.xml><?xml version="1.0" encoding="utf-8"?>
<math xmlns="http://www.w3.org/1998/Math/MathML" display="block">
  <semantics>
    <mrow>
      <mrow>
        <msub>
          <mi>h</mi>
          <mn>2</mn>
        </msub>
        <mo stretchy="false">=</mo>
        <msub>
          <mi>S</mi>
          <mn>2</mn>
        </msub>
      </mrow>
      <mrow>
        <mrow>
          <mrow>
            <mo fence="true" form="prefix" stretchy="false">(</mo>
            <mrow>
              <mrow>
                <msub>
                  <mi>n</mi>
                  <mn>2</mn>
                </msub>
                <mo stretchy="false">−</mo>
                <mn>1</mn>
              </mrow>
            </mrow>
            <mo fence="true" form="postfix" stretchy="false">)</mo>
          </mrow>
          <mo stretchy="false">+</mo>
          <msub>
            <mi>d</mi>
            <mi>H</mi>
          </msub>
        </mrow>
        <mo stretchy="false">=</mo>
        <mrow>
          <mrow>
            <mn>21,6</mn>
            <mo stretchy="false">⋅</mo>
            <mrow>
              <mo fence="true" form="prefix" stretchy="false">(</mo>
              <mrow>
                <mrow>
                  <mn>133</mn>
                  <mo stretchy="false">−</mo>
                  <mn>1</mn>
                </mrow>
              </mrow>
              <mo fence="true" form="postfix" stretchy="false">)</mo>
            </mrow>
          </mrow>
          <mo stretchy="false">+</mo>
          <mn>16</mn>
        </mrow>
        <mo stretchy="false">=</mo>
        <mrow>
          <mrow>
            <mn>21,6</mn>
            <mo stretchy="false">⋅</mo>
            <mn>132</mn>
          </mrow>
          <mo stretchy="false">+</mo>
          <mn>16</mn>
        </mrow>
        <mo stretchy="false">=</mo>
        <mrow>
          <mn>2851,2</mn>
          <mo stretchy="false">+</mo>
          <mn>16</mn>
        </mrow>
        <mo stretchy="false">=</mo>
        <mn>2867</mn>
      </mrow>
      <mi mathvariant="italic">мм</mi>
    </mrow>
    <annotation encoding="StarMath 5.0">h_2 = S_2 (n_2 - 1) + d_H = 21,6 cdot (133 - 1) + 16 = 21,6 cdot 132 + 16 = 2851,2 + 16 = 2867 мм</annotation>
  </semantics>
</math>
</file>

<file path=Object 122/content.xml><?xml version="1.0" encoding="utf-8"?>
<math xmlns="http://www.w3.org/1998/Math/MathML" display="block">
  <semantics>
    <mrow>
      <mrow>
        <msub>
          <mi>D</mi>
          <mn>2</mn>
        </msub>
        <mo stretchy="false">=</mo>
        <mrow>
          <msub>
            <mi>h</mi>
            <mn>1</mn>
          </msub>
          <mo stretchy="false">+</mo>
          <msub>
            <mi>h</mi>
            <mn>2</mn>
          </msub>
          <mo stretchy="false">+</mo>
          <msub>
            <mi>h</mi>
            <mn>3</mn>
          </msub>
          <mo stretchy="false">+</mo>
          <msub>
            <mi>h</mi>
            <mn>4</mn>
          </msub>
          <mo stretchy="false">+</mo>
          <msub>
            <mi>h</mi>
            <mn>5</mn>
          </msub>
        </mrow>
        <mo stretchy="false">=</mo>
        <mrow>
          <mn>450</mn>
          <mo stretchy="false">+</mo>
          <mn>2867</mn>
          <mo stretchy="false">+</mo>
          <mn>200</mn>
          <mo stretchy="false">+</mo>
          <mn>600</mn>
          <mo stretchy="false">+</mo>
          <mn>400</mn>
        </mrow>
        <mo stretchy="false">=</mo>
        <mn>4517</mn>
      </mrow>
      <mi mathvariant="italic">мм</mi>
    </mrow>
    <annotation encoding="StarMath 5.0">D_2 = h_1 + h_2 + h_3 + h_4 + h_5 = 450 + 2867 + 200 + 600 + 400 = 4517 мм</annotation>
  </semantics>
</math>
</file>

<file path=Object 123/content.xml><?xml version="1.0" encoding="utf-8"?>
<math xmlns="http://www.w3.org/1998/Math/MathML" display="block">
  <semantics>
    <mrow>
      <mrow>
        <msub>
          <mi>B</mi>
          <mi mathvariant="italic">св</mi>
        </msub>
        <mo stretchy="false">=</mo>
        <mrow>
          <mrow>
            <msub>
              <mi>Z</mi>
              <mi mathvariant="italic">кор</mi>
            </msub>
            <mo stretchy="false">⋅</mo>
            <msub>
              <mi>b</mi>
              <mrow>
                <mi mathvariant="italic">св</mi>
                <mn>1</mn>
              </mrow>
            </msub>
          </mrow>
          <mo stretchy="false">+</mo>
          <mrow>
            <mn>2</mn>
            <mo stretchy="false">⋅</mo>
            <msub>
              <mi>b</mi>
              <mrow>
                <mi mathvariant="italic">св</mi>
                <mn>2</mn>
              </mrow>
            </msub>
          </mrow>
        </mrow>
        <mo stretchy="false">=</mo>
        <mrow>
          <mrow>
            <mn>3</mn>
            <mo stretchy="false">⋅</mo>
            <mn>130</mn>
          </mrow>
          <mo stretchy="false">+</mo>
          <mrow>
            <mn>2</mn>
            <mo stretchy="false">⋅</mo>
            <mn>230</mn>
          </mrow>
        </mrow>
        <mo stretchy="false">=</mo>
        <mrow>
          <mn>390</mn>
          <mo stretchy="false">+</mo>
          <mn>460</mn>
        </mrow>
        <mo stretchy="false">=</mo>
        <mn>850</mn>
      </mrow>
      <mi mathvariant="italic">мм</mi>
    </mrow>
    <annotation encoding="StarMath 5.0">B_{св} = Z_{кор} cdot b_{св1} + 2 cdot b_{св2} = 3 cdot 130 + 2 cdot 230 = 390 + 460 = 850 мм</annotation>
  </semantics>
</math>
</file>

<file path=Object 124/content.xml><?xml version="1.0" encoding="utf-8"?>
<math xmlns="http://www.w3.org/1998/Math/MathML" display="block">
  <semantics>
    <mrow>
      <mrow>
        <msub>
          <mi>D</mi>
          <mn>1</mn>
        </msub>
        <mo stretchy="false">=</mo>
        <mrow>
          <mrow>
            <mrow>
              <mo fence="true" form="prefix" stretchy="false">(</mo>
              <mrow>
                <mrow>
                  <msub>
                    <mi>n</mi>
                    <mn>1</mn>
                  </msub>
                  <mo stretchy="false">−</mo>
                  <mn>1</mn>
                </mrow>
              </mrow>
              <mo fence="true" form="postfix" stretchy="false">)</mo>
            </mrow>
            <mo stretchy="false">⋅</mo>
            <msub>
              <mi>S</mi>
              <mn>1</mn>
            </msub>
          </mrow>
          <mo stretchy="false">+</mo>
          <msub>
            <mi>B</mi>
            <mi mathvariant="italic">св</mi>
          </msub>
        </mrow>
        <mo stretchy="false">=</mo>
        <mrow>
          <mrow>
            <mrow>
              <mo fence="true" form="prefix" stretchy="false">(</mo>
              <mrow>
                <mrow>
                  <mn>120</mn>
                  <mo stretchy="false">−</mo>
                  <mn>1</mn>
                </mrow>
              </mrow>
              <mo fence="true" form="postfix" stretchy="false">)</mo>
            </mrow>
            <mo stretchy="false">⋅</mo>
            <mn>24</mn>
          </mrow>
          <mo stretchy="false">+</mo>
          <mn>850</mn>
        </mrow>
        <mo stretchy="false">=</mo>
        <mrow>
          <mrow>
            <mn>119</mn>
            <mo stretchy="false">⋅</mo>
            <mn>24</mn>
          </mrow>
          <mo stretchy="false">+</mo>
          <mn>850</mn>
        </mrow>
        <mo stretchy="false">=</mo>
        <mrow>
          <mn>2856</mn>
          <mo stretchy="false">+</mo>
          <mn>850</mn>
        </mrow>
        <mo stretchy="false">=</mo>
        <mn>3706</mn>
      </mrow>
      <mi mathvariant="italic">мм</mi>
    </mrow>
    <annotation encoding="StarMath 5.0">D_1 = (n_1 - 1) cdot S_1 + B_{св} = (120 - 1) cdot 24 + 850 = 119 cdot 24 + 850 = 2856 + 850 = 3706 мм</annotation>
  </semantics>
</math>
</file>

<file path=Object 125/content.xml><?xml version="1.0" encoding="utf-8"?>
<math xmlns="http://www.w3.org/1998/Math/MathML" display="block">
  <semantics>
    <mrow>
      <mrow>
        <mi>D</mi>
        <mo stretchy="false">=</mo>
        <mi mathvariant="italic">max</mi>
      </mrow>
      <mrow>
        <mrow>
          <mo fence="true" form="prefix" stretchy="false">(</mo>
          <mrow>
            <mrow>
              <msub>
                <mi>D</mi>
                <mn>1</mn>
              </msub>
              <mi>,</mi>
              <msub>
                <mi>D</mi>
                <mn>2</mn>
              </msub>
            </mrow>
          </mrow>
          <mo fence="true" form="postfix" stretchy="false">)</mo>
        </mrow>
        <mo stretchy="false">=</mo>
        <mn>4517</mn>
      </mrow>
      <mi mathvariant="italic">мм</mi>
    </mrow>
    <annotation encoding="StarMath 5.0">D = max (D_1, D_2) = 4517 мм</annotation>
  </semantics>
</math>
</file>

<file path=Object 126/content.xml><?xml version="1.0" encoding="utf-8"?>
<math xmlns="http://www.w3.org/1998/Math/MathML" display="block">
  <semantics>
    <mrow>
      <mrow>
        <mi mathvariant="italic">ΔD</mi>
        <mo stretchy="false">=</mo>
        <mrow>
          <mfrac>
            <mrow>
              <mrow>
                <mi>D</mi>
                <mo stretchy="false">−</mo>
                <mi mathvariant="italic">min</mi>
              </mrow>
              <mrow>
                <mo fence="true" form="prefix" stretchy="false">(</mo>
                <mrow>
                  <mrow>
                    <msub>
                      <mi>D</mi>
                      <mn>1</mn>
                    </msub>
                    <mi>,</mi>
                    <msub>
                      <mi>D</mi>
                      <mn>2</mn>
                    </msub>
                  </mrow>
                </mrow>
                <mo fence="true" form="postfix" stretchy="false">)</mo>
              </mrow>
            </mrow>
            <mi>D</mi>
          </mfrac>
          <mo stretchy="false">⋅</mo>
          <mn>100</mn>
        </mrow>
      </mrow>
      <mrow>
        <mtext>%</mtext>
        <mo stretchy="false">=</mo>
        <mrow>
          <mfrac>
            <mrow>
              <mn>4517</mn>
              <mo stretchy="false">−</mo>
              <mn>3706</mn>
            </mrow>
            <mn>4517</mn>
          </mfrac>
          <mo stretchy="false">⋅</mo>
          <mn>100</mn>
        </mrow>
      </mrow>
      <mrow>
        <mtext>%</mtext>
        <mo stretchy="false">=</mo>
        <mrow>
          <mfrac>
            <mn>811</mn>
            <mn>4517</mn>
          </mfrac>
          <mo stretchy="false">⋅</mo>
          <mn>100</mn>
        </mrow>
      </mrow>
      <mrow>
        <mtext>%</mtext>
        <mo stretchy="false">≈</mo>
        <mn>17,95</mn>
      </mrow>
      <mtext>%</mtext>
    </mrow>
    <annotation encoding="StarMath 5.0">ΔD = {D - min(D_1, D_2)} over {D} cdot 100% = {4517 - 3706} over {4517} cdot 100% = {811} over {4517} cdot 100% approx 17,95 %</annotation>
  </semantics>
</math>
</file>

<file path=Object 127/content.xml><?xml version="1.0" encoding="utf-8"?>
<math xmlns="http://www.w3.org/1998/Math/MathML" display="block">
  <semantics>
    <mrow>
      <mrow>
        <msub>
          <mi>L</mi>
          <mi mathvariant="italic">ср</mi>
        </msub>
        <mo stretchy="false">=</mo>
        <mfrac>
          <msub>
            <mi>F</mi>
            <mi>Ф</mi>
          </msub>
          <mrow>
            <mi>π</mi>
            <mo stretchy="false">⋅</mo>
            <mi>n</mi>
            <mo stretchy="false">⋅</mo>
            <msub>
              <mi>d</mi>
              <mi mathvariant="italic">ср</mi>
            </msub>
            <mo stretchy="false">⋅</mo>
            <msup>
              <mn>10</mn>
              <mrow>
                <mo stretchy="false">−</mo>
                <mn>3</mn>
              </mrow>
            </msup>
          </mrow>
        </mfrac>
        <mo stretchy="false">=</mo>
        <mfrac>
          <mn>6358,3</mn>
          <mrow>
            <mi>π</mi>
            <mo stretchy="false">⋅</mo>
            <mn>15960</mn>
            <mo stretchy="false">⋅</mo>
            <mn>16</mn>
            <mo stretchy="false">⋅</mo>
            <msup>
              <mn>10</mn>
              <mrow>
                <mo stretchy="false">−</mo>
                <mn>3</mn>
              </mrow>
            </msup>
          </mrow>
        </mfrac>
        <mo stretchy="false">=</mo>
        <mn>7926</mn>
      </mrow>
      <mi mathvariant="italic">мм</mi>
    </mrow>
    <annotation encoding="StarMath 5.0">L_{ср} = {F_{Ф}} over {π cdot n cdot d_{ср} cdot 10^{-3}} = {6358,3} over {π cdot 15960 cdot 16 cdot 10^{-3}} =  7926 мм</annotation>
  </semantics>
</math>
</file>

<file path=Object 128/content.xml><?xml version="1.0" encoding="utf-8"?>
<math xmlns="http://www.w3.org/1998/Math/MathML" display="block">
  <semantics>
    <mrow>
      <mrow>
        <msub>
          <mi>R</mi>
          <mi mathvariant="italic">MIN</mi>
        </msub>
        <mo stretchy="false">=</mo>
        <mfrac>
          <msub>
            <mi>b</mi>
            <mrow>
              <mi mathvariant="italic">св</mi>
              <mn>1</mn>
            </mrow>
          </msub>
          <mn>2</mn>
        </mfrac>
        <mo stretchy="false">=</mo>
        <mfrac>
          <mn>130</mn>
          <mn>2</mn>
        </mfrac>
        <mo stretchy="false">=</mo>
        <mn>65</mn>
      </mrow>
      <mi mathvariant="italic">мм</mi>
    </mrow>
    <annotation encoding="StarMath 5.0">R_{MIN} = {b_{св1}} over {2} = {130} over {2} = 65 мм</annotation>
  </semantics>
</math>
</file>

<file path=Object 129/content.xml><?xml version="1.0" encoding="utf-8"?>
<math xmlns="http://www.w3.org/1998/Math/MathML" display="block">
  <semantics>
    <mrow>
      <mrow>
        <msub>
          <mi>L</mi>
          <mi mathvariant="italic">пр</mi>
        </msub>
        <mo stretchy="false">=</mo>
        <mfrac>
          <mrow>
            <msub>
              <mi>L</mi>
              <mi mathvariant="italic">ср</mi>
            </msub>
            <mo stretchy="false">−</mo>
            <mrow>
              <mi>π</mi>
              <mo stretchy="false">⋅</mo>
              <msub>
                <mi>R</mi>
                <mi mathvariant="italic">ср</mi>
              </msub>
            </mrow>
          </mrow>
          <mn>2</mn>
        </mfrac>
        <mo stretchy="false">=</mo>
        <mfrac>
          <mrow>
            <mn>7,926</mn>
            <mo stretchy="false">−</mo>
            <mrow>
              <mi>π</mi>
              <mo stretchy="false">⋅</mo>
              <mn>1,04675</mn>
            </mrow>
          </mrow>
          <mn>2</mn>
        </mfrac>
        <mo stretchy="false">=</mo>
        <mn>2,3186</mn>
      </mrow>
      <mi>м</mi>
    </mrow>
    <annotation encoding="StarMath 5.0">L_{пр} = {L_{ср} - π cdot R_{ср}} over {2} = {7,926 - π cdot 1,04675} over {2} = 2,3186 м</annotation>
  </semantics>
</math>
</file>

<file path=Object 13/content.xml><?xml version="1.0" encoding="utf-8"?>
<math xmlns="http://www.w3.org/1998/Math/MathML" display="block">
  <semantics>
    <msub>
      <mi>x</mi>
      <mn>2</mn>
    </msub>
    <annotation encoding="StarMath 5.0">{x} rsub {2}</annotation>
  </semantics>
</math>
</file>

<file path=Object 130/content.xml><?xml version="1.0" encoding="utf-8"?>
<math xmlns="http://www.w3.org/1998/Math/MathML" display="block">
  <semantics>
    <mrow>
      <mrow>
        <mover accent="true">
          <mi>k</mi>
          <mo>¯</mo>
        </mover>
        <mo stretchy="false">=</mo>
        <mfrac>
          <mrow>
            <msub>
              <mi>k</mi>
              <mi mathvariant="italic">вх</mi>
            </msub>
            <mo stretchy="false">+</mo>
            <msub>
              <mi>k</mi>
              <mi mathvariant="italic">вых</mi>
            </msub>
          </mrow>
          <mn>2</mn>
        </mfrac>
        <mo stretchy="false">=</mo>
        <mfrac>
          <mrow>
            <mn>5293,9</mn>
            <mo stretchy="false">+</mo>
            <mn>4187,9</mn>
          </mrow>
          <mn>2</mn>
        </mfrac>
        <mo stretchy="false">=</mo>
        <mn>4740,9</mn>
      </mrow>
      <mfrac>
        <mi mathvariant="italic">Вт</mi>
        <mrow>
          <mrow>
            <msup>
              <mi>м</mi>
              <mn>2</mn>
            </msup>
            <mo stretchy="false">⋅</mo>
            <mi>°</mi>
          </mrow>
          <mi>С</mi>
        </mrow>
      </mfrac>
    </mrow>
    <annotation encoding="StarMath 5.0">overline{k} = {k_{вх} + k_{вых}} over {2} = {5293,9 + 4187,9} over {2} = 4740,9 {{Вт} over {м^2 cdot °С}}</annotation>
  </semantics>
</math>
</file>

<file path=Object 131/content.xml><?xml version="1.0" encoding="utf-8"?>
<math xmlns="http://www.w3.org/1998/Math/MathML" display="block">
  <semantics>
    <mrow>
      <mrow>
        <msub>
          <mi>L</mi>
          <mi mathvariant="italic">max</mi>
        </msub>
        <mo stretchy="false">=</mo>
        <mn>2</mn>
      </mrow>
      <mrow>
        <msub>
          <mi>L</mi>
          <mi mathvariant="italic">пр</mi>
        </msub>
        <mo stretchy="false">+</mo>
        <mrow>
          <mi>π</mi>
          <mo stretchy="false">⋅</mo>
          <msub>
            <mi>R</mi>
            <mi mathvariant="italic">max</mi>
          </msub>
        </mrow>
        <mo stretchy="false">+</mo>
        <mn>2</mn>
      </mrow>
      <mrow>
        <mi>a</mi>
        <mo stretchy="false">=</mo>
        <mrow>
          <mrow>
            <mn>2</mn>
            <mo stretchy="false">⋅</mo>
            <mn>2,3186</mn>
          </mrow>
          <mo stretchy="false">+</mo>
          <mrow>
            <mi>π</mi>
            <mo stretchy="false">⋅</mo>
            <mn>2,0285</mn>
          </mrow>
          <mo stretchy="false">+</mo>
          <mrow>
            <mn>2</mn>
            <mo stretchy="false">⋅</mo>
            <mn>0,89925</mn>
          </mrow>
        </mrow>
        <mo stretchy="false">=</mo>
        <mn>12,808</mn>
      </mrow>
      <mi>м</mi>
    </mrow>
    <annotation encoding="StarMath 5.0">L_{max} = 2 L_{пр} + π cdot R_{max} + 2 a = 2 cdot 2,3186 + π cdot 2,0285 + 2 cdot 0,89925 =  12,808 м</annotation>
  </semantics>
</math>
</file>

<file path=Object 132/content.xml><?xml version="1.0" encoding="utf-8"?>
<math xmlns="http://www.w3.org/1998/Math/MathML" display="block">
  <semantics>
    <mrow>
      <mrow>
        <msub>
          <mi>L</mi>
          <mi mathvariant="italic">min</mi>
        </msub>
        <mo stretchy="false">=</mo>
        <mn>2</mn>
      </mrow>
      <mrow>
        <msub>
          <mi>L</mi>
          <mi mathvariant="italic">пр</mi>
        </msub>
        <mo stretchy="false">+</mo>
        <mrow>
          <mi>π</mi>
          <mo stretchy="false">⋅</mo>
          <msub>
            <mi>R</mi>
            <mi mathvariant="italic">min</mi>
          </msub>
        </mrow>
        <mo stretchy="false">+</mo>
        <mn>2</mn>
      </mrow>
      <mrow>
        <mi>a</mi>
        <mo stretchy="false">=</mo>
        <mrow>
          <mn>4,6372</mn>
          <mo stretchy="false">+</mo>
          <mrow>
            <mi>π</mi>
            <mo stretchy="false">⋅</mo>
            <mn>0,065</mn>
          </mrow>
          <mo stretchy="false">+</mo>
          <mn>1,7985</mn>
        </mrow>
        <mo stretchy="false">=</mo>
        <mn>6,640</mn>
      </mrow>
      <mi>м</mi>
    </mrow>
    <annotation encoding="StarMath 5.0">L_{min} = 2 L_{пр} + π cdot R_{min} + 2 a = 4,6372 + π cdot 0,065 + 1,7985 =  6,640 м</annotation>
  </semantics>
</math>
</file>

<file path=Object 133/content.xml><?xml version="1.0" encoding="utf-8"?>
<math xmlns="http://www.w3.org/1998/Math/MathML" display="block">
  <semantics>
    <mrow>
      <mrow>
        <msub>
          <mi>L</mi>
          <mi mathvariant="italic">об</mi>
        </msub>
        <mo stretchy="false">=</mo>
        <mn>2</mn>
      </mrow>
      <mrow>
        <mrow>
          <mrow>
            <mo fence="true" form="prefix" stretchy="false">(</mo>
            <mrow>
              <mrow>
                <msub>
                  <mi>L</mi>
                  <mi mathvariant="italic">пр</mi>
                </msub>
                <mo stretchy="false">+</mo>
                <msub>
                  <mi>R</mi>
                  <mi mathvariant="italic">max</mi>
                </msub>
              </mrow>
            </mrow>
            <mo fence="true" form="postfix" stretchy="false">)</mo>
          </mrow>
          <mo stretchy="false">+</mo>
          <msubsup>
            <mi>d</mi>
            <mi>H</mi>
            <mi>K</mi>
          </msubsup>
        </mrow>
        <mo stretchy="false">=</mo>
        <mn>2</mn>
      </mrow>
      <mrow>
        <mrow>
          <mrow>
            <mo fence="true" form="prefix" stretchy="false">(</mo>
            <mrow>
              <mrow>
                <mn>2318,6</mn>
                <mo stretchy="false">+</mo>
                <mn>2028,5</mn>
              </mrow>
            </mrow>
            <mo fence="true" form="postfix" stretchy="false">)</mo>
          </mrow>
          <mo stretchy="false">+</mo>
          <mn>1,100</mn>
        </mrow>
        <mo stretchy="false">=</mo>
        <mn>9794</mn>
      </mrow>
      <mi mathvariant="italic">мм</mi>
    </mrow>
    <annotation encoding="StarMath 5.0">L_{об} = 2 (L_{пр} + R_{max}) + d_H^K = 2 (2318,6 + 2028,5) + 1,100 =  9794 мм</annotation>
  </semantics>
</math>
</file>

<file path=Object 134/content.xml><?xml version="1.0" encoding="utf-8"?>
<math xmlns="http://www.w3.org/1998/Math/MathML" display="block">
  <semantics>
    <mrow>
      <mrow>
        <msub>
          <mi>b</mi>
          <mi mathvariant="italic">дн</mi>
        </msub>
        <mo stretchy="false">=</mo>
        <mn>0,2</mn>
      </mrow>
      <mrow>
        <mi>D</mi>
        <mo stretchy="false">=</mo>
        <mrow>
          <mn>0,2</mn>
          <mo stretchy="false">⋅</mo>
          <mn>4517</mn>
        </mrow>
        <mo stretchy="false">=</mo>
        <mn>903,4</mn>
      </mrow>
      <mrow>
        <mi mathvariant="italic">мм</mi>
        <mo stretchy="false">≈</mo>
        <mn>903</mn>
      </mrow>
      <mi mathvariant="italic">мм</mi>
    </mrow>
    <annotation encoding="StarMath 5.0">b_{дн} = 0,2 D = 0,2 cdot 4517 = 903,4 мм approx 903 мм</annotation>
  </semantics>
</math>
</file>

<file path=Object 135/content.xml><?xml version="1.0" encoding="utf-8"?>
<math xmlns="http://www.w3.org/1998/Math/MathML" display="block">
  <semantics>
    <mrow>
      <mrow>
        <mi>L</mi>
        <mo stretchy="false">=</mo>
        <mrow>
          <msub>
            <mi>L</mi>
            <mi mathvariant="italic">об</mi>
          </msub>
          <mo stretchy="false">+</mo>
          <mn>2</mn>
        </mrow>
      </mrow>
      <mrow>
        <msub>
          <mi>b</mi>
          <mi mathvariant="italic">дн</mi>
        </msub>
        <mo stretchy="false">=</mo>
        <mrow>
          <mn>9794</mn>
          <mo stretchy="false">+</mo>
          <mrow>
            <mn>2</mn>
            <mo stretchy="false">⋅</mo>
            <mn>903</mn>
          </mrow>
        </mrow>
        <mo stretchy="false">=</mo>
        <mn>11600</mn>
      </mrow>
      <mi mathvariant="italic">мм</mi>
    </mrow>
    <annotation encoding="StarMath 5.0">L = L_{об} + 2 b_{дн} = 9794 + 2 cdot 903 = 11600 мм</annotation>
  </semantics>
</math>
</file>

<file path=Object 136/content.xml><?xml version="1.0" encoding="utf-8"?>
<math xmlns="http://www.w3.org/1998/Math/MathML" display="block">
  <semantics>
    <mrow>
      <mrow>
        <msub>
          <mi>S</mi>
          <mrow>
            <mn>1</mn>
            <mi>k</mi>
          </mrow>
        </msub>
        <mo stretchy="false">=</mo>
        <mn>1,5</mn>
      </mrow>
      <mrow>
        <msubsup>
          <mi>d</mi>
          <mi>H</mi>
          <mi>K</mi>
        </msubsup>
        <mo stretchy="false">=</mo>
        <mrow>
          <mn>1,5</mn>
          <mo stretchy="false">⋅</mo>
          <mn>1100</mn>
        </mrow>
        <mo stretchy="false">=</mo>
        <mn>1650</mn>
      </mrow>
      <mi mathvariant="italic">мм</mi>
    </mrow>
    <annotation encoding="StarMath 5.0">S_{1k} = 1,5 d_H^K = 1,5 cdot 1100 = 1650 мм</annotation>
  </semantics>
</math>
</file>

<file path=Object 137/content.xml><?xml version="1.0" encoding="utf-8"?>
<math xmlns="http://www.w3.org/1998/Math/MathML" display="block">
  <semantics>
    <mrow>
      <mrow>
        <msub>
          <mi>S</mi>
          <mrow>
            <mn>2</mn>
            <mi>k</mi>
          </mrow>
        </msub>
        <mo stretchy="false">=</mo>
        <mrow>
          <mfrac>
            <mrow>
              <mi>D</mi>
              <mo stretchy="false">+</mo>
              <msub>
                <mi>b</mi>
                <mrow>
                  <mi mathvariant="italic">св</mi>
                  <mn>1</mn>
                </mrow>
              </msub>
            </mrow>
            <mn>2</mn>
          </mfrac>
          <mo stretchy="false">−</mo>
          <msub>
            <mi>b</mi>
            <mrow>
              <mi mathvariant="italic">св</mi>
              <mn>2</mn>
            </mrow>
          </msub>
        </mrow>
        <mo stretchy="false">=</mo>
        <mrow>
          <mfrac>
            <mrow>
              <mn>4517</mn>
              <mo stretchy="false">+</mo>
              <mn>130</mn>
            </mrow>
            <mn>2</mn>
          </mfrac>
          <mo stretchy="false">−</mo>
          <mn>230</mn>
        </mrow>
        <mo stretchy="false">=</mo>
        <mn>2094</mn>
      </mrow>
      <mi mathvariant="italic">мм</mi>
    </mrow>
    <annotation encoding="StarMath 5.0">S_{2k} = {D + b_{св1}} over {2} - b_{св2} = {4517 + 130} over {2} - 230 = 2094 мм</annotation>
  </semantics>
</math>
</file>

<file path=Object 138/content.xml><?xml version="1.0" encoding="utf-8"?>
<math xmlns="http://www.w3.org/1998/Math/MathML" display="block">
  <semantics>
    <mrow>
      <mrow>
        <msub>
          <mi>L</mi>
          <mrow>
            <mi>ц</mi>
            <mn>.</mn>
            <mi mathvariant="italic">об</mi>
            <mn>.</mn>
            <mi mathvariant="italic">мин</mi>
          </mrow>
        </msub>
        <mo stretchy="false">=</mo>
        <mrow>
          <mn>2</mn>
          <mo stretchy="false">⋅</mo>
          <mn>0,9</mn>
        </mrow>
      </mrow>
      <mrow>
        <mrow>
          <msubsup>
            <mi>d</mi>
            <mi>H</mi>
            <mi>K</mi>
          </msubsup>
          <mo stretchy="false">+</mo>
          <msub>
            <mi>S</mi>
            <mrow>
              <mn>1</mn>
              <mi>k</mi>
            </mrow>
          </msub>
        </mrow>
        <mo stretchy="false">=</mo>
        <mrow>
          <mrow>
            <mn>2</mn>
            <mo stretchy="false">⋅</mo>
            <mn>0,9</mn>
            <mo stretchy="false">⋅</mo>
            <mn>1100</mn>
          </mrow>
          <mo stretchy="false">+</mo>
          <mn>1650</mn>
        </mrow>
        <mo stretchy="false">=</mo>
        <mn>3630</mn>
      </mrow>
      <mi mathvariant="italic">мм</mi>
    </mrow>
    <annotation encoding="StarMath 5.0">L_{ц.об. мин} = 2 cdot 0,9 d_H^K + S_{1k} = 2 cdot 0,9 cdot 1100 + 1650 = 3630 мм</annotation>
  </semantics>
</math>
</file>

<file path=Object 139/content.xml><?xml version="1.0" encoding="utf-8"?>
<math xmlns="http://www.w3.org/1998/Math/MathML" display="block">
  <semantics>
    <mrow>
      <mrow>
        <msub>
          <mi>L</mi>
          <mrow>
            <mi mathvariant="italic">кр</mi>
            <mn>.</mn>
            <mi mathvariant="italic">об</mi>
          </mrow>
        </msub>
        <mo stretchy="false">=</mo>
        <mfrac>
          <mrow>
            <msub>
              <mi>L</mi>
              <mi mathvariant="italic">об</mi>
            </msub>
            <mo stretchy="false">−</mo>
            <msub>
              <mi>L</mi>
              <mrow>
                <mi>ц</mi>
                <mn>.</mn>
                <mi mathvariant="italic">об</mi>
              </mrow>
            </msub>
          </mrow>
          <mn>2</mn>
        </mfrac>
        <mo stretchy="false">=</mo>
        <mfrac>
          <mrow>
            <mn>9794</mn>
            <mo stretchy="false">−</mo>
            <mn>3630</mn>
          </mrow>
          <mn>2</mn>
        </mfrac>
        <mo stretchy="false">=</mo>
        <mn>3082</mn>
      </mrow>
      <mi mathvariant="italic">мм</mi>
    </mrow>
    <annotation encoding="StarMath 5.0">L_{кр.об} = {L_{об} - L_{ц.об}} over {2} = {9794 - 3630} over {2} = 3082 мм</annotation>
  </semantics>
</math>
</file>

<file path=Object 14/content.xml><?xml version="1.0" encoding="utf-8"?>
<math xmlns="http://www.w3.org/1998/Math/MathML" display="block">
  <semantics>
    <msub>
      <mi>D</mi>
      <mtext>ПР</mtext>
    </msub>
    <annotation encoding="StarMath 5.0">{D} rsub {"ПР"}</annotation>
  </semantics>
</math>
</file>

<file path=Object 140/content.xml><?xml version="1.0" encoding="utf-8"?>
<math xmlns="http://www.w3.org/1998/Math/MathML" display="block">
  <semantics>
    <mrow>
      <mrow>
        <msub>
          <mi>d</mi>
          <mi mathvariant="italic">пв</mi>
        </msub>
        <mo stretchy="false">=</mo>
        <mn>1000</mn>
      </mrow>
      <mrow>
        <msqrt>
          <mfrac>
            <mrow>
              <mn>4</mn>
              <msub>
                <mi>D</mi>
                <mi mathvariant="italic">пв</mi>
              </msub>
            </mrow>
            <mrow>
              <mi>π</mi>
              <msub>
                <mi>ρ</mi>
                <mi mathvariant="italic">пв</mi>
              </msub>
              <msub>
                <mi>w</mi>
                <mi mathvariant="italic">пв</mi>
              </msub>
            </mrow>
          </mfrac>
        </msqrt>
        <mo stretchy="false">=</mo>
        <mn>1000</mn>
      </mrow>
      <mrow>
        <msqrt>
          <mfrac>
            <mrow>
              <mn>4</mn>
              <mo stretchy="false">⋅</mo>
              <mn>322,24</mn>
            </mrow>
            <mrow>
              <mi>π</mi>
              <mo stretchy="false">⋅</mo>
              <mn>836,61</mn>
              <mo stretchy="false">⋅</mo>
              <mn>5,0</mn>
            </mrow>
          </mfrac>
        </msqrt>
        <mo stretchy="false">=</mo>
        <mn>313</mn>
      </mrow>
      <mi mathvariant="italic">мм</mi>
    </mrow>
    <annotation encoding="StarMath 5.0">d_{пв} = 1000 sqrt { {4 D_{пв}} over {π ρ_{пв} w_{пв}} } = 1000 sqrt { {4 cdot 322,24} over {π cdot 836,61 cdot 5,0} } =  313 мм</annotation>
  </semantics>
</math>
</file>

<file path=Object 141/content.xml><?xml version="1.0" encoding="utf-8"?>
<math xmlns="http://www.w3.org/1998/Math/MathML" display="block">
  <semantics>
    <mrow>
      <mrow>
        <msubsup>
          <mi>w</mi>
          <mn>1</mn>
          <mi>г</mi>
        </msubsup>
        <mo stretchy="false">=</mo>
        <mfrac>
          <msub>
            <mi>G</mi>
            <mn>1</mn>
          </msub>
          <mrow>
            <msubsup>
              <mi>ρ</mi>
              <mn>1</mn>
              <mi>г</mi>
            </msubsup>
            <mo stretchy="false">⋅</mo>
            <msub>
              <mi>S</mi>
              <mi>К</mi>
            </msub>
          </mrow>
        </mfrac>
        <mo stretchy="false">=</mo>
        <mfrac>
          <mn>3870,73</mn>
          <mrow>
            <mn>703,38</mn>
            <mo stretchy="false">⋅</mo>
            <mn>0,5281</mn>
          </mrow>
        </mfrac>
        <mo stretchy="false">=</mo>
        <mn>10,42</mn>
      </mrow>
      <mrow>
        <mi>м</mi>
        <mo stretchy="false">/</mo>
        <mi>с</mi>
      </mrow>
    </mrow>
    <annotation encoding="StarMath 5.0">w_{1}^{г} = {G_{1}} over {ρ_{1}^{г} cdot S_{К}} = {3870,73} over {703,38 cdot 0,5281} =  10,42 м/с
</annotation>
  </semantics>
</math>
</file>

<file path=Object 142/content.xml><?xml version="1.0" encoding="utf-8"?>
<math xmlns="http://www.w3.org/1998/Math/MathML" display="block">
  <semantics>
    <mrow>
      <mrow>
        <msub>
          <mi>d</mi>
          <mi>п</mi>
        </msub>
        <mo stretchy="false">=</mo>
        <mn>1000</mn>
      </mrow>
      <mrow>
        <msqrt>
          <mfrac>
            <mrow>
              <mn>4</mn>
              <msub>
                <mi>D</mi>
                <mi>п</mi>
              </msub>
            </mrow>
            <mrow>
              <mi>π</mi>
              <msub>
                <mi>ρ</mi>
                <mn>2</mn>
              </msub>
              <msub>
                <mi>w</mi>
                <mi>п</mi>
              </msub>
              <msub>
                <mi>n</mi>
                <mi>п</mi>
              </msub>
            </mrow>
          </mfrac>
        </msqrt>
        <mo stretchy="false">=</mo>
        <msub>
          <mi>d</mi>
          <mi>п</mi>
        </msub>
        <mo stretchy="false">=</mo>
        <mn>1000</mn>
      </mrow>
      <mrow>
        <msqrt>
          <mfrac>
            <mrow>
              <mn>4</mn>
              <mo stretchy="false">⋅</mo>
              <mn>320</mn>
            </mrow>
            <mrow>
              <mi>π</mi>
              <mo stretchy="false">⋅</mo>
              <mn>29,08</mn>
              <mo stretchy="false">⋅</mo>
              <mn>15,0</mn>
              <mo stretchy="false">⋅</mo>
              <mn>10</mn>
            </mrow>
          </mfrac>
        </msqrt>
        <mo stretchy="false">=</mo>
        <mn>306</mn>
      </mrow>
      <mi mathvariant="italic">мм</mi>
    </mrow>
    <annotation encoding="StarMath 5.0">d_п = 1000 sqrt { {4 D_п} over {π ρ_2 w_п n_п} } = d_{п} = 1000 sqrt { {4 cdot 320} over {π cdot 29,08 cdot 15,0 cdot 10} } =  306 мм</annotation>
  </semantics>
</math>
</file>

<file path=Object 143/content.xml><?xml version="1.0" encoding="utf-8"?>
<math xmlns="http://www.w3.org/1998/Math/MathML" display="block">
  <semantics>
    <mrow>
      <mrow>
        <msub>
          <mi>d</mi>
          <mi mathvariant="italic">кт</mi>
        </msub>
        <mo stretchy="false">=</mo>
        <mrow>
          <msubsup>
            <mi>d</mi>
            <mi>H</mi>
            <mi>K</mi>
          </msubsup>
          <mo stretchy="false">+</mo>
          <mn>10</mn>
        </mrow>
        <mo stretchy="false">=</mo>
        <mrow>
          <mn>1100</mn>
          <mo stretchy="false">+</mo>
          <mn>10</mn>
        </mrow>
        <mo stretchy="false">=</mo>
        <mn>1110</mn>
      </mrow>
      <mi mathvariant="italic">мм</mi>
    </mrow>
    <annotation encoding="StarMath 5.0">d_{кт} = d_H^K + 10 = 1100 + 10 = 1110 мм</annotation>
  </semantics>
</math>
</file>

<file path=Object 144/content.xml><?xml version="1.0" encoding="utf-8"?>
<math xmlns="http://www.w3.org/1998/Math/MathML" display="block">
  <semantics>
    <msub>
      <mi>n</mi>
      <mn>1</mn>
    </msub>
    <annotation encoding="StarMath 5.0">n_{1}</annotation>
  </semantics>
</math>
</file>

<file path=Object 145/content.xml><?xml version="1.0" encoding="utf-8"?>
<math xmlns="http://www.w3.org/1998/Math/MathML" display="block">
  <semantics>
    <msub>
      <mi>n</mi>
      <mn>1</mn>
    </msub>
    <annotation encoding="StarMath 5.0">n_{1}</annotation>
  </semantics>
</math>
</file>

<file path=Object 146/content.xml><?xml version="1.0" encoding="utf-8"?>
<math xmlns="http://www.w3.org/1998/Math/MathML" display="block">
  <semantics>
    <mrow>
      <mrow>
        <msub>
          <mi>R</mi>
          <mi mathvariant="italic">MAX</mi>
        </msub>
        <mo stretchy="false">=</mo>
        <mfrac>
          <mrow>
            <mrow>
              <mi>D</mi>
              <mo stretchy="false">−</mo>
              <mn>2</mn>
            </mrow>
            <msub>
              <mi>b</mi>
              <mrow>
                <mi mathvariant="italic">св</mi>
                <mn>2</mn>
              </mrow>
            </msub>
          </mrow>
          <mn>2</mn>
        </mfrac>
        <mo stretchy="false">=</mo>
        <mfrac>
          <mrow>
            <mn>4517</mn>
            <mo stretchy="false">−</mo>
            <mrow>
              <mn>2</mn>
              <mo stretchy="false">⋅</mo>
              <mn>230</mn>
            </mrow>
          </mrow>
          <mn>2</mn>
        </mfrac>
        <mo stretchy="false">=</mo>
        <mn>2028,5</mn>
      </mrow>
      <mi mathvariant="italic">мм</mi>
    </mrow>
    <annotation encoding="StarMath 5.0">R_{MAX} = {D - 2 b_{св2}} over {2} = {4517 - 2 cdot 230} over {2} = 2028,5 мм</annotation>
  </semantics>
</math>
</file>

<file path=Object 147/content.xml><?xml version="1.0" encoding="utf-8"?>
<math xmlns="http://www.w3.org/1998/Math/MathML" display="block">
  <semantics>
    <mrow>
      <mrow>
        <msub>
          <mi>R</mi>
          <mi mathvariant="italic">CP</mi>
        </msub>
        <mo stretchy="false">=</mo>
        <mfrac>
          <mrow>
            <msub>
              <mi>R</mi>
              <mi mathvariant="italic">MAX</mi>
            </msub>
            <mo stretchy="false">+</mo>
            <msub>
              <mi>R</mi>
              <mi mathvariant="italic">MIN</mi>
            </msub>
          </mrow>
          <mn>2</mn>
        </mfrac>
        <mo stretchy="false">=</mo>
        <mfrac>
          <mrow>
            <mn>2028,5</mn>
            <mo stretchy="false">+</mo>
            <mn>65</mn>
          </mrow>
          <mn>2</mn>
        </mfrac>
        <mo stretchy="false">=</mo>
        <mfrac>
          <mn>2093,5</mn>
          <mn>2</mn>
        </mfrac>
        <mo stretchy="false">=</mo>
        <mn>1046,75</mn>
      </mrow>
      <mi mathvariant="italic">мм</mi>
    </mrow>
    <annotation encoding="StarMath 5.0">R_{CP} = {R_{MAX} + R_{MIN}} over {2} = {2028,5 + 65} over {2} = {2093,5} over {2} = 1046,75 мм</annotation>
  </semantics>
</math>
</file>

<file path=Object 148/content.xml><?xml version="1.0" encoding="utf-8"?>
<math xmlns="http://www.w3.org/1998/Math/MathML" display="block">
  <semantics>
    <mrow>
      <mrow>
        <mi>a</mi>
        <mo stretchy="false">=</mo>
        <mn>0,25</mn>
      </mrow>
      <mrow>
        <mrow>
          <mi>D</mi>
          <mo stretchy="false">−</mo>
          <msub>
            <mi>b</mi>
            <mrow>
              <mi mathvariant="italic">св</mi>
              <mn>2</mn>
            </mrow>
          </msub>
        </mrow>
        <mo stretchy="false">=</mo>
        <mrow>
          <mrow>
            <mn>0,25</mn>
            <mo stretchy="false">⋅</mo>
            <mn>4517</mn>
          </mrow>
          <mo stretchy="false">−</mo>
          <mn>230</mn>
        </mrow>
        <mo stretchy="false">=</mo>
        <mrow>
          <mn>1129,25</mn>
          <mo stretchy="false">−</mo>
          <mn>230</mn>
        </mrow>
        <mo stretchy="false">=</mo>
        <mn>899,25</mn>
      </mrow>
      <mrow>
        <mi mathvariant="italic">мм</mi>
        <mo stretchy="false">=</mo>
        <mn>0,89925</mn>
      </mrow>
      <mi>м</mi>
    </mrow>
    <annotation encoding="StarMath 5.0">a = 0,25 D - b_{св2} = 0,25 cdot 4517 - 230 = 1129,25 - 230 = 899,25 мм = 0,89925 м</annotation>
  </semantics>
</math>
</file>

<file path=Object 149/content.xml><?xml version="1.0" encoding="utf-8"?>
<math xmlns="http://www.w3.org/1998/Math/MathML" display="block">
  <semantics>
    <mrow>
      <mrow>
        <msubsup>
          <mi>ρ</mi>
          <mn>1</mn>
          <mi>г</mi>
        </msubsup>
        <mo stretchy="false">=</mo>
        <mi>f</mi>
      </mrow>
      <mrow>
        <mo fence="true" form="prefix" stretchy="false">(</mo>
        <mrow>
          <mrow>
            <msub>
              <mi>p</mi>
              <mn>1</mn>
            </msub>
            <mi>,</mi>
            <mspace width="1em"/>
            <mi>t</mi>
            <msub>
              <mi>'</mi>
              <mn>1</mn>
            </msub>
          </mrow>
        </mrow>
        <mo fence="true" form="postfix" stretchy="false">)</mo>
      </mrow>
    </mrow>
    <annotation encoding="StarMath 5.0">ρ_{1}^{г} = f( p_1,`` t'_1 )</annotation>
  </semantics>
</math>
</file>

<file path=Object 15/content.xml><?xml version="1.0" encoding="utf-8"?>
<math xmlns="http://www.w3.org/1998/Math/MathML" display="block">
  <semantics>
    <msub>
      <mi>h</mi>
      <mtext>ПР</mtext>
    </msub>
    <annotation encoding="StarMath 5.0">{h} rsub {"ПР"}</annotation>
  </semantics>
</math>
</file>

<file path=Object 150/content.xml><?xml version="1.0" encoding="utf-8"?>
<math xmlns="http://www.w3.org/1998/Math/MathML" display="block">
  <semantics>
    <mrow>
      <msub>
        <mi>A</mi>
        <mi mathvariant="italic">ГК</mi>
      </msub>
      <mo stretchy="false">=</mo>
      <mrow>
        <mn>0,8</mn>
        <mo stretchy="false">−</mo>
        <mfrac>
          <mrow>
            <mn>0,015</mn>
            <mo stretchy="false">⋅</mo>
            <mn>2867</mn>
          </mrow>
          <mn>820</mn>
        </mfrac>
      </mrow>
      <mo stretchy="false">=</mo>
      <mrow>
        <mn>0,8</mn>
        <mo stretchy="false">−</mo>
        <mrow>
          <mn>0,015</mn>
          <mo stretchy="false">⋅</mo>
          <mn>3,4963</mn>
        </mrow>
      </mrow>
      <mo stretchy="false">=</mo>
      <mn>0,7476</mn>
    </mrow>
    <annotation encoding="StarMath 5.0">A_{ГК} = 0,8 - 0,015 cdot {2867} over {820} = 0,8 - 0,015 cdot 3,4963  = 0,7476</annotation>
  </semantics>
</math>
</file>

<file path=Object 151/content.xml><?xml version="1.0" encoding="utf-8"?>
<math xmlns="http://www.w3.org/1998/Math/MathML" display="block">
  <semantics>
    <mrow>
      <mrow>
        <msub>
          <mi mathvariant="italic">Δp</mi>
          <mi mathvariant="italic">ГК</mi>
        </msub>
        <mo stretchy="false">=</mo>
        <mrow>
          <mfrac>
            <mrow>
              <msub>
                <mi>A</mi>
                <mi mathvariant="italic">ГК</mi>
              </msub>
              <mo stretchy="false">⋅</mo>
              <msubsup>
                <mi>ρ</mi>
                <mn>1</mn>
                <mi>г</mi>
              </msubsup>
              <mo stretchy="false">⋅</mo>
              <msup>
                <mrow>
                  <mo fence="true" form="prefix" stretchy="false">(</mo>
                  <mrow>
                    <msubsup>
                      <mi>w</mi>
                      <mn>1</mn>
                      <mi>г</mi>
                    </msubsup>
                  </mrow>
                  <mo fence="true" form="postfix" stretchy="false">)</mo>
                </mrow>
                <mn>2</mn>
              </msup>
            </mrow>
            <mn>2</mn>
          </mfrac>
          <mo stretchy="false">⋅</mo>
          <msup>
            <mn>10</mn>
            <mrow>
              <mo stretchy="false">−</mo>
              <mn>3</mn>
            </mrow>
          </msup>
        </mrow>
        <mo stretchy="false">=</mo>
        <mrow>
          <mfrac>
            <mrow>
              <mn>0,7476</mn>
              <mo stretchy="false">⋅</mo>
              <mn>703,38</mn>
              <mo stretchy="false">⋅</mo>
              <msup>
                <mrow>
                  <mo fence="true" form="prefix" stretchy="false">(</mo>
                  <mrow>
                    <mn>10,42</mn>
                  </mrow>
                  <mo fence="true" form="postfix" stretchy="false">)</mo>
                </mrow>
                <mn>2</mn>
              </msup>
            </mrow>
            <mn>2</mn>
          </mfrac>
          <mo stretchy="false">⋅</mo>
          <msup>
            <mn>10</mn>
            <mrow>
              <mo stretchy="false">−</mo>
              <mn>3</mn>
            </mrow>
          </msup>
        </mrow>
        <mo stretchy="false">=</mo>
        <mn>2,90</mn>
      </mrow>
      <mi mathvariant="italic">кПа</mi>
    </mrow>
    <annotation encoding="StarMath 5.0">Δp_{ГК} = A_{ГК} cdot ρ_{1}^{г} cdot {(w_{1}^{г})^2} over {2} cdot 10^{-3} = 0,7476 cdot 703,38 cdot {(10,42)^2} over {2} cdot 10^{-3} = 2,90 кПа</annotation>
  </semantics>
</math>
</file>

<file path=Object 152/content.xml><?xml version="1.0" encoding="utf-8"?>
<math xmlns="http://www.w3.org/1998/Math/MathML" display="block">
  <semantics>
    <mrow>
      <mrow>
        <msub>
          <mi mathvariant="italic">Δp</mi>
          <mi mathvariant="italic">ХК</mi>
        </msub>
        <mo stretchy="false">=</mo>
        <mrow>
          <mfrac>
            <mrow>
              <msub>
                <mi>A</mi>
                <mi mathvariant="italic">ХК</mi>
              </msub>
              <mo stretchy="false">⋅</mo>
              <msubsup>
                <mi>ρ</mi>
                <mn>1</mn>
                <mi>х</mi>
              </msubsup>
              <mo stretchy="false">⋅</mo>
              <msup>
                <mrow>
                  <mo fence="true" form="prefix" stretchy="false">(</mo>
                  <mrow>
                    <msubsup>
                      <mi>w</mi>
                      <mn>1</mn>
                      <mi>х</mi>
                    </msubsup>
                  </mrow>
                  <mo fence="true" form="postfix" stretchy="false">)</mo>
                </mrow>
                <mn>2</mn>
              </msup>
            </mrow>
            <mn>2</mn>
          </mfrac>
          <mo stretchy="false">⋅</mo>
          <msup>
            <mn>10</mn>
            <mrow>
              <mo stretchy="false">−</mo>
              <mn>3</mn>
            </mrow>
          </msup>
        </mrow>
        <mo stretchy="false">=</mo>
        <mrow>
          <mfrac>
            <mrow>
              <mn>2,5874</mn>
              <mo stretchy="false">⋅</mo>
              <mn>757,09</mn>
              <mo stretchy="false">⋅</mo>
              <msup>
                <mrow>
                  <mo fence="true" form="prefix" stretchy="false">(</mo>
                  <mrow>
                    <mn>9,68</mn>
                  </mrow>
                  <mo fence="true" form="postfix" stretchy="false">)</mo>
                </mrow>
                <mn>2</mn>
              </msup>
            </mrow>
            <mn>2</mn>
          </mfrac>
          <mo stretchy="false">⋅</mo>
          <msup>
            <mn>10</mn>
            <mrow>
              <mo stretchy="false">−</mo>
              <mn>3</mn>
            </mrow>
          </msup>
        </mrow>
        <mo stretchy="false">=</mo>
        <mn>10,13</mn>
      </mrow>
      <mi mathvariant="italic">кПа</mi>
    </mrow>
    <annotation encoding="StarMath 5.0">Δp_{ХК} = A_{ХК} cdot ρ_{1}^{х} cdot {(w_{1}^{х})^2} over {2} cdot 10^{-3} = 2,5874 cdot 757,09 cdot {(9,68)^2} over {2} cdot 10^{-3} =  10,13 кПа</annotation>
  </semantics>
</math>
</file>

<file path=Object 153/content.xml><?xml version="1.0" encoding="utf-8"?>
<math xmlns="http://www.w3.org/1998/Math/MathML" display="block">
  <semantics>
    <mrow>
      <mrow>
        <msubsup>
          <mi>w</mi>
          <mn>1</mn>
          <mi>х</mi>
        </msubsup>
        <mo stretchy="false">=</mo>
        <mfrac>
          <msub>
            <mi>G</mi>
            <mn>1</mn>
          </msub>
          <mrow>
            <msubsup>
              <mi>ρ</mi>
              <mn>1</mn>
              <mi>х</mi>
            </msubsup>
            <mo stretchy="false">⋅</mo>
            <msub>
              <mi>S</mi>
              <mi>К</mi>
            </msub>
          </mrow>
        </mfrac>
        <mo stretchy="false">=</mo>
        <mfrac>
          <mn>3870,73</mn>
          <mrow>
            <mn>757,09</mn>
            <mo stretchy="false">⋅</mo>
            <mn>0,5281</mn>
          </mrow>
        </mfrac>
        <mo stretchy="false">=</mo>
        <mn>9,68</mn>
      </mrow>
      <mrow>
        <mi>м</mi>
        <mo stretchy="false">/</mo>
        <mi>с</mi>
      </mrow>
    </mrow>
    <annotation encoding="StarMath 5.0">w_{1}^{х} = {G_{1}} over {ρ_{1}^{х} cdot S_{К}} = {3870,73} over {757,09 cdot 0,5281} =  9,68 м/с
</annotation>
  </semantics>
</math>
</file>

<file path=Object 154/content.xml><?xml version="1.0" encoding="utf-8"?>
<math xmlns="http://www.w3.org/1998/Math/MathML" display="block">
  <semantics>
    <mrow>
      <mrow>
        <msubsup>
          <mi>ρ</mi>
          <mn>1</mn>
          <mi>х</mi>
        </msubsup>
        <mo stretchy="false">=</mo>
        <mi>f</mi>
      </mrow>
      <mrow>
        <mo fence="true" form="prefix" stretchy="false">(</mo>
        <mrow>
          <mrow>
            <msub>
              <mi>p</mi>
              <mn>1</mn>
            </msub>
            <mi>,</mi>
            <mspace width="1em"/>
            <mi>t</mi>
            <mi>'</mi>
            <msub>
              <mi>'</mi>
              <mn>1</mn>
            </msub>
          </mrow>
        </mrow>
        <mo fence="true" form="postfix" stretchy="false">)</mo>
      </mrow>
    </mrow>
    <annotation encoding="StarMath 5.0">ρ_{1}^{х} = f( p_1,`` t''_1 )</annotation>
  </semantics>
</math>
</file>

<file path=Object 155/content.xml><?xml version="1.0" encoding="utf-8"?>
<math xmlns="http://www.w3.org/1998/Math/MathML" display="block">
  <semantics>
    <mrow>
      <msub>
        <mi>A</mi>
        <mi mathvariant="italic">ХК</mi>
      </msub>
      <mo stretchy="false">=</mo>
      <mrow>
        <mn>2,5</mn>
        <mo stretchy="false">+</mo>
        <mfrac>
          <mrow>
            <mn>0,025</mn>
            <mo stretchy="false">⋅</mo>
            <msub>
              <mi>L</mi>
              <mi>К</mi>
            </msub>
          </mrow>
          <msubsup>
            <mi>d</mi>
            <mi mathvariant="italic">ВН</mi>
            <mi>К</mi>
          </msubsup>
        </mfrac>
      </mrow>
      <mo stretchy="false">=</mo>
      <mrow>
        <mn>2,5</mn>
        <mo stretchy="false">+</mo>
        <mfrac>
          <mrow>
            <mn>0,025</mn>
            <mo stretchy="false">⋅</mo>
            <mn>2867</mn>
          </mrow>
          <mn>820</mn>
        </mfrac>
      </mrow>
      <mo stretchy="false">=</mo>
      <mn>2,5874</mn>
    </mrow>
    <annotation encoding="StarMath 5.0">A_{ХК} = 2,5 + 0,025 cdot {L_{К}} over {d_{ВН}^{К}}  = 2,5 + 0,025 cdot {2867} over {820} =  2,5874</annotation>
  </semantics>
</math>
</file>

<file path=Object 156/content.xml><?xml version="1.0" encoding="utf-8"?>
<math xmlns="http://www.w3.org/1998/Math/MathML" display="block">
  <semantics>
    <mrow>
      <mi>Δ</mi>
      <mrow>
        <mover accent="true">
          <msub>
            <mi>p</mi>
            <mi mathvariant="italic">КОЛ</mi>
          </msub>
          <mo>¯</mo>
        </mover>
        <mo stretchy="false">=</mo>
        <mfrac>
          <mn>2</mn>
          <mn>3</mn>
        </mfrac>
      </mrow>
      <mrow>
        <mrow>
          <mo fence="true" form="prefix" stretchy="false">(</mo>
          <mrow>
            <mrow>
              <msub>
                <mi mathvariant="italic">Δp</mi>
                <mi mathvariant="italic">ХК</mi>
              </msub>
              <mo stretchy="false">−</mo>
              <msub>
                <mi mathvariant="italic">Δp</mi>
                <mi mathvariant="italic">ГК</mi>
              </msub>
            </mrow>
          </mrow>
          <mo fence="true" form="postfix" stretchy="false">)</mo>
        </mrow>
        <mo stretchy="false">=</mo>
        <mfrac>
          <mn>2</mn>
          <mn>3</mn>
        </mfrac>
      </mrow>
      <mrow>
        <mrow>
          <mo fence="true" form="prefix" stretchy="false">(</mo>
          <mrow>
            <mrow>
              <mn>10,13</mn>
              <mo stretchy="false">−</mo>
              <mn>2,90</mn>
            </mrow>
          </mrow>
          <mo fence="true" form="postfix" stretchy="false">)</mo>
        </mrow>
        <mo stretchy="false">=</mo>
        <mn>4,82</mn>
      </mrow>
      <mi mathvariant="italic">кПа</mi>
    </mrow>
    <annotation encoding="StarMath 5.0">Δ overline{p}_{КОЛ} = {2} over {3} (Δp_{ХК} - Δp_{ГК}) = {2} over {3} (10,13 - 2,90) =  4,82 кПа
</annotation>
  </semantics>
</math>
</file>

<file path=Object 157/content.xml><?xml version="1.0" encoding="utf-8"?>
<math xmlns="http://www.w3.org/1998/Math/MathML" display="block">
  <semantics>
    <mrow>
      <mrow>
        <msub>
          <mi>S</mi>
          <mi mathvariant="italic">ПТО</mi>
        </msub>
        <mo stretchy="false">=</mo>
        <mfrac>
          <mrow>
            <mi>n</mi>
            <mo stretchy="false">⋅</mo>
            <mi>π</mi>
            <mo stretchy="false">⋅</mo>
            <msup>
              <mrow>
                <mo fence="true" form="prefix" stretchy="false">(</mo>
                <mrow>
                  <msub>
                    <mi>d</mi>
                    <mi mathvariant="italic">ВН</mi>
                  </msub>
                </mrow>
                <mo fence="true" form="postfix" stretchy="false">)</mo>
              </mrow>
              <mn>2</mn>
            </msup>
          </mrow>
          <mn>4</mn>
        </mfrac>
        <mo stretchy="false">=</mo>
        <mfrac>
          <mrow>
            <mn>15960</mn>
            <mo stretchy="false">⋅</mo>
            <mi>π</mi>
            <mo stretchy="false">⋅</mo>
            <msup>
              <mrow>
                <mo fence="true" form="prefix" stretchy="false">(</mo>
                <mrow>
                  <mn>0,013</mn>
                </mrow>
                <mo fence="true" form="postfix" stretchy="false">)</mo>
              </mrow>
              <mn>2</mn>
            </msup>
          </mrow>
          <mn>4</mn>
        </mfrac>
        <mo stretchy="false">=</mo>
        <mn>2,118</mn>
      </mrow>
      <msup>
        <mi>м</mi>
        <mn>2</mn>
      </msup>
    </mrow>
    <annotation encoding="StarMath 5.0">S_{ПТО} = n cdot {π cdot (d_{ВН})^2} over {4} = 15960 cdot {π cdot (0,013)^2} over {4} =  2,118 м^2
</annotation>
  </semantics>
</math>
</file>

<file path=Object 158/content.xml><?xml version="1.0" encoding="utf-8"?>
<math xmlns="http://www.w3.org/1998/Math/MathML" display="block">
  <semantics>
    <mrow>
      <mrow>
        <msubsup>
          <mi>w</mi>
          <mn>1</mn>
          <mi mathvariant="italic">вх</mi>
        </msubsup>
        <mo stretchy="false">=</mo>
        <mfrac>
          <msub>
            <mi>G</mi>
            <mn>1</mn>
          </msub>
          <mrow>
            <msubsup>
              <mi>ρ</mi>
              <mn>1</mn>
              <mi>г</mi>
            </msubsup>
            <mo stretchy="false">⋅</mo>
            <msub>
              <mi>S</mi>
              <mi mathvariant="italic">ПТО</mi>
            </msub>
          </mrow>
        </mfrac>
        <mo stretchy="false">=</mo>
        <mfrac>
          <mn>3870,73</mn>
          <mrow>
            <mn>703,38</mn>
            <mo stretchy="false">⋅</mo>
            <mn>2,118</mn>
          </mrow>
        </mfrac>
        <mo stretchy="false">=</mo>
        <mn>2,60</mn>
      </mrow>
      <mrow>
        <mi>м</mi>
        <mo stretchy="false">/</mo>
        <mi>с</mi>
      </mrow>
    </mrow>
    <annotation encoding="StarMath 5.0">w_{1}^{вх} = {G_{1}} over {ρ_{1}^{г} cdot S_{ПТО}} = {3870,73} over {703,38 cdot 2,118} = 2,60 м/с
</annotation>
  </semantics>
</math>
</file>

<file path=Object 159/content.xml><?xml version="1.0" encoding="utf-8"?>
<math xmlns="http://www.w3.org/1998/Math/MathML" display="block">
  <semantics>
    <mrow>
      <mrow>
        <msubsup>
          <mi>w</mi>
          <mn>1</mn>
          <mi mathvariant="italic">вых</mi>
        </msubsup>
        <mo stretchy="false">=</mo>
        <mfrac>
          <msub>
            <mi>G</mi>
            <mn>1</mn>
          </msub>
          <mrow>
            <msubsup>
              <mi>ρ</mi>
              <mn>1</mn>
              <mi>х</mi>
            </msubsup>
            <mo stretchy="false">⋅</mo>
            <msub>
              <mi>S</mi>
              <mi mathvariant="italic">ПТО</mi>
            </msub>
          </mrow>
        </mfrac>
        <mo stretchy="false">=</mo>
        <mfrac>
          <mn>3870,73</mn>
          <mrow>
            <mn>757,09</mn>
            <mo stretchy="false">⋅</mo>
            <mn>2,118</mn>
          </mrow>
        </mfrac>
        <mo stretchy="false">=</mo>
        <mn>2,41</mn>
      </mrow>
      <mrow>
        <mi>м</mi>
        <mo stretchy="false">/</mo>
        <mi>с</mi>
      </mrow>
    </mrow>
    <annotation encoding="StarMath 5.0">w_{1}^{вых} = {G_{1}} over {ρ_{1}^{х} cdot S_{ПТО}} = {3870,73} over {757,09 cdot 2,118} =  2,41 м/с
</annotation>
  </semantics>
</math>
</file>

<file path=Object 16/content.xml><?xml version="1.0" encoding="utf-8"?>
<math xmlns="http://www.w3.org/1998/Math/MathML" display="block">
  <semantics>
    <msub>
      <mi>P</mi>
      <mn>1</mn>
    </msub>
    <annotation encoding="StarMath 5.0">{P} rsub {1}</annotation>
  </semantics>
</math>
</file>

<file path=Object 160/content.xml><?xml version="1.0" encoding="utf-8"?>
<math xmlns="http://www.w3.org/1998/Math/MathML" display="block">
  <semantics>
    <mrow>
      <mrow>
        <msubsup>
          <mi mathvariant="italic">Δp</mi>
          <mi>М</mi>
          <mi mathvariant="italic">вх</mi>
        </msubsup>
        <mo stretchy="false">=</mo>
        <mrow>
          <mfrac>
            <mrow>
              <msubsup>
                <mi>ξ</mi>
                <mi>М</mi>
                <mi mathvariant="italic">вх</mi>
              </msubsup>
              <mo stretchy="false">⋅</mo>
              <msubsup>
                <mi>ρ</mi>
                <mn>1</mn>
                <mi>г</mi>
              </msubsup>
              <mo stretchy="false">⋅</mo>
              <msup>
                <mrow>
                  <mo fence="true" form="prefix" stretchy="false">(</mo>
                  <mrow>
                    <msubsup>
                      <mi>w</mi>
                      <mn>1</mn>
                      <mi mathvariant="italic">вх</mi>
                    </msubsup>
                  </mrow>
                  <mo fence="true" form="postfix" stretchy="false">)</mo>
                </mrow>
                <mn>2</mn>
              </msup>
            </mrow>
            <mn>2</mn>
          </mfrac>
          <mo stretchy="false">⋅</mo>
          <msup>
            <mn>10</mn>
            <mrow>
              <mo stretchy="false">−</mo>
              <mn>3</mn>
            </mrow>
          </msup>
        </mrow>
        <mo stretchy="false">=</mo>
        <mrow>
          <mfrac>
            <mrow>
              <mn>0,5</mn>
              <mo stretchy="false">⋅</mo>
              <mn>703,38</mn>
              <mo stretchy="false">⋅</mo>
              <msup>
                <mrow>
                  <mo fence="true" form="prefix" stretchy="false">(</mo>
                  <mrow>
                    <mn>2,60</mn>
                  </mrow>
                  <mo fence="true" form="postfix" stretchy="false">)</mo>
                </mrow>
                <mn>2</mn>
              </msup>
            </mrow>
            <mn>2</mn>
          </mfrac>
          <mo stretchy="false">⋅</mo>
          <msup>
            <mn>10</mn>
            <mrow>
              <mo stretchy="false">−</mo>
              <mn>3</mn>
            </mrow>
          </msup>
        </mrow>
        <mo stretchy="false">=</mo>
        <mn>1,19</mn>
      </mrow>
      <mi mathvariant="italic">кПа</mi>
    </mrow>
    <annotation encoding="StarMath 5.0">Δp_{М}^{вх} = ξ_{М}^{вх} cdot {ρ_{1}^{г} cdot (w_{1}^{вх})^2} over {2} cdot 10^{-3} = 0,5 cdot {703,38 cdot (2,60)^2} over {2} cdot 10^{-3} =  1,19 кПа</annotation>
  </semantics>
</math>
</file>

<file path=Object 161/content.xml><?xml version="1.0" encoding="utf-8"?>
<math xmlns="http://www.w3.org/1998/Math/MathML" display="block">
  <semantics>
    <mrow>
      <msubsup>
        <mi>ξ</mi>
        <mi>М</mi>
        <mi mathvariant="italic">вх</mi>
      </msubsup>
      <mo stretchy="false">=</mo>
      <mn>0,5</mn>
    </mrow>
    <annotation encoding="StarMath 5.0">ξ_{М}^{вх}
 = 0,5</annotation>
  </semantics>
</math>
</file>

<file path=Object 162/content.xml><?xml version="1.0" encoding="utf-8"?>
<math xmlns="http://www.w3.org/1998/Math/MathML" display="block">
  <semantics>
    <mrow>
      <mrow>
        <msubsup>
          <mi mathvariant="italic">Δp</mi>
          <mi>М</mi>
          <mi mathvariant="italic">вых</mi>
        </msubsup>
        <mo stretchy="false">=</mo>
        <mrow>
          <mfrac>
            <mrow>
              <msubsup>
                <mi>ξ</mi>
                <mi>М</mi>
                <mi mathvariant="italic">вых</mi>
              </msubsup>
              <mo stretchy="false">⋅</mo>
              <msubsup>
                <mi>ρ</mi>
                <mn>1</mn>
                <mi>х</mi>
              </msubsup>
              <mo stretchy="false">⋅</mo>
              <msup>
                <mrow>
                  <mo fence="true" form="prefix" stretchy="false">(</mo>
                  <mrow>
                    <msubsup>
                      <mi>w</mi>
                      <mn>1</mn>
                      <mi mathvariant="italic">вых</mi>
                    </msubsup>
                  </mrow>
                  <mo fence="true" form="postfix" stretchy="false">)</mo>
                </mrow>
                <mn>2</mn>
              </msup>
            </mrow>
            <mn>2</mn>
          </mfrac>
          <mo stretchy="false">⋅</mo>
          <msup>
            <mn>10</mn>
            <mrow>
              <mo stretchy="false">−</mo>
              <mn>3</mn>
            </mrow>
          </msup>
        </mrow>
        <mo stretchy="false">=</mo>
        <mrow>
          <mfrac>
            <mrow>
              <mn>1,1</mn>
              <mo stretchy="false">⋅</mo>
              <mn>757,09</mn>
              <mo stretchy="false">⋅</mo>
              <msup>
                <mrow>
                  <mo fence="true" form="prefix" stretchy="false">(</mo>
                  <mrow>
                    <mn>2,41</mn>
                  </mrow>
                  <mo fence="true" form="postfix" stretchy="false">)</mo>
                </mrow>
                <mn>2</mn>
              </msup>
            </mrow>
            <mn>2</mn>
          </mfrac>
          <mo stretchy="false">⋅</mo>
          <msup>
            <mn>10</mn>
            <mrow>
              <mo stretchy="false">−</mo>
              <mn>3</mn>
            </mrow>
          </msup>
        </mrow>
        <mo stretchy="false">=</mo>
        <mn>2,42</mn>
      </mrow>
      <mi mathvariant="italic">кПа</mi>
    </mrow>
    <annotation encoding="StarMath 5.0">Δp_{М}^{вых} = ξ_{М}^{вых} cdot {ρ_{1}^{х} cdot (w_{1}^{вых})^2} over {2} cdot 10^{-3} = 1,1 cdot {757,09 cdot (2,41)^2} over {2} cdot 10^{-3} =  2,42 кПа</annotation>
  </semantics>
</math>
</file>

<file path=Object 163/content.xml><?xml version="1.0" encoding="utf-8"?>
<math xmlns="http://www.w3.org/1998/Math/MathML" display="block">
  <semantics>
    <mrow>
      <msubsup>
        <mi>ξ</mi>
        <mi>М</mi>
        <mi mathvariant="italic">вых</mi>
      </msubsup>
      <mo stretchy="false">=</mo>
      <mn>1,1</mn>
    </mrow>
    <annotation encoding="StarMath 5.0">ξ_{М}^{вых}
 = 1,1</annotation>
  </semantics>
</math>
</file>

<file path=Object 164/content.xml><?xml version="1.0" encoding="utf-8"?>
<math xmlns="http://www.w3.org/1998/Math/MathML" display="block">
  <semantics>
    <mrow>
      <mi>λ</mi>
      <mo stretchy="false">=</mo>
      <mfrac>
        <mn>1</mn>
        <mrow>
          <mn>4</mn>
          <msup>
            <mrow>
              <mo fence="true" form="prefix" stretchy="true">[</mo>
              <mrow>
                <mrow>
                  <mi mathvariant="italic">lg</mi>
                  <mrow>
                    <mo fence="true" form="prefix" stretchy="true">(</mo>
                    <mrow>
                      <mrow>
                        <mn>3,7</mn>
                        <mfrac>
                          <msub>
                            <mi>d</mi>
                            <mi mathvariant="italic">ВН</mi>
                          </msub>
                          <msub>
                            <mi>Δ</mi>
                            <mi>Э</mi>
                          </msub>
                        </mfrac>
                      </mrow>
                    </mrow>
                    <mo fence="true" form="postfix" stretchy="true">)</mo>
                  </mrow>
                </mrow>
              </mrow>
              <mo fence="true" form="postfix" stretchy="true">]</mo>
            </mrow>
            <mn>2</mn>
          </msup>
        </mrow>
      </mfrac>
      <mo stretchy="false">=</mo>
      <mfrac>
        <mn>1</mn>
        <mrow>
          <mn>4</mn>
          <msup>
            <mrow>
              <mo fence="true" form="prefix" stretchy="true">[</mo>
              <mrow>
                <mrow>
                  <mi mathvariant="italic">lg</mi>
                  <mrow>
                    <mo fence="true" form="prefix" stretchy="true">(</mo>
                    <mrow>
                      <mrow>
                        <mn>3,7</mn>
                        <mfrac>
                          <mn>0,013</mn>
                          <mrow>
                            <mn>2</mn>
                            <mo stretchy="false">⋅</mo>
                            <msup>
                              <mn>10</mn>
                              <mrow>
                                <mo stretchy="false">−</mo>
                                <mn>6</mn>
                              </mrow>
                            </msup>
                          </mrow>
                        </mfrac>
                      </mrow>
                    </mrow>
                    <mo fence="true" form="postfix" stretchy="true">)</mo>
                  </mrow>
                </mrow>
              </mrow>
              <mo fence="true" form="postfix" stretchy="true">]</mo>
            </mrow>
            <mn>2</mn>
          </msup>
        </mrow>
      </mfrac>
      <mo stretchy="false">=</mo>
      <mfrac>
        <mn>1</mn>
        <mrow>
          <mn>4</mn>
          <msup>
            <mrow>
              <mo fence="true" form="prefix" stretchy="true">[</mo>
              <mrow>
                <mrow>
                  <mi mathvariant="italic">lg</mi>
                  <mrow>
                    <mo fence="true" form="prefix" stretchy="false">(</mo>
                    <mrow>
                      <mrow>
                        <mn>3,7</mn>
                        <mo stretchy="false">⋅</mo>
                        <mn>6500</mn>
                      </mrow>
                    </mrow>
                    <mo fence="true" form="postfix" stretchy="false">)</mo>
                  </mrow>
                </mrow>
              </mrow>
              <mo fence="true" form="postfix" stretchy="true">]</mo>
            </mrow>
            <mn>2</mn>
          </msup>
        </mrow>
      </mfrac>
      <mo stretchy="false">=</mo>
      <mn>0,01302</mn>
    </mrow>
    <annotation encoding="StarMath 5.0">λ = {1} over {4 left[ lg left( 3,7 {d_{ВН}} over {Δ_{Э}} right) right]^2} = {1} over {4 left[ lg left( 3,7 {0,013} over {2 cdot 10^{-6}} right) right]^2} = {1} over {4 left[ lg ( 3,7 cdot 6500 ) right]^2} =  0,01302
</annotation>
  </semantics>
</math>
</file>

<file path=Object 165/content.xml><?xml version="1.0" encoding="utf-8"?>
<math xmlns="http://www.w3.org/1998/Math/MathML" display="block">
  <semantics>
    <mrow>
      <mrow>
        <msub>
          <mi>Δ</mi>
          <mi>Э</mi>
        </msub>
        <mo stretchy="false">=</mo>
        <mrow>
          <mn>2</mn>
          <mo stretchy="false">⋅</mo>
          <msup>
            <mn>10</mn>
            <mrow>
              <mi>−</mi>
              <mn>6</mn>
            </mrow>
          </msup>
        </mrow>
      </mrow>
      <mi>м</mi>
    </mrow>
    <annotation encoding="StarMath 5.0">{Δ_{Э}} = 2cdot10^{−6}  м</annotation>
  </semantics>
</math>
</file>

<file path=Object 166/content.xml><?xml version="1.0" encoding="utf-8"?>
<math xmlns="http://www.w3.org/1998/Math/MathML" display="block">
  <semantics>
    <mrow>
      <mrow>
        <msubsup>
          <mi mathvariant="italic">Δp</mi>
          <mi mathvariant="italic">ТР</mi>
          <mi>L</mi>
        </msubsup>
        <mo stretchy="false">=</mo>
        <mrow>
          <mfrac>
            <mrow>
              <mfrac>
                <mrow>
                  <mi>λ</mi>
                  <mo stretchy="false">⋅</mo>
                  <msub>
                    <mi>L</mi>
                    <mi mathvariant="italic">ср</mi>
                  </msub>
                </mrow>
                <msub>
                  <mi>d</mi>
                  <mi mathvariant="italic">ВН</mi>
                </msub>
              </mfrac>
              <mo stretchy="false">⋅</mo>
              <msub>
                <mi>ρ</mi>
                <mn>1</mn>
              </msub>
              <mo stretchy="false">⋅</mo>
              <msubsup>
                <mi>w</mi>
                <mn>1</mn>
                <mn>2</mn>
              </msubsup>
            </mrow>
            <mn>2</mn>
          </mfrac>
          <mo stretchy="false">⋅</mo>
          <msup>
            <mn>10</mn>
            <mrow>
              <mo stretchy="false">−</mo>
              <mn>3</mn>
            </mrow>
          </msup>
        </mrow>
        <mo stretchy="false">=</mo>
        <mrow>
          <mfrac>
            <mrow>
              <mfrac>
                <mrow>
                  <mn>0,01302</mn>
                  <mo stretchy="false">⋅</mo>
                  <mn>7,926</mn>
                </mrow>
                <mn>0,013</mn>
              </mfrac>
              <mo stretchy="false">⋅</mo>
              <mn>729,74</mn>
              <mo stretchy="false">⋅</mo>
              <msup>
                <mrow>
                  <mo fence="true" form="prefix" stretchy="false">(</mo>
                  <mrow>
                    <mn>2,5</mn>
                  </mrow>
                  <mo fence="true" form="postfix" stretchy="false">)</mo>
                </mrow>
                <mn>2</mn>
              </msup>
            </mrow>
            <mn>2</mn>
          </mfrac>
          <mo stretchy="false">⋅</mo>
          <msup>
            <mn>10</mn>
            <mrow>
              <mo stretchy="false">−</mo>
              <mn>3</mn>
            </mrow>
          </msup>
        </mrow>
        <mo stretchy="false">=</mo>
        <mn>18,11</mn>
      </mrow>
      <mi mathvariant="italic">кПа</mi>
    </mrow>
    <annotation encoding="StarMath 5.0">Δp_{ТР}^{L} = λ cdot {L_{ср}} over {d_{ВН}} cdot ρ_{1} cdot {w_{1}^2} over {2} cdot 10^{-3} = 0,01302 cdot {7,926} over {0,013} cdot 729,74 cdot {(2,5)^2} over {2} cdot 10^{-3} =  18,11 кПа
</annotation>
  </semantics>
</math>
</file>

<file path=Object 167/content.xml><?xml version="1.0" encoding="utf-8"?>
<math xmlns="http://www.w3.org/1998/Math/MathML" display="block">
  <semantics>
    <mrow>
      <msubsup>
        <mi>ξ</mi>
        <mi>М</mi>
        <mi>φ</mi>
      </msubsup>
      <mo stretchy="false">=</mo>
      <mn>0,5</mn>
    </mrow>
    <annotation encoding="StarMath 5.0">ξ_{М}^{φ}
 = 0,5</annotation>
  </semantics>
</math>
</file>

<file path=Object 168/content.xml><?xml version="1.0" encoding="utf-8"?>
<math xmlns="http://www.w3.org/1998/Math/MathML" display="block">
  <semantics>
    <mrow>
      <mrow>
        <msubsup>
          <mi mathvariant="italic">Δp</mi>
          <mi>М</mi>
          <mi>φ</mi>
        </msubsup>
        <mo stretchy="false">=</mo>
        <mrow>
          <mfrac>
            <mrow>
              <msubsup>
                <mi>ξ</mi>
                <mi>М</mi>
                <mi>φ</mi>
              </msubsup>
              <mo stretchy="false">⋅</mo>
              <msub>
                <mi>ρ</mi>
                <mn>1</mn>
              </msub>
              <mo stretchy="false">⋅</mo>
              <msubsup>
                <mi>w</mi>
                <mn>1</mn>
                <mn>2</mn>
              </msubsup>
            </mrow>
            <mn>2</mn>
          </mfrac>
          <mo stretchy="false">⋅</mo>
          <msup>
            <mn>10</mn>
            <mrow>
              <mo stretchy="false">−</mo>
              <mn>3</mn>
            </mrow>
          </msup>
        </mrow>
        <mo stretchy="false">=</mo>
        <mrow>
          <mfrac>
            <mrow>
              <mn>0,5</mn>
              <mo stretchy="false">⋅</mo>
              <mn>729,74</mn>
              <mo stretchy="false">⋅</mo>
              <msup>
                <mrow>
                  <mo fence="true" form="prefix" stretchy="false">(</mo>
                  <mrow>
                    <mn>2,5</mn>
                  </mrow>
                  <mo fence="true" form="postfix" stretchy="false">)</mo>
                </mrow>
                <mn>2</mn>
              </msup>
            </mrow>
            <mn>2</mn>
          </mfrac>
          <mo stretchy="false">⋅</mo>
          <msup>
            <mn>10</mn>
            <mrow>
              <mo stretchy="false">−</mo>
              <mn>3</mn>
            </mrow>
          </msup>
        </mrow>
        <mo stretchy="false">=</mo>
        <mn>1,14</mn>
      </mrow>
      <mi mathvariant="italic">кПа</mi>
    </mrow>
    <annotation encoding="StarMath 5.0">Δp_{М}^{φ} = ξ_{М}^{φ} cdot ρ_{1} cdot {w_{1}^2} over {2} cdot 10^{-3} = 0,5 cdot 729,74 cdot {(2,5)^2} over {2} cdot 10^{-3} =  1,14 кПа</annotation>
  </semantics>
</math>
</file>

<file path=Object 169/content.xml><?xml version="1.0" encoding="utf-8"?>
<math xmlns="http://www.w3.org/1998/Math/MathML" display="block">
  <semantics>
    <mrow>
      <mrow>
        <msubsup>
          <mi mathvariant="italic">Δp</mi>
          <mn>1</mn>
          <mi mathvariant="italic">ПГ</mi>
        </msubsup>
        <mo stretchy="false">=</mo>
        <mi>Δ</mi>
      </mrow>
      <mover accent="true">
        <mi>p</mi>
        <mo>¯</mo>
      </mover>
      <mrow>
        <mi mathvariant="italic">КОЛ</mi>
        <mo stretchy="false">+</mo>
        <mi mathvariant="italic">Δp</mi>
      </mrow>
      <mrow>
        <mrow>
          <msup>
            <mi>М</mi>
            <mi mathvariant="italic">вх</mi>
          </msup>
          <mo stretchy="false">+</mo>
          <msubsup>
            <mi mathvariant="italic">Δp</mi>
            <mi mathvariant="italic">ТР</mi>
            <mi>L</mi>
          </msubsup>
          <mo stretchy="false">+</mo>
          <msubsup>
            <mi mathvariant="italic">Δp</mi>
            <mi>М</mi>
            <mi>в</mi>
          </msubsup>
          <mo stretchy="false">+</mo>
          <msubsup>
            <mi mathvariant="italic">Δp</mi>
            <mi>М</mi>
            <mi mathvariant="italic">вых</mi>
          </msubsup>
        </mrow>
        <mo stretchy="false">=</mo>
        <mrow>
          <mn>4,82</mn>
          <mo stretchy="false">+</mo>
          <mn>1,19</mn>
          <mo stretchy="false">+</mo>
          <mn>18,11</mn>
          <mo stretchy="false">+</mo>
          <mn>1,14</mn>
          <mo stretchy="false">+</mo>
          <mn>2,42</mn>
        </mrow>
        <mo stretchy="false">=</mo>
        <mn>27,68</mn>
      </mrow>
      <mi mathvariant="italic">кПа</mi>
    </mrow>
    <annotation encoding="StarMath 5.0">Δp_{1}^{ПГ} = Δ overline{p}{КОЛ} + Δp{М}^{вх} + Δp_{ТР}^{L} + Δp_{М}^{в} + Δp_{М}^{вых}= 4,82 + 1,19 + 18,11 + 1,14 + 2,42 = 27,68 кПа</annotation>
  </semantics>
</math>
</file>

<file path=Object 17/content.xml><?xml version="1.0" encoding="utf-8"?>
<math xmlns="http://www.w3.org/1998/Math/MathML" display="block">
  <semantics>
    <msub>
      <mi>t</mi>
      <mrow>
        <mn>1</mn>
        <mi>S</mi>
      </mrow>
    </msub>
    <annotation encoding="StarMath 5.0">{t} rsub {1S}</annotation>
  </semantics>
</math>
</file>

<file path=Object 18/content.xml><?xml version="1.0" encoding="utf-8"?>
<math xmlns="http://www.w3.org/1998/Math/MathML" display="block">
  <semantics>
    <msub>
      <mi>P</mi>
      <mn>1</mn>
    </msub>
    <annotation encoding="StarMath 5.0">{P} rsub {1}</annotation>
  </semantics>
</math>
</file>

<file path=Object 19/content.xml><?xml version="1.0" encoding="utf-8"?>
<math xmlns="http://www.w3.org/1998/Math/MathML" display="block">
  <semantics>
    <mrow>
      <mi>Δ</mi>
      <msub>
        <mi>t</mi>
        <mtext>ЗАП</mtext>
      </msub>
    </mrow>
    <annotation encoding="StarMath 5.0">Δ {t} rsub {"ЗАП"}</annotation>
  </semantics>
</math>
</file>

<file path=Object 2/content.xml><?xml version="1.0" encoding="utf-8"?>
<math xmlns="http://www.w3.org/1998/Math/MathML" display="block">
  <semantics>
    <mrow>
      <msubsup>
        <mi>t</mi>
        <mn>1</mn>
        <mi>'</mi>
      </msubsup>
      <mi>,</mi>
      <msubsup>
        <mi>p</mi>
        <mn>1</mn>
        <mi>'</mi>
      </msubsup>
    </mrow>
    <annotation encoding="StarMath 5.0">{t} rsub {1} rsup {'} , {p} rsub {1} rsup {'}</annotation>
  </semantics>
</math>
</file>

<file path=Object 20/content.xml><?xml version="1.0" encoding="utf-8"?>
<math xmlns="http://www.w3.org/1998/Math/MathML" display="block">
  <semantics>
    <mrow>
      <mi>δ</mi>
      <msub>
        <mi>t</mi>
        <mtext>М</mtext>
      </msub>
    </mrow>
    <annotation encoding="StarMath 5.0">δ {t} rsub {"М"}</annotation>
  </semantics>
</math>
</file>

<file path=Object 21/content.xml><?xml version="1.0" encoding="utf-8"?>
<math xmlns="http://www.w3.org/1998/Math/MathML" display="block">
  <semantics>
    <mrow>
      <mi>δ</mi>
      <msub>
        <mi>t</mi>
        <mtext>Б</mtext>
      </msub>
    </mrow>
    <annotation encoding="StarMath 5.0">δ {t} rsub {"Б"}</annotation>
  </semantics>
</math>
</file>

<file path=Object 22/content.xml><?xml version="1.0" encoding="utf-8"?>
<math xmlns="http://www.w3.org/1998/Math/MathML" display="block">
  <semantics>
    <msubsup>
      <mi>t</mi>
      <mn>2</mn>
      <mi>'</mi>
    </msubsup>
    <annotation encoding="StarMath 5.0">{t} rsub {2} rsup {'}</annotation>
  </semantics>
</math>
</file>

<file path=Object 23/content.xml><?xml version="1.0" encoding="utf-8"?>
<math xmlns="http://www.w3.org/1998/Math/MathML" display="block">
  <semantics>
    <msubsup>
      <mi>t</mi>
      <mn>2</mn>
      <mrow>
        <mi>'</mi>
        <mi>'</mi>
      </mrow>
    </msubsup>
    <annotation encoding="StarMath 5.0">{t} rsub {2} rsup {''}</annotation>
  </semantics>
</math>
</file>

<file path=Object 24/content.xml><?xml version="1.0" encoding="utf-8"?>
<math xmlns="http://www.w3.org/1998/Math/MathML" display="block">
  <semantics>
    <msubsup>
      <mi>t</mi>
      <mn>1</mn>
      <mi>'</mi>
    </msubsup>
    <annotation encoding="StarMath 5.0">{t} rsub {1} rsup {'}</annotation>
  </semantics>
</math>
</file>

<file path=Object 25/content.xml><?xml version="1.0" encoding="utf-8"?>
<math xmlns="http://www.w3.org/1998/Math/MathML" display="block">
  <semantics>
    <msubsup>
      <mi>t</mi>
      <mn>1</mn>
      <mrow>
        <mi>'</mi>
        <mi>'</mi>
      </mrow>
    </msubsup>
    <annotation encoding="StarMath 5.0">{t} rsub {1} rsup {''}</annotation>
  </semantics>
</math>
</file>

<file path=Object 26/content.xml><?xml version="1.0" encoding="utf-8"?>
<math xmlns="http://www.w3.org/1998/Math/MathML" display="block">
  <semantics>
    <msub>
      <mi>t</mi>
      <mtext>ПВ</mtext>
    </msub>
    <annotation encoding="StarMath 5.0">{t} rsub {"ПВ"}</annotation>
  </semantics>
</math>
</file>

<file path=Object 27/content.xml><?xml version="1.0" encoding="utf-8"?>
<math xmlns="http://www.w3.org/1998/Math/MathML" display="block">
  <semantics>
    <msub>
      <mi>D</mi>
      <mtext>ПР</mtext>
    </msub>
    <annotation encoding="StarMath 5.0">{D} rsub {"ПР"}</annotation>
  </semantics>
</math>
</file>

<file path=Object 28/content.xml><?xml version="1.0" encoding="utf-8"?>
<math xmlns="http://www.w3.org/1998/Math/MathML" display="block">
  <semantics>
    <msub>
      <mi>α</mi>
      <mi mathvariant="italic">ПР</mi>
    </msub>
    <annotation encoding="StarMath 5.0">{α} rsub {ПР}</annotation>
  </semantics>
</math>
</file>

<file path=Object 29/content.xml><?xml version="1.0" encoding="utf-8"?>
<math xmlns="http://www.w3.org/1998/Math/MathML" display="block">
  <semantics>
    <msub>
      <mi>d</mi>
      <mi>Н</mi>
    </msub>
    <annotation encoding="StarMath 5.0">{d} rsub {Н}</annotation>
  </semantics>
</math>
</file>

<file path=Object 3/content.xml><?xml version="1.0" encoding="utf-8"?>
<math xmlns="http://www.w3.org/1998/Math/MathML" display="block">
  <semantics>
    <mrow>
      <msubsup>
        <mi>t</mi>
        <mn>1</mn>
        <mrow>
          <mi>'</mi>
          <mi>'</mi>
        </mrow>
      </msubsup>
      <mi>,</mi>
      <msubsup>
        <mi>p</mi>
        <mn>1</mn>
        <mrow>
          <mi>'</mi>
          <mi>'</mi>
        </mrow>
      </msubsup>
    </mrow>
    <annotation encoding="StarMath 5.0">{t} rsub {1} rsup {''} , {p} rsub {1} rsup {''}</annotation>
  </semantics>
</math>
</file>

<file path=Object 30/content.xml><?xml version="1.0" encoding="utf-8"?>
<math xmlns="http://www.w3.org/1998/Math/MathML" display="block">
  <semantics>
    <msub>
      <mi>δ</mi>
      <mi mathvariant="italic">ТР</mi>
    </msub>
    <annotation encoding="StarMath 5.0">{δ} rsub {ТР}</annotation>
  </semantics>
</math>
</file>

<file path=Object 31/content.xml><?xml version="1.0" encoding="utf-8"?>
<math xmlns="http://www.w3.org/1998/Math/MathML" display="block">
  <semantics>
    <msubsup>
      <mi>d</mi>
      <mi>Н</mi>
      <mi>К</mi>
    </msubsup>
    <annotation encoding="StarMath 5.0">{d} rsub {Н} rsup {К}</annotation>
  </semantics>
</math>
</file>

<file path=Object 32/content.xml><?xml version="1.0" encoding="utf-8"?>
<math xmlns="http://www.w3.org/1998/Math/MathML" display="block">
  <semantics>
    <msub>
      <mi>δ</mi>
      <mi>К</mi>
    </msub>
    <annotation encoding="StarMath 5.0">{δ} rsub {К}</annotation>
  </semantics>
</math>
</file>

<file path=Object 33/content.xml><?xml version="1.0" encoding="utf-8"?>
<math xmlns="http://www.w3.org/1998/Math/MathML" display="block">
  <semantics>
    <mrow>
      <mi>Δ</mi>
      <msub>
        <mi>p</mi>
        <mn>1</mn>
      </msub>
      <mtext>=</mtext>
      <mfrac>
        <mrow>
          <msubsup>
            <mi>p</mi>
            <mn>1</mn>
            <mi>'</mi>
          </msubsup>
          <mtext>-</mtext>
          <msubsup>
            <mi>p</mi>
            <mn>1</mn>
            <mrow>
              <mi>'</mi>
              <mi>'</mi>
            </mrow>
          </msubsup>
        </mrow>
        <msubsup>
          <mi>p</mi>
          <mn>1</mn>
          <mi>'</mi>
        </msubsup>
      </mfrac>
      <mi>⋅</mi>
      <mn>100</mn>
      <mtext>%</mtext>
      <mi>≈</mi>
      <mo stretchy="false">(</mo>
      <mn>1</mn>
      <mi>÷</mi>
      <mn>5</mn>
      <mo stretchy="false">)</mo>
      <mtext>%</mtext>
      <mi>.</mi>
    </mrow>
    <annotation encoding="StarMath 5.0">Δ {p} rsub {1} "=" {{p} rsub {1} rsup {'} "-" {p} rsub {1} rsup {''}} over {{p} rsub {1} rsup {'}} ⋅100 "%" ≈\(1÷5\) "%".</annotation>
  </semantics>
</math>
</file>

<file path=Object 34/content.xml><?xml version="1.0" encoding="utf-8"?>
<math xmlns="http://www.w3.org/1998/Math/MathML" display="block">
  <semantics>
    <mrow>
      <mi>Δ</mi>
      <msub>
        <mi>p</mi>
        <mn>1</mn>
      </msub>
    </mrow>
    <annotation encoding="StarMath 5.0">Δ {p} rsub {1}</annotation>
  </semantics>
</math>
</file>

<file path=Object 35/content.xml><?xml version="1.0" encoding="utf-8"?>
<math xmlns="http://www.w3.org/1998/Math/MathML" display="block">
  <semantics>
    <mrow>
      <msub>
        <mi>p</mi>
        <mn>1</mn>
      </msub>
      <mi>≈</mi>
      <msubsup>
        <mi>p</mi>
        <mn>1</mn>
        <mi>'</mi>
      </msubsup>
      <mi>≈</mi>
      <msubsup>
        <mi>p</mi>
        <mn>1</mn>
        <mrow>
          <mi>'</mi>
          <mi>'</mi>
        </mrow>
      </msubsup>
      <mi>.</mi>
    </mrow>
    <annotation encoding="StarMath 5.0">{p} rsub {1} ≈ {p} rsub {1} rsup {'} ≈ {p} rsub {1} rsup {''} .</annotation>
  </semantics>
</math>
</file>

<file path=Object 36/content.xml><?xml version="1.0" encoding="utf-8"?>
<math xmlns="http://www.w3.org/1998/Math/MathML" display="block">
  <semantics>
    <msub>
      <mi>p</mi>
      <mn>1</mn>
    </msub>
    <annotation encoding="StarMath 5.0">{p} rsub {1}</annotation>
  </semantics>
</math>
</file>

<file path=Object 37/content.xml><?xml version="1.0" encoding="utf-8"?>
<math xmlns="http://www.w3.org/1998/Math/MathML" display="block">
  <semantics>
    <mrow>
      <mi>Δ</mi>
      <msub>
        <mi>t</mi>
        <mtext>ЗАП</mtext>
      </msub>
      <mtext>=</mtext>
      <msub>
        <mi>t</mi>
        <mrow>
          <mn>1</mn>
          <mi>s</mi>
        </mrow>
      </msub>
      <mtext>-</mtext>
      <msubsup>
        <mi>t</mi>
        <mn>1</mn>
        <mi>'</mi>
      </msubsup>
    </mrow>
    <annotation encoding="StarMath 5.0">Δ {t} rsub {"ЗАП"} "=" {t} rsub {1s} "-" {t} rsub {1} rsup {'}</annotation>
  </semantics>
</math>
</file>

<file path=Object 38/content.xml><?xml version="1.0" encoding="utf-8"?>
<math xmlns="http://www.w3.org/1998/Math/MathML" display="block">
  <semantics>
    <msub>
      <mi>p</mi>
      <mn>2</mn>
    </msub>
    <annotation encoding="StarMath 5.0">{p} rsub {2}</annotation>
  </semantics>
</math>
</file>

<file path=Object 39/content.xml><?xml version="1.0" encoding="utf-8"?>
<math xmlns="http://www.w3.org/1998/Math/MathML" display="block">
  <semantics>
    <msub>
      <mi>p</mi>
      <mn>2</mn>
    </msub>
    <annotation encoding="StarMath 5.0">{p} rsub {2}</annotation>
  </semantics>
</math>
</file>

<file path=Object 4/content.xml><?xml version="1.0" encoding="utf-8"?>
<math xmlns="http://www.w3.org/1998/Math/MathML" display="block">
  <semantics>
    <msub>
      <mi>D</mi>
      <mtext>ПВ</mtext>
    </msub>
    <annotation encoding="StarMath 5.0">{D} rsub {"ПВ"}</annotation>
  </semantics>
</math>
</file>

<file path=Object 40/content.xml><?xml version="1.0" encoding="utf-8"?>
<math xmlns="http://www.w3.org/1998/Math/MathML" display="block">
  <semantics>
    <mrow>
      <msub>
        <mi>p</mi>
        <mtext>пв</mtext>
      </msub>
      <mtext>=</mtext>
      <msub>
        <mi>p</mi>
        <mn>2</mn>
      </msub>
    </mrow>
    <annotation encoding="StarMath 5.0">{p} rsub {"пв"} "=" {p} rsub {2}</annotation>
  </semantics>
</math>
</file>

<file path=Object 41/content.xml><?xml version="1.0" encoding="utf-8"?>
<math xmlns="http://www.w3.org/1998/Math/MathML" display="block">
  <semantics>
    <mi>⋅</mi>
    <annotation encoding="StarMath 5.0">⋅</annotation>
  </semantics>
</math>
</file>

<file path=Object 42/content.xml><?xml version="1.0" encoding="utf-8"?>
<math xmlns="http://www.w3.org/1998/Math/MathML" display="block">
  <semantics>
    <mi>⋅</mi>
    <annotation encoding="StarMath 5.0">⋅</annotation>
  </semantics>
</math>
</file>

<file path=Object 43/content.xml><?xml version="1.0" encoding="utf-8"?>
<math xmlns="http://www.w3.org/1998/Math/MathML" display="block">
  <semantics>
    <mrow>
      <msub>
        <mi mathvariant="italic">δt</mi>
        <mi>M</mi>
      </msub>
      <mtext>=</mtext>
      <mtext> </mtext>
      <mn>10</mn>
    </mrow>
    <annotation encoding="StarMath 5.0">{δt} rsub {M} "=" " "10</annotation>
  </semantics>
</math>
</file>

<file path=Object 44/content.xml><?xml version="1.0" encoding="utf-8"?>
<math xmlns="http://www.w3.org/1998/Math/MathML" display="block">
  <semantics>
    <mrow>
      <msub>
        <mi>t</mi>
        <mrow>
          <mn>2</mn>
          <mi>s</mi>
        </mrow>
      </msub>
      <mtext>=</mtext>
      <msubsup>
        <mi>t</mi>
        <mn>1</mn>
        <mrow>
          <mi>'</mi>
          <mi>'</mi>
        </mrow>
      </msubsup>
      <mtext>-</mtext>
      <mi>Δ</mi>
      <msub>
        <mi>t</mi>
        <mtext>М</mtext>
      </msub>
      <mtext> </mtext>
      <mtext>=</mtext>
      <mtext> </mtext>
      <mn>282</mn>
      <mtext>-</mtext>
      <mn>10</mn>
      <mtext> </mtext>
      <mtext>=</mtext>
      <mtext> </mtext>
      <mn>272</mn>
      <mi>.</mi>
    </mrow>
    <annotation encoding="StarMath 5.0">{t} rsub {2s} "=" {t} rsub {1} rsup {''} "-" Δ {t} rsub {"М"} " ""="" "282 "-" 10" ""="" "272 .</annotation>
  </semantics>
</math>
</file>

<file path=Object 45/content.xml><?xml version="1.0" encoding="utf-8"?>
<math xmlns="http://www.w3.org/1998/Math/MathML" display="block">
  <semantics>
    <mrow>
      <msub>
        <mi>p</mi>
        <mn>2</mn>
      </msub>
      <mtext>=</mtext>
      <mi>f</mi>
      <mo stretchy="false">(</mo>
      <msub>
        <mi>t</mi>
        <mrow>
          <mn>2</mn>
          <mi>s</mi>
        </mrow>
      </msub>
      <mo stretchy="false">)</mo>
      <mtext>=</mtext>
      <mtext> </mtext>
      <mn>5,677</mn>
      <mi>.</mi>
    </mrow>
    <annotation encoding="StarMath 5.0">{p} rsub {2} "="f\( {t} rsub {2s} \) "="" "5,677 .</annotation>
  </semantics>
</math>
</file>

<file path=Object 46/content.xml><?xml version="1.0" encoding="utf-8"?>
<math xmlns="http://www.w3.org/1998/Math/MathML" display="block">
  <semantics>
    <mrow>
      <msub>
        <mi>h</mi>
        <mtext>ПВ</mtext>
      </msub>
      <mtext>=</mtext>
      <mi>f</mi>
      <mo stretchy="false">(</mo>
      <msub>
        <mi>p</mi>
        <mn>2</mn>
      </msub>
      <mi>,</mi>
      <msub>
        <mi>t</mi>
        <mtext>пв</mtext>
      </msub>
      <mo stretchy="false">)</mo>
      <mtext>=</mtext>
      <mtext> </mtext>
      <mn>967</mn>
      <mi>,</mi>
      <mn>59</mn>
      <mi>.</mi>
    </mrow>
    <annotation encoding="StarMath 5.0">{h} rsub {"ПВ"} "="f\( {p} rsub {2} , {t} rsub {"пв"} \) "="" " 967 , 59 .</annotation>
  </semantics>
</math>
</file>

<file path=Object 47/content.xml><?xml version="1.0" encoding="utf-8"?>
<math xmlns="http://www.w3.org/1998/Math/MathML" display="block">
  <semantics>
    <msub>
      <mi>p</mi>
      <mn>2</mn>
    </msub>
    <annotation encoding="StarMath 5.0">{p} rsub {2}</annotation>
  </semantics>
</math>
</file>

<file path=Object 48/content.xml><?xml version="1.0" encoding="utf-8"?>
<math xmlns="http://www.w3.org/1998/Math/MathML" display="block">
  <semantics>
    <mrow>
      <msub>
        <mi>h</mi>
        <mtext>ПР</mtext>
      </msub>
      <mtext>=</mtext>
      <msup>
        <mi>h</mi>
        <mi>'</mi>
      </msup>
      <mtext>=</mtext>
      <mi>f</mi>
      <mo stretchy="false">(</mo>
      <msub>
        <mi>p</mi>
        <mn>2</mn>
      </msub>
      <mo stretchy="false">)</mo>
      <mtext>=</mtext>
      <mn>1195</mn>
      <mi>,</mi>
      <mn>3</mn>
      <mi>.</mi>
    </mrow>
    <annotation encoding="StarMath 5.0">{h} rsub {"ПР"} "=" {h} ^ {'} "="f\( {p} rsub {2} \) "=" 1195 , 3 .</annotation>
  </semantics>
</math>
</file>

<file path=Object 49/content.xml><?xml version="1.0" encoding="utf-8"?>
<math xmlns="http://www.w3.org/1998/Math/MathML" display="block">
  <semantics>
    <msub>
      <mi>p</mi>
      <mn>2</mn>
    </msub>
    <annotation encoding="StarMath 5.0">{p} rsub {2}</annotation>
  </semantics>
</math>
</file>

<file path=Object 5/content.xml><?xml version="1.0" encoding="utf-8"?>
<math xmlns="http://www.w3.org/1998/Math/MathML" display="block">
  <semantics>
    <msub>
      <mi>D</mi>
      <mtext>П</mtext>
    </msub>
    <annotation encoding="StarMath 5.0">{D} rsub {"П"}</annotation>
  </semantics>
</math>
</file>

<file path=Object 50/content.xml><?xml version="1.0" encoding="utf-8"?>
<math xmlns="http://www.w3.org/1998/Math/MathML" display="block">
  <semantics>
    <mrow>
      <msup>
        <mi>h</mi>
        <mrow>
          <mi>'</mi>
          <mi>'</mi>
        </mrow>
      </msup>
      <mtext>=</mtext>
      <mi>f</mi>
      <mo stretchy="false">(</mo>
      <msub>
        <mi>p</mi>
        <mn>2</mn>
      </msub>
      <mo stretchy="false">)</mo>
      <mtext>=</mtext>
      <mtext> </mtext>
      <mn>2787</mn>
      <mi>,</mi>
      <mn>96</mn>
      <mi>.</mi>
    </mrow>
    <annotation encoding="StarMath 5.0">{h} ^ {''} "="f\( {p} rsub {2} \) "="" " 2787 , 96 .</annotation>
  </semantics>
</math>
</file>

<file path=Object 51/content.xml><?xml version="1.0" encoding="utf-8"?>
<math xmlns="http://www.w3.org/1998/Math/MathML" display="block">
  <semantics>
    <mrow>
      <msub>
        <mi>x</mi>
        <mn>2</mn>
      </msub>
      <mtext>=</mtext>
      <mn>0,998.</mn>
    </mrow>
    <annotation encoding="StarMath 5.0">{x} rsub {2} "="0,998.</annotation>
  </semantics>
</math>
</file>

<file path=Object 52/content.xml><?xml version="1.0" encoding="utf-8"?>
<math xmlns="http://www.w3.org/1998/Math/MathML" display="block">
  <semantics>
    <mrow>
      <msub>
        <mi>h</mi>
        <mn>2</mn>
      </msub>
      <mtext>=</mtext>
      <msup>
        <mi>h</mi>
        <mrow>
          <mi>'</mi>
          <mi>'</mi>
        </mrow>
      </msup>
      <mi>⋅</mi>
      <msub>
        <mi>x</mi>
        <mn>2</mn>
      </msub>
      <mtext>+</mtext>
      <msup>
        <mi>h</mi>
        <mi>'</mi>
      </msup>
      <mi>⋅</mi>
      <mo stretchy="false">(</mo>
      <mn>1</mn>
      <mtext>-</mtext>
      <msub>
        <mi>x</mi>
        <mn>2</mn>
      </msub>
      <mo stretchy="false">)</mo>
      <mtext>=</mtext>
      <mn>2787</mn>
      <mi>,</mi>
      <mn>96</mn>
      <mi>⋅</mi>
      <mn>0,998</mn>
      <mtext>+</mtext>
      <mn>1195</mn>
      <mi>,</mi>
      <mn>3</mn>
      <mi>⋅</mi>
      <mo stretchy="false">(</mo>
      <mn>1</mn>
      <mtext>-</mtext>
      <mn>0,998</mn>
      <mo stretchy="false">)</mo>
      <mtext>=</mtext>
      <mtext/>
      <mn>2784</mn>
      <mi>,</mi>
      <mn>78</mn>
      <mi>.</mi>
    </mrow>
    <annotation encoding="StarMath 5.0">{h} rsub {2} "=" {h} ^ {''} ⋅ {x} rsub {2} "+" {h} ^ {'} ⋅\(1"-" {x} rsub {2} \) "=" 2787 , 96 ⋅ 0,998"+" 1195 , 3 ⋅ \(1"-"0,998\)"=""" 2784 , 78 .</annotation>
  </semantics>
</math>
</file>

<file path=Object 53/content.xml><?xml version="1.0" encoding="utf-8"?>
<math xmlns="http://www.w3.org/1998/Math/MathML" display="block">
  <semantics>
    <mrow>
      <msub>
        <mi>v</mi>
        <mn>2</mn>
      </msub>
      <mtext>=</mtext>
      <msup>
        <mi>v</mi>
        <mrow>
          <mi>'</mi>
          <mi>'</mi>
        </mrow>
      </msup>
      <mi>⋅</mi>
      <msub>
        <mi>x</mi>
        <mn>2</mn>
      </msub>
      <mtext>+</mtext>
      <msup>
        <mi>v</mi>
        <mi>'</mi>
      </msup>
      <mi>⋅</mi>
      <mo stretchy="false">(</mo>
      <mn>1</mn>
      <mtext>-</mtext>
      <msub>
        <mi>x</mi>
        <mn>2</mn>
      </msub>
      <mo stretchy="false">)</mo>
      <mtext>=</mtext>
      <mtext> </mtext>
      <mn>0,0344</mn>
      <mi>⋅</mi>
      <mn>0,998</mn>
      <mtext>+</mtext>
      <mn>0,0013</mn>
      <mi>⋅</mi>
      <mo stretchy="false">(</mo>
      <mn>1</mn>
      <mtext>-</mtext>
      <mn>0,998</mn>
      <mo stretchy="false">)</mo>
      <mtext> </mtext>
      <mtext>=</mtext>
      <mtext> </mtext>
      <mn>0,034</mn>
      <mi>.</mi>
    </mrow>
    <annotation encoding="StarMath 5.0">{v} rsub {2} "=" {v} ^ {''} ⋅ {x} rsub {2} "+" {v} ^ {'} ⋅\(1"-" {x} rsub {2} \) "="" "0,0344 ⋅ 0,998"+"0,0013 ⋅ \(1"-"0,998\)" ""="" "0,034 .</annotation>
  </semantics>
</math>
</file>

<file path=Object 54/content.xml><?xml version="1.0" encoding="utf-8"?>
<math xmlns="http://www.w3.org/1998/Math/MathML" display="block">
  <semantics>
    <mrow>
      <msub>
        <mi>ρ</mi>
        <mn>2</mn>
      </msub>
      <mtext>=</mtext>
      <mfrac>
        <mn>1</mn>
        <msub>
          <mi>v</mi>
          <mn>2</mn>
        </msub>
      </mfrac>
      <mtext> </mtext>
      <mtext>=</mtext>
      <mfrac>
        <mn>1</mn>
        <mn>0,034</mn>
      </mfrac>
      <mtext>=</mtext>
      <mtext> </mtext>
      <mn>29,08</mn>
      <mi>.</mi>
    </mrow>
    <annotation encoding="StarMath 5.0">{ρ} rsub {2} "=" {1} over {{v} rsub {2}} " ""=" {1} over {0,034} "="" "29,08 .</annotation>
  </semantics>
</math>
</file>

<file path=Object 55/content.xml><?xml version="1.0" encoding="utf-8"?>
<math xmlns="http://www.w3.org/1998/Math/MathML" display="block">
  <semantics>
    <mrow>
      <msub>
        <mi>ρ</mi>
        <mtext>пв</mtext>
      </msub>
      <mtext>=</mtext>
      <mi>f</mi>
      <mo stretchy="false">(</mo>
      <msub>
        <mi>p</mi>
        <mn>2</mn>
      </msub>
      <mi>,</mi>
      <msub>
        <mi>t</mi>
        <mtext>пв</mtext>
      </msub>
      <mo stretchy="false">)</mo>
      <mtext>=</mtext>
      <mtext> </mtext>
      <mn>836,61</mn>
      <mn>.</mn>
    </mrow>
    <annotation encoding="StarMath 5.0">{ρ} rsub {"пв"} "="f\( {p} rsub {2} , {t} rsub {"пв"} \) "="" "836,61 . </annotation>
  </semantics>
</math>
</file>

<file path=Object 56/content.xml><?xml version="1.0" encoding="utf-8"?>
<math xmlns="http://www.w3.org/1998/Math/MathML" display="block">
  <semantics>
    <mrow>
      <msub>
        <mi>D</mi>
        <mtext>ПР</mtext>
      </msub>
      <mtext>=</mtext>
      <msub>
        <mi>α</mi>
        <mtext>ПР</mtext>
      </msub>
      <mi>⋅</mi>
      <msub>
        <mi>D</mi>
        <mtext>П</mtext>
      </msub>
      <mtext>/</mtext>
      <mn>100</mn>
      <mtext>=</mtext>
      <mn>0,7</mn>
      <mi>⋅</mi>
      <mn>320</mn>
      <mtext>/</mtext>
      <mn>100</mn>
      <mtext>=</mtext>
      <mn>2,24</mn>
      <mtext> </mtext>
      <mi>.</mi>
    </mrow>
    <annotation encoding="StarMath 5.0">{D} rsub {"ПР"} "=" {α} rsub {"ПР"} ⋅ {D} rsub {"П"} "/" 100 "="0,7 ⋅ 320 "/" 100 "="2,24" " .</annotation>
  </semantics>
</math>
</file>

<file path=Object 57/content.xml><?xml version="1.0" encoding="utf-8"?>
<math xmlns="http://www.w3.org/1998/Math/MathML" display="block">
  <semantics>
    <msub>
      <mi>α</mi>
      <mtext>ПР</mtext>
    </msub>
    <annotation encoding="StarMath 5.0">{α} rsub {"ПР"}</annotation>
  </semantics>
</math>
</file>

<file path=Object 58/content.xml><?xml version="1.0" encoding="utf-8"?>
<math xmlns="http://www.w3.org/1998/Math/MathML" display="block">
  <semantics>
    <mrow>
      <msub>
        <mi>D</mi>
        <mtext>ПВ</mtext>
      </msub>
      <mtext>=</mtext>
      <msub>
        <mi>D</mi>
        <mtext>П</mtext>
      </msub>
      <mtext>+</mtext>
      <msub>
        <mi>D</mi>
        <mtext>ПР</mtext>
      </msub>
      <mtext>=</mtext>
      <mn>320</mn>
      <mtext>+</mtext>
      <mn>2,24</mn>
      <mtext>=</mtext>
      <mn>322,24</mn>
      <mi>.</mi>
    </mrow>
    <annotation encoding="StarMath 5.0">{D} rsub {"ПВ"} "=" {D} rsub {"П"} "+" {D} rsub {"ПР"} "="320"+"2,24"="322,24 .</annotation>
  </semantics>
</math>
</file>

<file path=Object 59/content.xml><?xml version="1.0" encoding="utf-8"?>
<math xmlns="http://www.w3.org/1998/Math/MathML" display="block">
  <semantics>
    <mtable>
      <mtr>
        <mtd>
          <mrow>
            <msub>
              <mi>Q</mi>
              <mn>2</mn>
            </msub>
            <mtext>=</mtext>
            <msub>
              <mi>D</mi>
              <mtext>П</mtext>
            </msub>
            <mi>⋅</mi>
            <mo stretchy="false">(</mo>
            <msub>
              <mi>h</mi>
              <mn>2</mn>
            </msub>
            <mtext>-</mtext>
            <msub>
              <mi>h</mi>
              <mtext>ПВ</mtext>
            </msub>
            <mo stretchy="false">)</mo>
            <mtext>+</mtext>
            <msub>
              <mi>D</mi>
              <mtext>ПР</mtext>
            </msub>
            <mi>⋅</mi>
            <mo stretchy="false">(</mo>
            <msub>
              <mi>h</mi>
              <mtext>ПР</mtext>
            </msub>
            <mtext>-</mtext>
            <msub>
              <mi>h</mi>
              <mtext>ПВ</mtext>
            </msub>
            <mo stretchy="false">)</mo>
            <mtext>=</mtext>
          </mrow>
        </mtd>
      </mtr>
      <mtr>
        <mtd>
          <mrow>
            <mtext>=</mtext>
            <mn>320</mn>
            <mi>⋅</mi>
            <mo stretchy="false">(</mo>
            <mn>2784</mn>
            <mi>,</mi>
            <mn>78</mn>
            <mtext>-</mtext>
            <mn>967</mn>
            <mi>,</mi>
            <mn>59</mn>
            <mo stretchy="false">)</mo>
            <mtext>+</mtext>
            <mn>2,24</mn>
            <mi>⋅</mi>
            <mo stretchy="false">(</mo>
            <mn>1195</mn>
            <mi>,</mi>
            <mn>3</mn>
            <mtext>-</mtext>
            <mn>967</mn>
            <mi>,</mi>
            <mn>59</mn>
            <mo stretchy="false">)</mo>
            <mtext>=</mtext>
            <mn>582010</mn>
            <mi>,</mi>
            <mn>85</mn>
            <mi>.</mi>
          </mrow>
        </mtd>
      </mtr>
    </mtable>
    <annotation encoding="StarMath 5.0">{Q} rsub {2} "=" {D} rsub {"П"} ⋅\( {h} rsub {2} "-" {h} rsub {"ПВ"} \)"+" {D} rsub {"ПР"} ⋅\( {h} rsub {"ПР"} "-" {h} rsub {"ПВ"} \) "=" newline "=" 320 ⋅\( 2784 , 78 "-" 967 , 59 \)"+" 2,24 ⋅\( 1195 , 3 "-" 967 , 59 \) "=" 582010 , 85 .</annotation>
  </semantics>
</math>
</file>

<file path=Object 6/content.xml><?xml version="1.0" encoding="utf-8"?>
<math xmlns="http://www.w3.org/1998/Math/MathML" display="block">
  <semantics>
    <msub>
      <mi>P</mi>
      <mtext>ПВ</mtext>
    </msub>
    <annotation encoding="StarMath 5.0">{P} rsub {"ПВ"}</annotation>
  </semantics>
</math>
</file>

<file path=Object 60/content.xml><?xml version="1.0" encoding="utf-8"?>
<math xmlns="http://www.w3.org/1998/Math/MathML" display="block">
  <semantics>
    <mrow>
      <msub>
        <mi>η</mi>
        <mtext>ПГ</mtext>
      </msub>
      <mtext>=</mtext>
      <mn>0,98</mn>
      <mtext>-</mtext>
      <mn>0,99.</mn>
    </mrow>
    <annotation encoding="StarMath 5.0">{η} rsub {"ПГ"} "=" 0,98 "-" 0,99.</annotation>
  </semantics>
</math>
</file>

<file path=Object 61/content.xml><?xml version="1.0" encoding="utf-8"?>
<math xmlns="http://www.w3.org/1998/Math/MathML" display="block">
  <semantics>
    <mrow>
      <msub>
        <mi>Q</mi>
        <mn>1</mn>
      </msub>
      <mtext>=</mtext>
      <mfrac>
        <msub>
          <mi>Q</mi>
          <mn>2</mn>
        </msub>
        <msub>
          <mi>η</mi>
          <mtext>ПГ</mtext>
        </msub>
      </mfrac>
      <mtext>=</mtext>
      <mfrac>
        <mrow>
          <mn>582010</mn>
          <mi>,</mi>
          <mn>85</mn>
        </mrow>
        <mn>0,985</mn>
      </mfrac>
      <mtext>=</mtext>
      <mn>590873</mn>
      <mi>,</mi>
      <mn>96</mn>
      <mi>.</mi>
    </mrow>
    <annotation encoding="StarMath 5.0">{Q} rsub {1} "=" {{Q} rsub {2}} over {{η} rsub {"ПГ"}} "=" {582010 , 85} over {0,985} "=" 590873 , 96 .</annotation>
  </semantics>
</math>
</file>

<file path=Object 62/content.xml><?xml version="1.0" encoding="utf-8"?>
<math xmlns="http://www.w3.org/1998/Math/MathML" display="block">
  <semantics>
    <mrow>
      <msub>
        <mi>G</mi>
        <mn>1</mn>
      </msub>
      <mtext>=</mtext>
      <mfrac>
        <msub>
          <mi>Q</mi>
          <mn>1</mn>
        </msub>
        <mrow>
          <msub>
            <mi>c</mi>
            <mrow>
              <mi>p</mi>
              <mn>1</mn>
            </mrow>
          </msub>
          <mi>⋅</mi>
          <mo stretchy="false">(</mo>
          <msubsup>
            <mi>t</mi>
            <mn>1</mn>
            <mi>'</mi>
          </msubsup>
          <mtext>-</mtext>
          <msubsup>
            <mi>t</mi>
            <mn>1</mn>
            <mrow>
              <mi>'</mi>
              <mi>'</mi>
            </mrow>
          </msubsup>
          <mo stretchy="false">)</mo>
        </mrow>
      </mfrac>
      <mtext>=</mtext>
      <mfrac>
        <mrow>
          <mn>590873</mn>
          <mi>,</mi>
          <mn>96</mn>
        </mrow>
        <mrow>
          <mn>5,45</mn>
          <mi>⋅</mi>
          <mo stretchy="false">(</mo>
          <mn>310</mn>
          <mtext>-</mtext>
          <mn>282</mn>
          <mo stretchy="false">)</mo>
        </mrow>
      </mfrac>
      <mtext>=</mtext>
      <mn>3870</mn>
      <mi>,</mi>
      <mn>73</mn>
      <mn>.</mn>
    </mrow>
    <annotation encoding="StarMath 5.0">{G} rsub {1} "=" {{Q} rsub {1}} over {{c} rsub {p1} ⋅\( {t} rsub {1} rsup {'} "-" {t} rsub {1} rsup {''} \)} "=" {590873 , 96} over {5,45 ⋅\( 310 "-" 282 \)} "=" 3870 , 73 . </annotation>
  </semantics>
</math>
</file>

<file path=Object 63/content.xml><?xml version="1.0" encoding="utf-8"?>
<math xmlns="http://www.w3.org/1998/Math/MathML" display="block">
  <semantics>
    <mrow>
      <msub>
        <mi>R</mi>
        <mtext>ЗАГР</mtext>
      </msub>
      <mtext>=</mtext>
      <msub>
        <mi>R</mi>
        <mtext>ОК</mtext>
      </msub>
      <mtext>+</mtext>
      <msub>
        <mi>R</mi>
        <mtext>ОТЛ</mtext>
      </msub>
      <mtext>=</mtext>
      <mn>3</mn>
      <mi>⋅</mi>
      <msup>
        <mn>10</mn>
        <mrow>
          <mtext>-</mtext>
          <mn>5</mn>
        </mrow>
      </msup>
      <mtext/>
      <mo stretchy="false">(</mo>
      <msup>
        <mtext>м</mtext>
        <mn>2</mn>
      </msup>
      <mi>⋅</mi>
      <mtext>град</mtext>
      <mo stretchy="false">)</mo>
      <mtext>/</mtext>
      <mtext>Вт</mtext>
      <mi>.</mi>
    </mrow>
    <annotation encoding="StarMath 5.0">{R} rsub {"ЗАГР"} "=" {R} rsub {"ОК"} "+" {R} rsub {"ОТЛ"} "=" 3 ⋅ {10} ^ {"-"5} "" \( {"м"} ^ {2} ⋅ "град" \) "/" "Вт" .</annotation>
  </semantics>
</math>
</file>

<file path=Object 64/content.xml><?xml version="1.0" encoding="utf-8"?>
<math xmlns="http://www.w3.org/1998/Math/MathML" display="block">
  <semantics>
    <mrow>
      <msub>
        <mi>λ</mi>
        <mtext>ТР</mtext>
      </msub>
      <mtext>=</mtext>
      <mi>f</mi>
      <mo stretchy="false">(</mo>
      <msub>
        <mover accent="true">
          <mi>t</mi>
          <mo stretchy="false">´</mo>
        </mover>
        <mn>1</mn>
      </msub>
      <mi>,</mi>
      <mtext>материал</mtext>
      <mo stretchy="false">)</mo>
      <mtext>=</mtext>
      <mn>18,73</mn>
      <mn>.</mn>
    </mrow>
    <annotation encoding="StarMath 5.0">{λ} rsub {"ТР"} "="f\( {acute {t}} rsub {1} , "материал" \) "="18,73 . </annotation>
  </semantics>
</math>
</file>

<file path=Object 65/content.xml><?xml version="1.0" encoding="utf-8"?>
<math xmlns="http://www.w3.org/1998/Math/MathML" display="block">
  <semantics>
    <mrow>
      <mo stretchy="false">(</mo>
      <msup>
        <mtext>м</mtext>
        <mn>2</mn>
      </msup>
      <mi>⋅</mi>
      <mtext>град</mtext>
      <mo stretchy="false">)</mo>
      <mtext>/</mtext>
      <mtext>Вт</mtext>
    </mrow>
    <annotation encoding="StarMath 5.0">\( {"м"} ^ {2} ⋅ "град" \) "/" "Вт"</annotation>
  </semantics>
</math>
</file>

<file path=Object 66/content.xml><?xml version="1.0" encoding="utf-8"?>
<math xmlns="http://www.w3.org/1998/Math/MathML" display="block">
  <semantics>
    <mrow>
      <msub>
        <mi>R</mi>
        <mtext>ТР</mtext>
      </msub>
      <mtext>=</mtext>
      <mfrac>
        <mrow>
          <msub>
            <mi>δ</mi>
            <mtext>ТР</mtext>
          </msub>
          <mi>⋅</mi>
          <msup>
            <mn>10</mn>
            <mrow>
              <mtext>-</mtext>
              <mn>3</mn>
            </mrow>
          </msup>
        </mrow>
        <msub>
          <mi>λ</mi>
          <mtext>ТР</mtext>
        </msub>
      </mfrac>
      <mtext>=</mtext>
      <mfrac>
        <mrow>
          <mn>1,5</mn>
          <mi>⋅</mi>
          <msup>
            <mn>10</mn>
            <mrow>
              <mtext>-</mtext>
              <mn>3</mn>
            </mrow>
          </msup>
        </mrow>
        <mn>18,73</mn>
      </mfrac>
      <mtext>=</mtext>
      <mn>8</mn>
      <mi>,</mi>
      <mn>01</mn>
      <mi>⋅</mi>
      <msup>
        <mn>10</mn>
        <mrow>
          <mtext>-</mtext>
          <mn>5</mn>
        </mrow>
      </msup>
    </mrow>
    <annotation encoding="StarMath 5.0">{R} rsub {"ТР"} "=" {{δ} rsub {"ТР"} ⋅ {10} ^ {"-"3}} over {{λ} rsub {"ТР"}} "=" {1,5 ⋅ {10} ^ {"-"3}} over {18,73} "=" 8 , 01 ⋅ {10} ^ {"-"5}</annotation>
  </semantics>
</math>
</file>

<file path=Object 67/content.xml><?xml version="1.0" encoding="utf-8"?>
<math xmlns="http://www.w3.org/1998/Math/MathML" display="block">
  <semantics>
    <mi>.</mi>
    <annotation encoding="StarMath 5.0">.</annotation>
  </semantics>
</math>
</file>

<file path=Object 68/content.xml><?xml version="1.0" encoding="utf-8"?>
<math xmlns="http://www.w3.org/1998/Math/MathML" display="block">
  <semantics>
    <msub>
      <mi>δ</mi>
      <mtext>ТР</mtext>
    </msub>
    <annotation encoding="StarMath 5.0">{δ} rsub {"ТР"}</annotation>
  </semantics>
</math>
</file>

<file path=Object 69/content.xml><?xml version="1.0" encoding="utf-8"?>
<math xmlns="http://www.w3.org/1998/Math/MathML" display="block">
  <semantics>
    <msub>
      <mi>λ</mi>
      <mtext>ТР</mtext>
    </msub>
    <annotation encoding="StarMath 5.0">{λ} rsub {"ТР"}</annotation>
  </semantics>
</math>
</file>

<file path=Object 7/content.xml><?xml version="1.0" encoding="utf-8"?>
<math xmlns="http://www.w3.org/1998/Math/MathML" display="block">
  <semantics>
    <msub>
      <mi>P</mi>
      <mn>2</mn>
    </msub>
    <annotation encoding="StarMath 5.0">{P} rsub {2}</annotation>
  </semantics>
</math>
</file>

<file path=Object 70/content.xml><?xml version="1.0" encoding="utf-8"?>
<math xmlns="http://www.w3.org/1998/Math/MathML" display="block">
  <semantics>
    <mrow>
      <msub>
        <mtext>Re</mtext>
        <mn>1</mn>
      </msub>
      <mtext>=</mtext>
      <mrow>
        <mfrac>
          <mrow>
            <msub>
              <mi>w</mi>
              <mn>1</mn>
            </msub>
            <mi>⋅</mi>
            <msub>
              <mi>d</mi>
              <mtext>ВН</mtext>
            </msub>
            <mi>⋅</mi>
            <msup>
              <mn>10</mn>
              <mrow>
                <mtext>-</mtext>
                <mn>3</mn>
              </mrow>
            </msup>
          </mrow>
          <msub>
            <mi>ν</mi>
            <mn>1</mn>
          </msub>
        </mfrac>
        <mo stretchy="false">=</mo>
        <mfrac>
          <mrow>
            <mn>2.5</mn>
            <mi>⋅</mi>
            <mn>13.0</mn>
            <mi>⋅</mi>
            <msup>
              <mn>10</mn>
              <mrow>
                <mo stretchy="false">−</mo>
                <mn>3</mn>
              </mrow>
            </msup>
          </mrow>
          <mrow>
            <mn>1,225</mn>
            <mi>·</mi>
            <msup>
              <mn>10</mn>
              <mrow>
                <mo stretchy="false">−</mo>
                <mn>7</mn>
              </mrow>
            </msup>
          </mrow>
        </mfrac>
        <mo stretchy="false">=</mo>
        <mn>265967,3</mn>
      </mrow>
    </mrow>
    <annotation encoding="StarMath 5.0">{"Re"} rsub {1} "=" {{w} rsub {1} ⋅ {d} rsub {"ВН"} ⋅ {10} ^ {"-"3}} over {{ν} rsub {1}} = {2.5⋅13.0⋅10 rsup{ -3 } } over { 1,225 · 10 rsup {-7} } = 265967,3</annotation>
  </semantics>
</math>
</file>

<file path=Object 71/content.xml><?xml version="1.0" encoding="utf-8"?>
<math xmlns="http://www.w3.org/1998/Math/MathML" display="block">
  <semantics>
    <msub>
      <mi>w</mi>
      <mn>1</mn>
    </msub>
    <annotation encoding="StarMath 5.0">{w} rsub {1}</annotation>
  </semantics>
</math>
</file>

<file path=Object 72/content.xml><?xml version="1.0" encoding="utf-8"?>
<math xmlns="http://www.w3.org/1998/Math/MathML" display="block">
  <semantics>
    <mrow>
      <msub>
        <mi>w</mi>
        <mn>1</mn>
      </msub>
      <mtext>=</mtext>
      <mo stretchy="false">[</mo>
      <mn>2,5</mn>
      <mi>;</mi>
      <mn>3,0</mn>
      <mi>;</mi>
      <mn>3,5</mn>
      <mi>;</mi>
      <mn>4,0</mn>
      <mi>;</mi>
      <mn>4,5</mn>
      <mi>;</mi>
      <mn>5</mn>
      <mo stretchy="false">]</mo>
    </mrow>
    <annotation encoding="StarMath 5.0">{w} rsub {1} "="\[ 2,5 ; 3,0 ; 3,5 ; 4,0 ; 4,5 ;5\]</annotation>
  </semantics>
</math>
</file>

<file path=Object 73/content.xml><?xml version="1.0" encoding="utf-8"?>
<math xmlns="http://www.w3.org/1998/Math/MathML" display="block">
  <semantics>
    <msub>
      <mi>ν</mi>
      <mn>1</mn>
    </msub>
    <annotation encoding="StarMath 5.0">{ν} rsub {1}</annotation>
  </semantics>
</math>
</file>

<file path=Object 74/content.xml><?xml version="1.0" encoding="utf-8"?>
<math xmlns="http://www.w3.org/1998/Math/MathML" display="block">
  <semantics>
    <mrow>
      <msub>
        <mi>d</mi>
        <mtext>ВН</mtext>
      </msub>
      <mtext>=</mtext>
      <msub>
        <mi>d</mi>
        <mtext>Н</mtext>
      </msub>
      <mtext>-</mtext>
      <mn>2</mn>
      <msub>
        <mi>δ</mi>
        <mtext>ТР</mtext>
      </msub>
    </mrow>
    <annotation encoding="StarMath 5.0">{d} rsub {"ВН"} "=" {d} rsub {"Н"} "-"2 {δ} rsub {"ТР"}</annotation>
  </semantics>
</math>
</file>

<file path=Object 75/content.xml><?xml version="1.0" encoding="utf-8"?>
<math xmlns="http://www.w3.org/1998/Math/MathML" display="block">
  <semantics>
    <mrow>
      <msub>
        <mtext>Nu</mtext>
        <mn>1</mn>
      </msub>
      <mtext>=</mtext>
      <mn>0,021</mn>
      <mi>⋅</mi>
      <msubsup>
        <mtext>Re</mtext>
        <mn>1</mn>
        <mn>0,8</mn>
      </msubsup>
      <mi>⋅</mi>
      <msubsup>
        <mtext>Pr</mtext>
        <mn>1</mn>
        <mn>0,43</mn>
      </msubsup>
      <mi>⋅</mi>
      <msub>
        <mi>C</mi>
        <mi>t</mi>
      </msub>
      <mi>⋅</mi>
      <mrow>
        <msub>
          <mi>C</mi>
          <mi>l</mi>
        </msub>
        <mo stretchy="false">=</mo>
        <mn>0,021</mn>
      </mrow>
      <mi>⋅</mi>
      <msup>
        <mrow>
          <mo fence="true" form="prefix" stretchy="false">(</mo>
          <mrow>
            <mn>265967,3</mn>
          </mrow>
          <mo fence="true" form="postfix" stretchy="false">)</mo>
        </mrow>
        <mn>0.8</mn>
      </msup>
      <mi>⋅</mi>
      <msup>
        <mrow>
          <mo fence="true" form="prefix" stretchy="false">(</mo>
          <mrow>
            <mn>0.865</mn>
          </mrow>
          <mo fence="true" form="postfix" stretchy="false">)</mo>
        </mrow>
        <mn>0.43</mn>
      </msup>
      <mi>⋅</mi>
      <mn>1</mn>
      <mi>⋅</mi>
      <mrow>
        <mn>1</mn>
        <mo stretchy="false">=</mo>
        <mn>431,6.</mn>
      </mrow>
    </mrow>
    <annotation encoding="StarMath 5.0">{"Nu"} rsub {1} "=" 0,021 ⋅ {"Re"} rsub {1} rsup {0,8} ⋅ {"Pr"} rsub {1} rsup {0,43} ⋅ {C} rsub {t} ⋅ {C} rsub {l} = 0,021⋅(265967,3) rsup0.8
 ⋅(0.865) rsup0.43 ⋅1⋅1 = 431,6. </annotation>
  </semantics>
</math>
</file>

<file path=Object 76/content.xml><?xml version="1.0" encoding="utf-8"?>
<math xmlns="http://www.w3.org/1998/Math/MathML" display="block">
  <semantics>
    <msub>
      <mtext>Pr</mtext>
      <mn>1</mn>
    </msub>
    <annotation encoding="StarMath 5.0">{"Pr"} rsub {1}</annotation>
  </semantics>
</math>
</file>

<file path=Object 77/content.xml><?xml version="1.0" encoding="utf-8"?>
<math xmlns="http://www.w3.org/1998/Math/MathML" display="block">
  <semantics>
    <msub>
      <mi>C</mi>
      <mi>t</mi>
    </msub>
    <annotation encoding="StarMath 5.0">{C} rsub {t}</annotation>
  </semantics>
</math>
</file>

<file path=Object 78/content.xml><?xml version="1.0" encoding="utf-8"?>
<math xmlns="http://www.w3.org/1998/Math/MathML" display="block">
  <semantics>
    <mrow>
      <msub>
        <mi>C</mi>
        <mi>t</mi>
      </msub>
      <mtext>=</mtext>
      <mn>1</mn>
    </mrow>
    <annotation encoding="StarMath 5.0">{C} rsub {t} "="1</annotation>
  </semantics>
</math>
</file>

<file path=Object 79/content.xml><?xml version="1.0" encoding="utf-8"?>
<math xmlns="http://www.w3.org/1998/Math/MathML" display="block">
  <semantics>
    <msub>
      <mi>C</mi>
      <mi>l</mi>
    </msub>
    <annotation encoding="StarMath 5.0">{C} rsub {l}</annotation>
  </semantics>
</math>
</file>

<file path=Object 8/content.xml><?xml version="1.0" encoding="utf-8"?>
<math xmlns="http://www.w3.org/1998/Math/MathML" display="block">
  <semantics>
    <msub>
      <mi>t</mi>
      <mtext>ПВ</mtext>
    </msub>
    <annotation encoding="StarMath 5.0">{t} rsub {"ПВ"}</annotation>
  </semantics>
</math>
</file>

<file path=Object 80/content.xml><?xml version="1.0" encoding="utf-8"?>
<math xmlns="http://www.w3.org/1998/Math/MathML" display="block">
  <semantics>
    <mrow>
      <mo fence="true" form="prefix" stretchy="true">(</mo>
      <mrow>
        <mrow>
          <mi>l</mi>
          <mtext>/</mtext>
          <msub>
            <mi>d</mi>
            <mtext>ВН</mtext>
          </msub>
        </mrow>
      </mrow>
      <mo fence="true" form="postfix" stretchy="true">)</mo>
    </mrow>
    <annotation encoding="StarMath 5.0">left (l "/" {d} rsub {"ВН"} right )</annotation>
  </semantics>
</math>
</file>

<file path=Object 81/content.xml><?xml version="1.0" encoding="utf-8"?>
<math xmlns="http://www.w3.org/1998/Math/MathML" display="block">
  <semantics>
    <mrow>
      <msub>
        <mi>C</mi>
        <mi>l</mi>
      </msub>
      <mtext>=</mtext>
      <mn>1</mn>
    </mrow>
    <annotation encoding="StarMath 5.0">{C} rsub {l} "="1</annotation>
  </semantics>
</math>
</file>

<file path=Object 82/content.xml><?xml version="1.0" encoding="utf-8"?>
<math xmlns="http://www.w3.org/1998/Math/MathML" display="block">
  <semantics>
    <mrow>
      <msub>
        <mi>α</mi>
        <mn>1</mn>
      </msub>
      <mtext>=</mtext>
      <mrow>
        <mrow>
          <mfrac>
            <mrow>
              <msub>
                <mi>λ</mi>
                <mn>1</mn>
              </msub>
              <mo stretchy="false">⋅</mo>
              <msub>
                <mtext>Nu</mtext>
                <mn>1</mn>
              </msub>
            </mrow>
            <msub>
              <mrow>
                <msub>
                  <mi>d</mi>
                  <mtext>ВН</mtext>
                </msub>
                <mo stretchy="false">⋅</mo>
                <msup>
                  <mn>10</mn>
                  <mrow>
                    <mo stretchy="false">−</mo>
                    <mn>3</mn>
                  </mrow>
                </msup>
              </mrow>
              <mn>1</mn>
            </msub>
          </mfrac>
          <mtext>=</mtext>
          <mrow>
            <mfrac>
              <mn>0,565</mn>
              <mrow>
                <mn>13,0</mn>
                <mo stretchy="false">⋅</mo>
                <msup>
                  <mn>10</mn>
                  <mrow>
                    <mo stretchy="false">−</mo>
                    <mn>3</mn>
                  </mrow>
                </msup>
              </mrow>
            </mfrac>
            <mo stretchy="false">⋅</mo>
            <mn>431,6</mn>
          </mrow>
          <mtext>= 18650,9 Вт/(м²·°С)</mtext>
        </mrow>
        <mrow/>
      </mrow>
    </mrow>
    <annotation encoding="StarMath 5.0">{α} rsub {1} "=" {{λ} rsub {1}  cdot {"Nu"} rsub{1} over {{d} rsub {"ВН"} cdot {10} ^ { -3 }} rsub {1} "=" {{0,565} over {{13,0} cdot {10} ^ { -3 }}} cdot 431,6 "= 18650,9 Вт/(м²·°С)"  </annotation>
  </semantics>
</math>
</file>

<file path=Object 83/content.xml><?xml version="1.0" encoding="utf-8"?>
<math xmlns="http://www.w3.org/1998/Math/MathML" display="block">
  <semantics>
    <msub>
      <mi>λ</mi>
      <mn>1</mn>
    </msub>
    <annotation encoding="StarMath 5.0">{λ} rsub {1}</annotation>
  </semantics>
</math>
</file>

<file path=Object 84/content.xml><?xml version="1.0" encoding="utf-8"?>
<math xmlns="http://www.w3.org/1998/Math/MathML" display="block">
  <semantics>
    <msub>
      <mi>d</mi>
      <mtext>ВН</mtext>
    </msub>
    <annotation encoding="StarMath 5.0">{d} rsub {"ВН"}</annotation>
  </semantics>
</math>
</file>

<file path=Object 85/content.xml><?xml version="1.0" encoding="utf-8"?>
<math xmlns="http://www.w3.org/1998/Math/MathML" display="block">
  <semantics>
    <mrow>
      <mrow>
        <msub>
          <mi>S</mi>
          <mi>К</mi>
        </msub>
        <mo stretchy="false">=</mo>
        <mfrac>
          <mrow>
            <mi>π</mi>
            <mo stretchy="false">⋅</mo>
            <msup>
              <mrow>
                <mo fence="true" form="prefix" stretchy="false">(</mo>
                <mrow>
                  <msubsup>
                    <mi>d</mi>
                    <mi mathvariant="italic">ВН</mi>
                    <mi>К</mi>
                  </msubsup>
                </mrow>
                <mo fence="true" form="postfix" stretchy="false">)</mo>
              </mrow>
              <mn>2</mn>
            </msup>
          </mrow>
          <mn>4</mn>
        </mfrac>
        <mo stretchy="false">=</mo>
        <mfrac>
          <mrow>
            <mi>π</mi>
            <mo stretchy="false">⋅</mo>
            <msup>
              <mrow>
                <mo fence="true" form="prefix" stretchy="false">(</mo>
                <mrow>
                  <mn>0,82</mn>
                </mrow>
                <mo fence="true" form="postfix" stretchy="false">)</mo>
              </mrow>
              <mn>2</mn>
            </msup>
          </mrow>
          <mn>4</mn>
        </mfrac>
        <mo stretchy="false">=</mo>
        <mn>0,5281</mn>
      </mrow>
      <msup>
        <mi>м</mi>
        <mn>2</mn>
      </msup>
    </mrow>
    <annotation encoding="StarMath 5.0">S_{К} = {π cdot (d_{ВН}^{К})^2} over {4} =  {π cdot (0,82)^2} over {4} = 0,5281 м^2</annotation>
  </semantics>
</math>
</file>

<file path=Object 86/content.xml><?xml version="1.0" encoding="utf-8"?>
<math xmlns="http://www.w3.org/1998/Math/MathML" display="block">
  <semantics>
    <mrow>
      <msub>
        <mi>w</mi>
        <mn>1</mn>
      </msub>
      <mi>,</mi>
      <mi>м</mi>
      <mtext>/</mtext>
      <mi>с</mi>
    </mrow>
    <annotation encoding="StarMath 5.0">{w} rsub {1} ,м"/"с</annotation>
  </semantics>
</math>
</file>

<file path=Object 87/content.xml><?xml version="1.0" encoding="utf-8"?>
<math xmlns="http://www.w3.org/1998/Math/MathML" display="block">
  <semantics>
    <msub>
      <mtext>Re</mtext>
      <mn>1</mn>
    </msub>
    <annotation encoding="StarMath 5.0">{"Re"} rsub {1}</annotation>
  </semantics>
</math>
</file>

<file path=Object 88/content.xml><?xml version="1.0" encoding="utf-8"?>
<math xmlns="http://www.w3.org/1998/Math/MathML" display="block">
  <semantics>
    <msub>
      <mtext>Nu</mtext>
      <mn>1</mn>
    </msub>
    <annotation encoding="StarMath 5.0">{"Nu"} rsub {1}</annotation>
  </semantics>
</math>
</file>

<file path=Object 89/content.xml><?xml version="1.0" encoding="utf-8"?>
<math xmlns="http://www.w3.org/1998/Math/MathML" display="block">
  <semantics>
    <mrow>
      <msub>
        <mi>α</mi>
        <mn>1</mn>
      </msub>
      <mi>,</mi>
      <mi mathvariant="italic">Вт</mi>
      <mtext>/</mtext>
      <mo stretchy="false">(</mo>
      <mi>м</mi>
      <mn>²</mn>
      <mi>·</mi>
      <mi mathvariant="italic">град</mi>
      <mo stretchy="false">)</mo>
    </mrow>
    <annotation encoding="StarMath 5.0">{α} rsub {1} , Вт"/"\(м²·град\)</annotation>
  </semantics>
</math>
</file>

<file path=Object 9/content.xml><?xml version="1.0" encoding="utf-8"?>
<math xmlns="http://www.w3.org/1998/Math/MathML" display="block">
  <semantics>
    <msub>
      <mi>t</mi>
      <mn>2</mn>
    </msub>
    <annotation encoding="StarMath 5.0">{t} rsub {2}</annotation>
  </semantics>
</math>
</file>

<file path=Object 90/content.xml><?xml version="1.0" encoding="utf-8"?>
<math xmlns="http://www.w3.org/1998/Math/MathML" display="block">
  <semantics>
    <mi>A</mi>
    <annotation encoding="StarMath 5.0">A</annotation>
  </semantics>
</math>
</file>

<file path=Object 91/content.xml><?xml version="1.0" encoding="utf-8"?>
<math xmlns="http://www.w3.org/1998/Math/MathML" display="block">
  <semantics>
    <mrow>
      <mi>A</mi>
      <mtext>=</mtext>
      <mfrac>
        <mn>10,45</mn>
        <mrow>
          <mn>3,3</mn>
          <mtext>-</mtext>
          <mn>0,0113</mn>
          <mi>⋅</mi>
          <mrow>
            <mo fence="true" form="prefix" stretchy="true">(</mo>
            <mrow>
              <mrow>
                <msub>
                  <mi>t</mi>
                  <mrow>
                    <mn>2</mn>
                    <mi>S</mi>
                  </mrow>
                </msub>
                <mtext>-</mtext>
                <mn>100</mn>
              </mrow>
            </mrow>
            <mo fence="true" form="postfix" stretchy="true">)</mo>
          </mrow>
        </mrow>
      </mfrac>
      <mtext>=</mtext>
      <mfrac>
        <mn>10,45</mn>
        <mrow>
          <mn>3,3</mn>
          <mtext>-</mtext>
          <mn>0,0113</mn>
          <mi>⋅</mi>
          <mrow>
            <mo fence="true" form="prefix" stretchy="true">(</mo>
            <mrow>
              <mrow>
                <mn>272</mn>
                <mtext>-</mtext>
                <mn>100</mn>
              </mrow>
            </mrow>
            <mo fence="true" form="postfix" stretchy="true">)</mo>
          </mrow>
        </mrow>
      </mfrac>
      <mtext>=</mtext>
      <mn>7,7042</mn>
      <mn>.</mn>
    </mrow>
    <annotation encoding="StarMath 5.0">A"=" {10,45} over {3,3 "-" 0,0113 ⋅ left (t rsub{2S} "-"100 right )} "=" {10,45} over {3,3 "-" 0,0113 ⋅ left (272 "-"100 right )} "="7,7042 . </annotation>
  </semantics>
</math>
</file>

<file path=Object 92/content.xml><?xml version="1.0" encoding="utf-8"?>
<math xmlns="http://www.w3.org/1998/Math/MathML" display="block">
  <semantics>
    <mi>B</mi>
    <annotation encoding="StarMath 5.0">B</annotation>
  </semantics>
</math>
</file>

<file path=Object 93/content.xml><?xml version="1.0" encoding="utf-8"?>
<math xmlns="http://www.w3.org/1998/Math/MathML" display="block">
  <semantics>
    <mrow>
      <mo stretchy="false">(</mo>
      <msup>
        <mtext>м</mtext>
        <mn>2</mn>
      </msup>
      <mi>⋅</mi>
      <mtext>град</mtext>
      <mo stretchy="false">)</mo>
      <mtext>/</mtext>
      <mtext>Вт</mtext>
    </mrow>
    <annotation encoding="StarMath 5.0">\( {"м"} ^ {2} ⋅ "град" \) "/" "Вт"</annotation>
  </semantics>
</math>
</file>

<file path=Object 94/content.xml><?xml version="1.0" encoding="utf-8"?>
<math xmlns="http://www.w3.org/1998/Math/MathML" display="block">
  <semantics>
    <mrow>
      <mi>B</mi>
      <mtext>=</mtext>
      <mfrac>
        <mn>1</mn>
        <msub>
          <mi>α</mi>
          <mn>1</mn>
        </msub>
      </mfrac>
      <mtext>+</mtext>
      <msub>
        <mi>R</mi>
        <mtext>ЗАГР</mtext>
      </msub>
      <mtext>+</mtext>
      <mrow>
        <msub>
          <mi>R</mi>
          <mtext>ТР</mtext>
        </msub>
        <mo stretchy="false">=</mo>
        <mrow>
          <mfrac>
            <mn>1</mn>
            <mn>18650,9</mn>
          </mfrac>
          <mo stretchy="false">+</mo>
          <mrow>
            <mn>3,0</mn>
            <mo stretchy="false">⋅</mo>
            <msup>
              <mn>10</mn>
              <mrow>
                <mo stretchy="false">−</mo>
                <mn>5</mn>
              </mrow>
            </msup>
          </mrow>
          <mo stretchy="false">+</mo>
          <mrow>
            <mn>8,007</mn>
            <mo stretchy="false">⋅</mo>
            <msup>
              <mn>10</mn>
              <mrow>
                <mo stretchy="false">−</mo>
                <mn>5</mn>
              </mrow>
            </msup>
          </mrow>
        </mrow>
        <mo stretchy="false">=</mo>
        <mrow>
          <mn>16,368</mn>
          <mo stretchy="false">⋅</mo>
          <msup>
            <mn>10</mn>
            <mrow>
              <mo stretchy="false">−</mo>
              <mn>5</mn>
            </mrow>
          </msup>
        </mrow>
      </mrow>
      <mn>.</mn>
    </mrow>
    <annotation encoding="StarMath 5.0">B"=" {1} over {{α} rsub {1}} "+" {R} rsub {"ЗАГР"} "+" {R} rsub {"ТР"} = {1} over {18650,9} + 3,0 cdot 10^{-5} + 8,007 cdot 10^{-5}  = 16,368 cdot 10^{-5}. </annotation>
  </semantics>
</math>
</file>

<file path=Object 95/content.xml><?xml version="1.0" encoding="utf-8"?>
<math xmlns="http://www.w3.org/1998/Math/MathML" display="block">
  <semantics>
    <mtable>
      <mtr>
        <mtd>
          <mrow>
            <mrow>
              <msub>
                <mi mathvariant="italic">δt</mi>
                <mi>Б</mi>
              </msub>
              <mo stretchy="false">=</mo>
              <mi>t</mi>
            </mrow>
            <mrow>
              <mrow>
                <msub>
                  <mi>'</mi>
                  <mn>1</mn>
                </msub>
                <mo stretchy="false">−</mo>
                <msub>
                  <mi>t</mi>
                  <mrow>
                    <mn>2</mn>
                    <mi>S</mi>
                  </mrow>
                </msub>
              </mrow>
              <mo stretchy="false">=</mo>
              <mrow>
                <mn>310</mn>
                <mo stretchy="false">−</mo>
                <mn>272,0</mn>
              </mrow>
              <mo stretchy="false">=</mo>
              <mn>38,0</mn>
            </mrow>
            <mi>°</mi>
            <mi>С</mi>
            <mi>,</mi>
          </mrow>
        </mtd>
      </mtr>
      <mtr>
        <mtd>
          <mrow>
            <mrow>
              <msub>
                <mi mathvariant="italic">δt</mi>
                <mi>М</mi>
              </msub>
              <mo stretchy="false">=</mo>
              <mi>t</mi>
            </mrow>
            <mi>'</mi>
            <mrow>
              <mrow>
                <msub>
                  <mi>'</mi>
                  <mn>1</mn>
                </msub>
                <mo stretchy="false">−</mo>
                <msub>
                  <mi>t</mi>
                  <mrow>
                    <mn>2</mn>
                    <mi>S</mi>
                  </mrow>
                </msub>
              </mrow>
              <mo stretchy="false">=</mo>
              <mrow>
                <mn>282</mn>
                <mo stretchy="false">−</mo>
                <mn>272,0</mn>
              </mrow>
              <mo stretchy="false">=</mo>
              <mn>10,0</mn>
            </mrow>
            <mi>°</mi>
            <mi>С</mi>
          </mrow>
        </mtd>
      </mtr>
    </mtable>
    <annotation encoding="StarMath 5.0">δt_Б = t'_1 - t_{2S} = 310 - 272,0 = 38,0 °С, newline
δt_М = t''_1 - t_{2S} = 282 - 272,0 = 10,0 °С</annotation>
  </semantics>
</math>
</file>

<file path=Object 96/content.xml><?xml version="1.0" encoding="utf-8"?>
<math xmlns="http://www.w3.org/1998/Math/MathML" display="block">
  <semantics>
    <mrow>
      <mo fence="true" form="prefix" stretchy="true">{</mo>
      <mrow>
        <mtable>
          <mtr>
            <mtd>
              <mrow>
                <mrow>
                  <msub>
                    <mi>k</mi>
                    <mi mathvariant="italic">вх</mi>
                  </msub>
                  <mo stretchy="false">=</mo>
                  <mfrac>
                    <mn>1</mn>
                    <mrow>
                      <mi>B</mi>
                      <mo stretchy="false">+</mo>
                      <mfrac>
                        <mn>1</mn>
                        <mrow>
                          <mi>A</mi>
                          <mo stretchy="false">⋅</mo>
                          <msubsup>
                            <mi>q</mi>
                            <mi mathvariant="italic">вх</mi>
                            <mn>0,7</mn>
                          </msubsup>
                        </mrow>
                      </mfrac>
                    </mrow>
                  </mfrac>
                </mrow>
                <mi>;</mi>
              </mrow>
            </mtd>
          </mtr>
          <mtr>
            <mtd>
              <mrow>
                <msub>
                  <mi>q</mi>
                  <mi mathvariant="italic">вх</mi>
                </msub>
                <mo stretchy="false">=</mo>
                <mrow>
                  <msub>
                    <mi>k</mi>
                    <mi mathvariant="italic">вх</mi>
                  </msub>
                  <mo stretchy="false">⋅</mo>
                  <msub>
                    <mi mathvariant="italic">δt</mi>
                    <mrow>
                      <mi>Б</mi>
                      <mn>.</mn>
                    </mrow>
                  </msub>
                </mrow>
              </mrow>
            </mtd>
          </mtr>
        </mtable>
      </mrow>
    </mrow>
    <annotation encoding="StarMath 5.0">left lbrace   stack{k_{вх} = {1} over {B + {1} over {A cdot q_{вх}^{0,7}}} ; #  q_{вх} = k_{вх} cdot δt_Б.}   right none</annotation>
  </semantics>
</math>
</file>

<file path=Object 97/content.xml><?xml version="1.0" encoding="utf-8"?>
<math xmlns="http://www.w3.org/1998/Math/MathML" display="block">
  <semantics>
    <mrow>
      <mrow>
        <msub>
          <mi mathvariant="italic">δt</mi>
          <mi>л</mi>
        </msub>
        <mo stretchy="false">=</mo>
        <mfrac>
          <mrow>
            <msub>
              <mi mathvariant="italic">δt</mi>
              <mi>Б</mi>
            </msub>
            <mo stretchy="false">−</mo>
            <msub>
              <mi mathvariant="italic">δt</mi>
              <mi>М</mi>
            </msub>
          </mrow>
          <mrow>
            <mi>ln</mi>
            <mrow>
              <mo fence="true" form="prefix" stretchy="false">(</mo>
              <mrow>
                <mrow>
                  <msub>
                    <mi mathvariant="italic">δt</mi>
                    <mi>Б</mi>
                  </msub>
                  <mo stretchy="false">/</mo>
                  <msub>
                    <mi mathvariant="italic">δt</mi>
                    <mi>М</mi>
                  </msub>
                </mrow>
              </mrow>
              <mo fence="true" form="postfix" stretchy="false">)</mo>
            </mrow>
          </mrow>
        </mfrac>
        <mo stretchy="false">=</mo>
        <mfrac>
          <mrow>
            <mn>38,0</mn>
            <mo stretchy="false">−</mo>
            <mn>10,0</mn>
          </mrow>
          <mrow>
            <mi>ln</mi>
            <mrow>
              <mo fence="true" form="prefix" stretchy="false">(</mo>
              <mrow>
                <mrow>
                  <mn>38,0</mn>
                  <mo stretchy="false">/</mo>
                  <mn>10,0</mn>
                </mrow>
              </mrow>
              <mo fence="true" form="postfix" stretchy="false">)</mo>
            </mrow>
          </mrow>
        </mfrac>
        <mo stretchy="false">=</mo>
        <mfrac>
          <mn>28,0</mn>
          <mrow>
            <mi>ln</mi>
            <mn>3,8</mn>
          </mrow>
        </mfrac>
        <mo stretchy="false">=</mo>
        <mfrac>
          <mn>28,0</mn>
          <mn>1,3350</mn>
        </mfrac>
        <mo stretchy="false">≈</mo>
        <mn>20,97</mn>
      </mrow>
      <mi>°</mi>
      <mi>С</mi>
    </mrow>
    <annotation encoding="StarMath 5.0">δt_л = {δt_Б - δt_М} over {ln(δt_Б / δt_М)} = {38,0 - 10,0} over {ln(38,0 / 10,0)} = {28,0} over {ln 3,8} = {28,0} over {1,3350} approx 20,97 °С</annotation>
  </semantics>
</math>
</file>

<file path=Object 98/content.xml><?xml version="1.0" encoding="utf-8"?>
<math xmlns="http://www.w3.org/1998/Math/MathML" display="block">
  <semantics>
    <msub>
      <mi>q</mi>
      <mtext>вх</mtext>
    </msub>
    <annotation encoding="StarMath 5.0">{q} rsub {"вх"}</annotation>
  </semantics>
</math>
</file>

<file path=Object 99/content.xml><?xml version="1.0" encoding="utf-8"?>
<math xmlns="http://www.w3.org/1998/Math/MathML" display="block">
  <semantics>
    <mrow>
      <msup>
        <mi>q</mi>
        <mtext>*</mtext>
      </msup>
      <mtext>=</mtext>
      <mn>150</mn>
      <mtext/>
      <msup>
        <mtext>кВт/м</mtext>
        <mn>2</mn>
      </msup>
    </mrow>
    <annotation encoding="StarMath 5.0">{q} ^ {"*"} "=" 150 "" {"кВт/м"} ^ {2} 
</annotation>
  </semantics>
</math>
</file>